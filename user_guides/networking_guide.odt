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5000001BC6E9A95D1451373D3.png" manifest:media-type="image/png"/>
  <manifest:file-entry manifest:full-path="Pictures/100000000000014700000134523A20D9DCA9FC48.png" manifest:media-type="image/png"/>
  <manifest:file-entry manifest:full-path="Pictures/10000000000002B9000002B2773038BBF3941BEB.png" manifest:media-type="image/png"/>
  <manifest:file-entry manifest:full-path="Pictures/1000000000000165000001BC723EECD6F4348E50.png" manifest:media-type="image/png"/>
  <manifest:file-entry manifest:full-path="Pictures/1000000000000165000001BC1F1B1880A255E8A2.png" manifest:media-type="image/png"/>
  <manifest:file-entry manifest:full-path="Pictures/100000000000038C0000024523C6A08DEB278394.png" manifest:media-type="image/png"/>
  <manifest:file-entry manifest:full-path="Pictures/10000000000002B9000002B2ECC8BFF1B9A18218.png" manifest:media-type="image/png"/>
  <manifest:file-entry manifest:full-path="Pictures/100000000000017E000001D622D0D53580192F41.png" manifest:media-type="image/png"/>
  <manifest:file-entry manifest:full-path="Pictures/100000000000015B000001D93093FE951529B0BF.png" manifest:media-type="image/png"/>
  <manifest:file-entry manifest:full-path="Pictures/10000000000002B9000002B256B4781624BC81F8.png" manifest:media-type="image/png"/>
  <manifest:file-entry manifest:full-path="Pictures/1000000000000165000001BC24DF4F2BD4F2BB54.png" manifest:media-type="image/png"/>
  <manifest:file-entry manifest:full-path="Pictures/1000000000000165000001BC06D108802E5C91C9.png" manifest:media-type="image/png"/>
  <manifest:file-entry manifest:full-path="Pictures/10000000000004540000024596F6B5B0186FF26F.png" manifest:media-type="image/png"/>
  <manifest:file-entry manifest:full-path="Pictures/1000000000000454000002458CEF8725753D6297.png" manifest:media-type="image/png"/>
  <manifest:file-entry manifest:full-path="Pictures/100000000000020F00000080149223C0FAB89B46.jpg" manifest:media-type="image/jpeg"/>
  <manifest:file-entry manifest:full-path="Pictures/100000000000015B000001D9526A65C08552BD76.png" manifest:media-type="image/png"/>
  <manifest:file-entry manifest:full-path="Pictures/10000000000003350000024548C0FCDCFA4B6DBF.png" manifest:media-type="image/png"/>
  <manifest:file-entry manifest:full-path="Pictures/1000020100000154000001186A691DB4C3AFC7D5.png" manifest:media-type="image/png"/>
  <manifest:file-entry manifest:full-path="Pictures/1000000000000165000001BC64819848410C8AEB.png" manifest:media-type="image/png"/>
  <manifest:file-entry manifest:full-path="Pictures/10000000000002B9000002B26B9CAE3890A650E2.png" manifest:media-type="image/png"/>
  <manifest:file-entry manifest:full-path="Pictures/100000000000033500000245D58202A4BE641F90.png" manifest:media-type="image/png"/>
  <manifest:file-entry manifest:full-path="Pictures/1000000000000150000001A017CBB3A60A8FB5A8.png" manifest:media-type="image/png"/>
  <manifest:file-entry manifest:full-path="Pictures/100000000000014700000134183F178113B4A5FD.png" manifest:media-type="image/png"/>
  <manifest:file-entry manifest:full-path="Pictures/10000000000001500000019F468282747EA041F2.png" manifest:media-type="image/png"/>
  <manifest:file-entry manifest:full-path="Pictures/1000000000000165000001BC5FFBF3CCDC887C47.png" manifest:media-type="image/png"/>
  <manifest:file-entry manifest:full-path="Pictures/100000000000038C000002451A6EE0D82978B0DE.png" manifest:media-type="image/png"/>
  <manifest:file-entry manifest:full-path="Pictures/1000000000000165000001BC8CC6E98C165941F1.png" manifest:media-type="image/png"/>
  <manifest:file-entry manifest:full-path="Pictures/1000000000000165000001BC019403FE6A254468.png" manifest:media-type="image/png"/>
  <manifest:file-entry manifest:full-path="Pictures/1000000000000165000001BC50BDB42C80A14196.png" manifest:media-type="image/png"/>
  <manifest:file-entry manifest:full-path="Pictures/1000000000000165000001BC9F243323B5AB157C.png" manifest:media-type="image/png"/>
  <manifest:file-entry manifest:full-path="Pictures/1000000000000165000001BCD7AB2848EF7FA311.png" manifest:media-type="image/png"/>
  <manifest:file-entry manifest:full-path="Pictures/1000000000000165000001BCA482CD0433677F53.png" manifest:media-type="image/png"/>
  <manifest:file-entry manifest:full-path="Pictures/1000000000000165000001BC8FC56F6F70746F58.png" manifest:media-type="image/png"/>
  <manifest:file-entry manifest:full-path="Pictures/10000000000002B9000002B21F3562AE5525B997.png" manifest:media-type="image/png"/>
  <manifest:file-entry manifest:full-path="Pictures/1000000000000165000001BC6ABAA31858B8C7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normal" officeooo:rsid="001febc1" officeooo:paragraph-rsid="0013c6af" style:font-weight-asian="normal" style:font-weight-complex="normal"/>
    </style:style>
    <style:style style:name="P2" style:family="paragraph" style:parent-style-name="Text_20_body">
      <style:text-properties fo:font-weight="normal" officeooo:rsid="0040fa09" officeooo:paragraph-rsid="0040fa09" style:font-weight-asian="normal" style:font-weight-complex="normal"/>
    </style:style>
    <style:style style:name="P3" style:family="paragraph" style:parent-style-name="Text_20_body">
      <style:paragraph-properties fo:text-align="center" style:justify-single-word="false"/>
      <style:text-properties style:font-name="Liberation Sans" fo:font-weight="normal" officeooo:rsid="00286c4c" officeooo:paragraph-rsid="0013c6af" style:font-name-asian="DejaVu Sans" style:font-weight-asian="normal" style:font-name-complex="FreeSans" style:font-weight-complex="normal"/>
    </style:style>
    <style:style style:name="P4" style:family="paragraph" style:parent-style-name="Text_20_body">
      <style:text-properties officeooo:paragraph-rsid="001540a6"/>
    </style:style>
    <style:style style:name="P5" style:family="paragraph" style:parent-style-name="Text_20_body">
      <style:text-properties officeooo:rsid="0016ef78" officeooo:paragraph-rsid="001839fd"/>
    </style:style>
    <style:style style:name="P6" style:family="paragraph" style:parent-style-name="Text_20_body">
      <style:text-properties officeooo:rsid="0018d593" officeooo:paragraph-rsid="0018d593"/>
    </style:style>
    <style:style style:name="P7" style:family="paragraph" style:parent-style-name="Text_20_body">
      <style:text-properties officeooo:rsid="0018d593" officeooo:paragraph-rsid="0019f69a"/>
    </style:style>
    <style:style style:name="P8" style:family="paragraph" style:parent-style-name="Text_20_body">
      <style:text-properties officeooo:rsid="0018d593" officeooo:paragraph-rsid="001b9ece"/>
    </style:style>
    <style:style style:name="P9" style:family="paragraph" style:parent-style-name="Text_20_body">
      <style:text-properties officeooo:rsid="001b9ece" officeooo:paragraph-rsid="001b9ece"/>
    </style:style>
    <style:style style:name="P10" style:family="paragraph" style:parent-style-name="Text_20_body">
      <style:text-properties officeooo:rsid="001b9ece" officeooo:paragraph-rsid="001e9f30"/>
    </style:style>
    <style:style style:name="P11" style:family="paragraph" style:parent-style-name="Text_20_body">
      <style:text-properties officeooo:rsid="001b9ece" officeooo:paragraph-rsid="002379eb"/>
    </style:style>
    <style:style style:name="P12" style:family="paragraph" style:parent-style-name="Text_20_body">
      <style:text-properties officeooo:rsid="001d52ba" officeooo:paragraph-rsid="001d52ba"/>
    </style:style>
    <style:style style:name="P13" style:family="paragraph" style:parent-style-name="Text_20_body">
      <style:text-properties officeooo:rsid="001d52ba" officeooo:paragraph-rsid="004b8f35"/>
    </style:style>
    <style:style style:name="P14" style:family="paragraph" style:parent-style-name="Text_20_body">
      <style:text-properties officeooo:rsid="00209e5d" officeooo:paragraph-rsid="00209e5d"/>
    </style:style>
    <style:style style:name="P15" style:family="paragraph" style:parent-style-name="Text_20_body">
      <style:text-properties officeooo:rsid="00209e5d" officeooo:paragraph-rsid="001d52ba"/>
    </style:style>
    <style:style style:name="P16" style:family="paragraph" style:parent-style-name="Text_20_body">
      <style:text-properties officeooo:rsid="00222ab4" officeooo:paragraph-rsid="00222ab4"/>
    </style:style>
    <style:style style:name="P17" style:family="paragraph" style:parent-style-name="Text_20_body">
      <style:text-properties officeooo:rsid="00222ab4" officeooo:paragraph-rsid="00255fa9"/>
    </style:style>
    <style:style style:name="P18" style:family="paragraph" style:parent-style-name="Text_20_body">
      <style:text-properties officeooo:rsid="00222ab4" officeooo:paragraph-rsid="002688f3"/>
    </style:style>
    <style:style style:name="P19" style:family="paragraph" style:parent-style-name="Text_20_body">
      <style:text-properties officeooo:rsid="00222ab4" officeooo:paragraph-rsid="002e0938"/>
    </style:style>
    <style:style style:name="P20" style:family="paragraph" style:parent-style-name="Text_20_body">
      <style:text-properties officeooo:rsid="00222ab4" officeooo:paragraph-rsid="002e77fb"/>
    </style:style>
    <style:style style:name="P21" style:family="paragraph" style:parent-style-name="Text_20_body">
      <style:text-properties officeooo:rsid="00222ab4" officeooo:paragraph-rsid="004b8f35"/>
    </style:style>
    <style:style style:name="P22" style:family="paragraph" style:parent-style-name="Text_20_body">
      <style:text-properties officeooo:rsid="00222ab4" officeooo:paragraph-rsid="004b967f"/>
    </style:style>
    <style:style style:name="P23" style:family="paragraph" style:parent-style-name="Text_20_body">
      <style:text-properties officeooo:rsid="00222ab4" officeooo:paragraph-rsid="0053eb08"/>
    </style:style>
    <style:style style:name="P24" style:family="paragraph" style:parent-style-name="Text_20_body">
      <style:text-properties officeooo:rsid="002688f3" officeooo:paragraph-rsid="002688f3"/>
    </style:style>
    <style:style style:name="P25" style:family="paragraph" style:parent-style-name="Text_20_body">
      <style:text-properties officeooo:rsid="002688f3" officeooo:paragraph-rsid="0027b4cb"/>
    </style:style>
    <style:style style:name="P26" style:family="paragraph" style:parent-style-name="Text_20_body">
      <style:text-properties officeooo:rsid="0027b4cb" officeooo:paragraph-rsid="0027b4cb"/>
    </style:style>
    <style:style style:name="P27" style:family="paragraph" style:parent-style-name="Text_20_body">
      <style:text-properties officeooo:rsid="0027b4cb" officeooo:paragraph-rsid="00298b7f"/>
    </style:style>
    <style:style style:name="P28" style:family="paragraph" style:parent-style-name="Text_20_body">
      <style:text-properties officeooo:rsid="0027b4cb" officeooo:paragraph-rsid="0034bc1f"/>
    </style:style>
    <style:style style:name="P29" style:family="paragraph" style:parent-style-name="Text_20_body">
      <style:text-properties officeooo:rsid="0027b4cb" officeooo:paragraph-rsid="003697ba"/>
    </style:style>
    <style:style style:name="P30" style:family="paragraph" style:parent-style-name="Text_20_body">
      <style:text-properties officeooo:rsid="00298b7f" officeooo:paragraph-rsid="00298b7f"/>
    </style:style>
    <style:style style:name="P31" style:family="paragraph" style:parent-style-name="Text_20_body">
      <style:text-properties officeooo:rsid="002afe3a" officeooo:paragraph-rsid="002afe3a"/>
    </style:style>
    <style:style style:name="P32" style:family="paragraph" style:parent-style-name="Text_20_body">
      <style:text-properties fo:font-style="italic" officeooo:rsid="001e9f30" officeooo:paragraph-rsid="00209e5d" style:font-style-asian="italic" style:font-style-complex="italic"/>
    </style:style>
    <style:style style:name="P33" style:family="paragraph" style:parent-style-name="Text_20_body">
      <style:text-properties fo:font-style="italic" officeooo:rsid="0045686a" officeooo:paragraph-rsid="0045686a" style:font-style-asian="italic" style:font-style-complex="italic"/>
    </style:style>
    <style:style style:name="P34" style:family="paragraph" style:parent-style-name="Text_20_body">
      <style:text-properties officeooo:rsid="00302057" officeooo:paragraph-rsid="00302057"/>
    </style:style>
    <style:style style:name="P35" style:family="paragraph" style:parent-style-name="Text_20_body">
      <style:text-properties officeooo:rsid="00319f9e" officeooo:paragraph-rsid="00319f9e"/>
    </style:style>
    <style:style style:name="P36" style:family="paragraph" style:parent-style-name="Text_20_body">
      <style:text-properties officeooo:rsid="00322011" officeooo:paragraph-rsid="00319f9e"/>
    </style:style>
    <style:style style:name="P37" style:family="paragraph" style:parent-style-name="Text_20_body">
      <style:text-properties officeooo:rsid="00322011" officeooo:paragraph-rsid="0034bc1f"/>
    </style:style>
    <style:style style:name="P38" style:family="paragraph" style:parent-style-name="Text_20_body">
      <style:text-properties officeooo:rsid="0034bc1f" officeooo:paragraph-rsid="0034bc1f"/>
    </style:style>
    <style:style style:name="P39" style:family="paragraph" style:parent-style-name="Text_20_body">
      <style:text-properties officeooo:paragraph-rsid="0038679a"/>
    </style:style>
    <style:style style:name="P40" style:family="paragraph" style:parent-style-name="Text_20_body">
      <style:text-properties officeooo:rsid="0038679a" officeooo:paragraph-rsid="0038679a"/>
    </style:style>
    <style:style style:name="P41" style:family="paragraph" style:parent-style-name="Text_20_body">
      <style:text-properties fo:font-style="normal" fo:font-weight="normal" officeooo:rsid="003697ba" officeooo:paragraph-rsid="003b53e9" style:font-style-asian="normal" style:font-weight-asian="normal" style:font-style-complex="normal" style:font-weight-complex="normal"/>
    </style:style>
    <style:style style:name="P42" style:family="paragraph" style:parent-style-name="Text_20_body">
      <style:text-properties fo:font-style="normal" fo:font-weight="normal" officeooo:rsid="0038679a" officeooo:paragraph-rsid="0038679a" style:font-style-asian="normal" style:font-weight-asian="normal" style:font-style-complex="normal" style:font-weight-complex="normal"/>
    </style:style>
    <style:style style:name="P43" style:family="paragraph" style:parent-style-name="Text_20_body">
      <style:text-properties officeooo:rsid="002b8c95" officeooo:paragraph-rsid="0038679a"/>
    </style:style>
    <style:style style:name="P44" style:family="paragraph" style:parent-style-name="Text_20_body">
      <style:text-properties officeooo:rsid="001839fd" officeooo:paragraph-rsid="001839fd"/>
    </style:style>
    <style:style style:name="P45" style:family="paragraph" style:parent-style-name="Text_20_body">
      <style:text-properties officeooo:rsid="0039d87f" officeooo:paragraph-rsid="0039d87f"/>
    </style:style>
    <style:style style:name="P46" style:family="paragraph" style:parent-style-name="Text_20_body">
      <style:text-properties officeooo:rsid="003e1ef0" officeooo:paragraph-rsid="003e1ef0"/>
    </style:style>
    <style:style style:name="P47" style:family="paragraph" style:parent-style-name="Text_20_body">
      <style:text-properties officeooo:rsid="003e1ef0" officeooo:paragraph-rsid="003ec431"/>
    </style:style>
    <style:style style:name="P48" style:family="paragraph" style:parent-style-name="Text_20_body">
      <style:text-properties officeooo:rsid="003e7aac" officeooo:paragraph-rsid="003e7aac"/>
    </style:style>
    <style:style style:name="P49" style:family="paragraph" style:parent-style-name="Text_20_body">
      <style:text-properties officeooo:rsid="003e7aac" officeooo:paragraph-rsid="00423ced"/>
    </style:style>
    <style:style style:name="P50" style:family="paragraph" style:parent-style-name="Text_20_body">
      <style:text-properties officeooo:rsid="0040fa09" officeooo:paragraph-rsid="004b9cfe"/>
    </style:style>
    <style:style style:name="P51" style:family="paragraph" style:parent-style-name="Text_20_body">
      <style:text-properties officeooo:rsid="0041c7c0" officeooo:paragraph-rsid="0041c7c0"/>
    </style:style>
    <style:style style:name="P52" style:family="paragraph" style:parent-style-name="Text_20_body">
      <style:text-properties officeooo:rsid="0041c7c0" officeooo:paragraph-rsid="00423ced"/>
    </style:style>
    <style:style style:name="P53" style:family="paragraph" style:parent-style-name="Text_20_body">
      <style:text-properties officeooo:rsid="00423ced" officeooo:paragraph-rsid="00423ced"/>
    </style:style>
    <style:style style:name="P54" style:family="paragraph" style:parent-style-name="Text_20_body">
      <style:text-properties officeooo:rsid="00423ced" officeooo:paragraph-rsid="004376aa"/>
    </style:style>
    <style:style style:name="P55" style:family="paragraph" style:parent-style-name="Text_20_body">
      <style:text-properties officeooo:rsid="004376aa" officeooo:paragraph-rsid="004376aa"/>
    </style:style>
    <style:style style:name="P56" style:family="paragraph" style:parent-style-name="Text_20_body">
      <style:text-properties officeooo:rsid="0045686a" officeooo:paragraph-rsid="0045686a"/>
    </style:style>
    <style:style style:name="P57" style:family="paragraph" style:parent-style-name="Text_20_body">
      <style:paragraph-properties fo:text-align="center" style:justify-single-word="false"/>
      <style:text-properties officeooo:rsid="00499b71" officeooo:paragraph-rsid="00499b71"/>
    </style:style>
    <style:style style:name="P58" style:family="paragraph" style:parent-style-name="Text_20_body">
      <style:text-properties officeooo:rsid="00546024" officeooo:paragraph-rsid="0059480b"/>
    </style:style>
    <style:style style:name="P59" style:family="paragraph" style:parent-style-name="Text_20_body">
      <style:text-properties officeooo:paragraph-rsid="0059480b"/>
    </style:style>
    <style:style style:name="P60" style:family="paragraph" style:parent-style-name="Subtitle">
      <style:text-properties officeooo:paragraph-rsid="000bf2f2"/>
    </style:style>
    <style:style style:name="P61" style:family="paragraph" style:parent-style-name="Standard">
      <style:text-properties officeooo:rsid="0038679a" officeooo:paragraph-rsid="0038679a"/>
    </style:style>
    <style:style style:name="P62" style:family="paragraph" style:parent-style-name="Standard">
      <style:text-properties officeooo:rsid="0038679a" officeooo:paragraph-rsid="003b53e9"/>
    </style:style>
    <style:style style:name="P63" style:family="paragraph" style:parent-style-name="Standard">
      <style:text-properties officeooo:rsid="0038679a" officeooo:paragraph-rsid="004b967f"/>
    </style:style>
    <style:style style:name="P64" style:family="paragraph" style:parent-style-name="Heading_20_3">
      <style:text-properties officeooo:paragraph-rsid="003b53e9"/>
    </style:style>
    <style:style style:name="P65" style:family="paragraph" style:parent-style-name="Heading_20_3">
      <style:text-properties officeooo:rsid="0041c7c0" officeooo:paragraph-rsid="00423ced"/>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Heading_20_3">
      <style:paragraph-properties fo:break-before="page"/>
      <style:text-properties officeooo:rsid="0041c7c0" officeooo:paragraph-rsid="00423ced"/>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Heading_20_1" style:list-style-name=""/>
    <style:style style:name="P70" style:family="paragraph" style:parent-style-name="Heading_20_1" style:list-style-name="">
      <style:text-properties officeooo:paragraph-rsid="005e4e65"/>
    </style:style>
    <style:style style:name="P71" style:family="paragraph" style:parent-style-name="Heading_20_1">
      <style:text-properties officeooo:rsid="0038679a" officeooo:paragraph-rsid="005e4e65"/>
    </style:style>
    <style:style style:name="P72" style:family="paragraph" style:parent-style-name="Heading_20_1">
      <style:text-properties fo:font-weight="bold" officeooo:rsid="003ec431" officeooo:paragraph-rsid="003ec431" style:font-weight-asian="bold" style:font-weight-complex="bol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5e4e65"/>
    </style:style>
    <style:style style:name="P75" style:family="paragraph" style:parent-style-name="Heading_20_2">
      <style:text-properties officeooo:rsid="0027b4cb" officeooo:paragraph-rsid="0038679a"/>
    </style:style>
    <style:style style:name="P76" style:family="paragraph" style:parent-style-name="Heading_20_2" style:list-style-name=""/>
    <style:style style:name="P77" style:family="paragraph" style:parent-style-name="Heading_20_2" style:list-style-name="">
      <style:text-properties officeooo:rsid="004376aa" officeooo:paragraph-rsid="0045686a"/>
    </style:style>
    <style:style style:name="P78" style:family="paragraph" style:parent-style-name="Heading_20_2" style:list-style-name="">
      <style:text-properties officeooo:rsid="0062113c" officeooo:paragraph-rsid="0062113c"/>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rsid="0045686a" officeooo:paragraph-rsid="0045686a"/>
    </style:style>
    <style:style style:name="P81" style:family="paragraph" style:parent-style-name="Heading_20_3">
      <style:text-properties officeooo:rsid="0041c7c0" officeooo:paragraph-rsid="0062113c"/>
    </style:style>
    <style:style style:name="P82" style:family="paragraph" style:parent-style-name="Standard" style:list-style-name="L3">
      <style:text-properties officeooo:rsid="0034bc1f" officeooo:paragraph-rsid="0034bc1f"/>
    </style:style>
    <style:style style:name="P83" style:family="paragraph" style:parent-style-name="Standard" style:list-style-name="L4">
      <style:text-properties officeooo:paragraph-rsid="003697ba"/>
    </style:style>
    <style:style style:name="P84" style:family="paragraph" style:parent-style-name="Standard" style:list-style-name="L4">
      <style:text-properties officeooo:rsid="00298b7f" officeooo:paragraph-rsid="00379b32"/>
    </style:style>
    <style:style style:name="P85" style:family="paragraph" style:parent-style-name="Standard" style:list-style-name="L4">
      <style:text-properties fo:font-style="normal" fo:font-weight="normal" officeooo:rsid="003697ba" officeooo:paragraph-rsid="003697ba" style:font-style-asian="normal" style:font-weight-asian="normal" style:font-style-complex="normal" style:font-weight-complex="normal"/>
    </style:style>
    <style:style style:name="P86" style:family="paragraph" style:parent-style-name="Standard" style:list-style-name="L5"/>
    <style:style style:name="P87" style:family="paragraph" style:parent-style-name="Standard" style:list-style-name="L6"/>
    <style:style style:name="P88" style:family="paragraph" style:parent-style-name="Standard" style:list-style-name="L7"/>
    <style:style style:name="P89" style:family="paragraph" style:parent-style-name="Standard">
      <style:text-properties officeooo:rsid="006024e4" officeooo:paragraph-rsid="006024e4"/>
    </style:style>
    <style:style style:name="P90" style:family="paragraph" style:parent-style-name="Standard" style:list-style-name="">
      <style:text-properties officeooo:rsid="006024e4" officeooo:paragraph-rsid="0063229a"/>
    </style:style>
    <style:style style:name="P91" style:family="paragraph" style:parent-style-name="Text_20_body" style:list-style-name="L1">
      <style:text-properties officeooo:rsid="001b9ece" officeooo:paragraph-rsid="001e9f30"/>
    </style:style>
    <style:style style:name="P92" style:family="paragraph" style:parent-style-name="Text_20_body" style:list-style-name="L2">
      <style:text-properties officeooo:rsid="00209e5d" officeooo:paragraph-rsid="00209e5d"/>
    </style:style>
    <style:style style:name="P93" style:family="paragraph" style:parent-style-name="Text_20_body" style:list-style-name="L3">
      <style:text-properties officeooo:rsid="0034bc1f" officeooo:paragraph-rsid="0034bc1f"/>
    </style:style>
    <style:style style:name="P94" style:family="paragraph" style:parent-style-name="Text_20_body" style:list-style-name="L6"/>
    <style:style style:name="P95" style:family="paragraph" style:parent-style-name="Text_20_body" style:list-style-name="L7">
      <style:text-properties officeooo:rsid="004376aa" officeooo:paragraph-rsid="004376aa"/>
    </style:style>
    <style:style style:name="P96" style:family="paragraph" style:parent-style-name="Text_20_body" style:list-style-name="L8">
      <style:text-properties officeooo:rsid="0045686a" officeooo:paragraph-rsid="0045686a"/>
    </style:style>
    <style:style style:name="P97" style:family="paragraph" style:parent-style-name="Text_20_body" style:list-style-name="L8">
      <style:text-properties officeooo:rsid="0045686a" officeooo:paragraph-rsid="00472f9d"/>
    </style:style>
    <style:style style:name="P98" style:family="paragraph" style:parent-style-name="Text_20_body" style:list-style-name="L8">
      <style:text-properties officeooo:rsid="00472f9d" officeooo:paragraph-rsid="00472f9d"/>
    </style:style>
    <style:style style:name="P99" style:family="paragraph" style:parent-style-name="Text_20_body" style:list-style-name="L8">
      <style:text-properties officeooo:rsid="00472f9d" officeooo:paragraph-rsid="0048f2c6"/>
    </style:style>
    <style:style style:name="P100" style:family="paragraph" style:parent-style-name="Text_20_body" style:list-style-name="L8">
      <style:text-properties officeooo:rsid="00472f9d" officeooo:paragraph-rsid="004b9cfe"/>
    </style:style>
    <style:style style:name="P101" style:family="paragraph" style:parent-style-name="Text_20_body" style:list-style-name="L8">
      <style:text-properties fo:font-style="italic" officeooo:rsid="00472f9d" officeooo:paragraph-rsid="0048f2c6" style:font-style-asian="italic" style:font-style-complex="italic"/>
    </style:style>
    <style:style style:name="P102" style:family="paragraph" style:parent-style-name="Text_20_body" style:list-style-name="L8">
      <style:text-properties fo:font-style="italic" officeooo:rsid="0048f2c6" officeooo:paragraph-rsid="004b9cfe" style:font-style-asian="italic" style:font-style-complex="italic"/>
    </style:style>
    <style:style style:name="P103" style:family="paragraph" style:parent-style-name="Text_20_body" style:list-style-name="L8">
      <style:text-properties fo:font-style="normal" officeooo:rsid="0045686a" officeooo:paragraph-rsid="0048f2c6" style:font-style-asian="normal" style:font-style-complex="normal"/>
    </style:style>
    <style:style style:name="P104" style:family="paragraph" style:parent-style-name="Text_20_body" style:list-style-name="L8">
      <style:text-properties fo:font-style="normal" officeooo:rsid="0045686a" officeooo:paragraph-rsid="00493efc" style:font-style-asian="normal" style:font-style-complex="normal"/>
    </style:style>
    <style:style style:name="P105" style:family="paragraph" style:parent-style-name="Text_20_body">
      <style:text-properties fo:font-style="normal" officeooo:rsid="0045686a" officeooo:paragraph-rsid="00493efc" style:font-style-asian="normal" style:font-style-complex="normal"/>
    </style:style>
    <style:style style:name="P106" style:family="paragraph" style:parent-style-name="Text_20_body">
      <style:text-properties officeooo:rsid="003bd585" officeooo:paragraph-rsid="005e4e65"/>
    </style:style>
    <style:style style:name="P107" style:family="paragraph" style:parent-style-name="Text_20_body">
      <style:text-properties officeooo:rsid="00336dea" officeooo:paragraph-rsid="005e4e65"/>
    </style:style>
    <style:style style:name="P108" style:family="paragraph" style:parent-style-name="Text_20_body">
      <style:text-properties officeooo:rsid="00322011" officeooo:paragraph-rsid="005e4e65"/>
    </style:style>
    <style:style style:name="P109" style:family="paragraph" style:parent-style-name="Text_20_body">
      <style:text-properties officeooo:rsid="002688f3" officeooo:paragraph-rsid="002688f3"/>
    </style:style>
    <style:style style:name="P110" style:family="paragraph" style:parent-style-name="Text_20_body">
      <style:text-properties officeooo:rsid="003ec431" officeooo:paragraph-rsid="005e4e65"/>
    </style:style>
    <style:style style:name="P111" style:family="paragraph" style:parent-style-name="Text_20_body">
      <style:text-properties officeooo:rsid="006024e4" officeooo:paragraph-rsid="0062113c"/>
    </style:style>
    <style:style style:name="P112" style:family="paragraph" style:parent-style-name="Text_20_body">
      <style:text-properties officeooo:rsid="0062113c" officeooo:paragraph-rsid="0062113c"/>
    </style:style>
    <style:style style:name="P113" style:family="paragraph" style:parent-style-name="Text_20_body" style:list-style-name="">
      <style:text-properties officeooo:rsid="0062113c" officeooo:paragraph-rsid="0062113c"/>
    </style:style>
    <style:style style:name="P114" style:family="paragraph" style:parent-style-name="Text_20_body">
      <style:text-properties officeooo:rsid="0041c7c0" officeooo:paragraph-rsid="0062113c"/>
    </style:style>
    <style:style style:name="P115" style:family="paragraph" style:parent-style-name="Text_20_body" style:list-style-name="">
      <style:text-properties officeooo:rsid="0063229a" officeooo:paragraph-rsid="0063229a"/>
    </style:style>
    <style:style style:name="P1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18" style:family="paragraph">
      <loext:graphic-properties draw:fill="solid" draw:fill-color="#b4c7dc"/>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19" style:family="paragraph">
      <loext:graphic-properties draw:fill="solid" draw:fill-color="#fff5ce"/>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20" style:family="paragraph">
      <loext:graphic-properties draw:fill="solid" draw:fill-color="#dee7e5"/>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d52ba" style:font-weight-asian="bold" style:font-weight-complex="bold"/>
    </style:style>
    <style:style style:name="T3" style:family="text">
      <style:text-properties fo:font-weight="bold" officeooo:rsid="001b9ece" style:font-weight-asian="bold" style:font-weight-complex="bold"/>
    </style:style>
    <style:style style:name="T4" style:family="text">
      <style:text-properties fo:font-weight="bold" officeooo:rsid="00255fa9" style:font-weight-asian="bold" style:font-weight-complex="bold"/>
    </style:style>
    <style:style style:name="T5" style:family="text">
      <style:text-properties fo:font-weight="bold" officeooo:rsid="002b8c95" style:font-weight-asian="bold" style:font-weight-complex="bold"/>
    </style:style>
    <style:style style:name="T6" style:family="text">
      <style:text-properties fo:font-weight="bold" officeooo:rsid="002e0938" style:font-weight-asian="bold" style:font-weight-complex="bold"/>
    </style:style>
    <style:style style:name="T7" style:family="text">
      <style:text-properties fo:font-weight="bold" officeooo:rsid="002e77fb" style:font-weight-asian="bold" style:font-weight-complex="bold"/>
    </style:style>
    <style:style style:name="T8" style:family="text">
      <style:text-properties fo:font-weight="bold" officeooo:rsid="0048f2c6" style:font-weight-asian="bold" style:font-weight-complex="bold"/>
    </style:style>
    <style:style style:name="T9" style:family="text">
      <style:text-properties fo:font-weight="bold" officeooo:rsid="00472f9d" style:font-weight-asian="bold" style:font-weight-complex="bold"/>
    </style:style>
    <style:style style:name="T10" style:family="text">
      <style:text-properties fo:font-weight="bold" officeooo:rsid="0053eb08" style:font-weight-asian="bold" style:font-weight-complex="bold"/>
    </style:style>
    <style:style style:name="T11" style:family="text">
      <style:text-properties fo:font-weight="bold" officeooo:rsid="004107e8"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bf2f2" style:font-weight-asian="normal" style:font-weight-complex="normal"/>
    </style:style>
    <style:style style:name="T14" style:family="text">
      <style:text-properties fo:font-weight="normal" officeooo:rsid="001540a6" style:font-weight-asian="normal" style:font-weight-complex="normal"/>
    </style:style>
    <style:style style:name="T15" style:family="text">
      <style:text-properties fo:font-weight="normal" officeooo:rsid="0022fa1e" style:font-weight-asian="normal" style:font-weight-complex="normal"/>
    </style:style>
    <style:style style:name="T16" style:family="text">
      <style:text-properties fo:font-weight="normal" officeooo:rsid="004b8f35" style:font-weight-asian="normal" style:font-weight-complex="normal"/>
    </style:style>
    <style:style style:name="T17" style:family="text">
      <style:text-properties fo:font-weight="normal" officeooo:rsid="004107e8"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2fa1e"/>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22fa1e" style:font-style-asian="italic" style:font-style-complex="italic"/>
    </style:style>
    <style:style style:name="T23" style:family="text">
      <style:text-properties fo:font-style="italic" officeooo:rsid="00255fa9" style:font-style-asian="italic" style:font-style-complex="italic"/>
    </style:style>
    <style:style style:name="T24" style:family="text">
      <style:text-properties fo:font-style="italic" officeooo:rsid="002d3cb9" style:font-style-asian="italic" style:font-style-complex="italic"/>
    </style:style>
    <style:style style:name="T25" style:family="text">
      <style:text-properties fo:font-style="italic" officeooo:rsid="002d1d6f" style:font-style-asian="italic" style:font-style-complex="italic"/>
    </style:style>
    <style:style style:name="T26" style:family="text">
      <style:text-properties fo:font-style="italic" officeooo:rsid="002eeaf4" style:font-style-asian="italic" style:font-style-complex="italic"/>
    </style:style>
    <style:style style:name="T27" style:family="text">
      <style:text-properties fo:font-style="italic" officeooo:rsid="002afe3a" style:font-style-asian="italic" style:font-style-complex="italic"/>
    </style:style>
    <style:style style:name="T28" style:family="text">
      <style:text-properties fo:font-style="italic" officeooo:rsid="002b8c95" style:font-style-asian="italic" style:font-style-complex="italic"/>
    </style:style>
    <style:style style:name="T29" style:family="text">
      <style:text-properties fo:font-style="italic" officeooo:rsid="0034bc1f" style:font-style-asian="italic" style:font-style-complex="italic"/>
    </style:style>
    <style:style style:name="T30" style:family="text">
      <style:text-properties fo:font-style="italic" officeooo:rsid="003697ba" style:font-style-asian="italic" style:font-style-complex="italic"/>
    </style:style>
    <style:style style:name="T31" style:family="text">
      <style:text-properties fo:font-style="italic" officeooo:rsid="003b53e9" style:font-style-asian="italic" style:font-style-complex="italic"/>
    </style:style>
    <style:style style:name="T32" style:family="text">
      <style:text-properties fo:font-style="italic" officeooo:rsid="003e7d67" style:font-style-asian="italic" style:font-style-complex="italic"/>
    </style:style>
    <style:style style:name="T33" style:family="text">
      <style:text-properties fo:font-style="italic" officeooo:rsid="00413727" style:font-style-asian="italic" style:font-style-complex="italic"/>
    </style:style>
    <style:style style:name="T34" style:family="text">
      <style:text-properties fo:font-style="italic" officeooo:rsid="0048f2c6" style:font-style-asian="italic" style:font-style-complex="italic"/>
    </style:style>
    <style:style style:name="T35" style:family="text">
      <style:text-properties fo:font-style="italic" officeooo:rsid="00472f9d" style:font-style-asian="italic" style:font-style-complex="italic"/>
    </style:style>
    <style:style style:name="T36" style:family="text">
      <style:text-properties fo:font-style="italic" officeooo:rsid="0045686a" style:font-style-asian="italic" style:font-style-complex="italic"/>
    </style:style>
    <style:style style:name="T37" style:family="text">
      <style:text-properties fo:font-style="italic" officeooo:rsid="00493efc" style:font-style-asian="italic" style:font-style-complex="italic"/>
    </style:style>
    <style:style style:name="T38" style:family="text">
      <style:text-properties fo:font-style="italic" officeooo:rsid="002379eb" style:font-style-asian="italic" style:font-style-complex="italic"/>
    </style:style>
    <style:style style:name="T39" style:family="text">
      <style:text-properties fo:font-style="italic" officeooo:rsid="004b967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2afe3a" style:font-style-asian="italic" style:font-weight-asian="normal" style:font-style-complex="italic" style:font-weight-complex="normal"/>
    </style:style>
    <style:style style:name="T42" style:family="text">
      <style:text-properties fo:font-style="italic" fo:font-weight="normal" officeooo:rsid="0034bc1f" style:font-style-asian="italic" style:font-weight-asian="normal" style:font-style-complex="italic" style:font-weight-complex="normal"/>
    </style:style>
    <style:style style:name="T43" style:family="text">
      <style:text-properties fo:font-style="italic" fo:font-weight="normal" officeooo:rsid="003697ba" style:font-style-asian="italic" style:font-weight-asian="normal" style:font-style-complex="italic" style:font-weight-complex="normal"/>
    </style:style>
    <style:style style:name="T44" style:family="text">
      <style:text-properties fo:font-style="italic" fo:font-weight="normal" officeooo:rsid="00413727" style:font-style-asian="italic" style:font-weight-asian="normal" style:font-style-complex="italic"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3697ba" style:font-style-asian="italic" style:font-weight-asian="bold" style:font-style-complex="italic" style:font-weight-complex="bold"/>
    </style:style>
    <style:style style:name="T47" style:family="text">
      <style:text-properties fo:font-style="italic" fo:font-weight="bold" officeooo:rsid="00209e5d" style:font-style-asian="italic" style:font-weight-asian="bold" style:font-style-complex="italic" style:font-weight-complex="bold"/>
    </style:style>
    <style:style style:name="T48" style:family="text">
      <style:text-properties fo:font-style="italic" fo:font-weight="bold" officeooo:rsid="0039d87f" style:font-style-asian="italic" style:font-weight-asian="bold" style:font-style-complex="italic" style:font-weight-complex="bold"/>
    </style:style>
    <style:style style:name="T49" style:family="text">
      <style:text-properties fo:font-size="12pt" fo:font-weight="normal" officeooo:rsid="0026b0bf" style:font-size-asian="12pt" style:font-weight-asian="normal" style:font-size-complex="12pt" style:font-weight-complex="normal"/>
    </style:style>
    <style:style style:name="T50" style:family="text">
      <style:text-properties officeooo:rsid="000bf2f2"/>
    </style:style>
    <style:style style:name="T51" style:family="text">
      <style:text-properties style:font-name="Liberation Sans2" officeooo:rsid="00286c4c" style:font-name-asian="DejaVu Sans" style:font-name-complex="FreeSans"/>
    </style:style>
    <style:style style:name="T52" style:family="text">
      <style:text-properties style:font-name="Liberation Sans" officeooo:rsid="00286c4c" style:font-name-asian="DejaVu Sans" style:font-name-complex="FreeSans"/>
    </style:style>
    <style:style style:name="T53" style:family="text">
      <style:text-properties style:font-name="Liberation Sans" fo:font-size="18.2000007629395pt" fo:font-weight="bold" officeooo:rsid="005d1533" style:font-name-asian="DejaVu Sans" style:font-size-asian="18.2000007629395pt" style:font-weight-asian="bold" style:font-name-complex="FreeSans" style:font-size-complex="18.2000007629395pt" style:font-weight-complex="bold"/>
    </style:style>
    <style:style style:name="T54" style:family="text">
      <style:text-properties style:font-name="Liberation Sans" fo:font-size="18.2000007629395pt" fo:font-weight="bold" officeooo:rsid="003c7ed5" style:font-name-asian="DejaVu Sans" style:font-size-asian="18.2000007629395pt" style:font-weight-asian="bold" style:font-name-complex="FreeSans" style:font-size-complex="18.2000007629395pt" style:font-weight-complex="bold"/>
    </style:style>
    <style:style style:name="T55" style:family="text">
      <style:text-properties officeooo:rsid="001540a6"/>
    </style:style>
    <style:style style:name="T56" style:family="text">
      <style:text-properties officeooo:rsid="001775ba"/>
    </style:style>
    <style:style style:name="T57" style:family="text">
      <style:text-properties style:text-underline-style="none"/>
    </style:style>
    <style:style style:name="T58" style:family="text">
      <style:text-properties style:text-underline-style="none" officeooo:rsid="001775ba"/>
    </style:style>
    <style:style style:name="T59" style:family="text">
      <style:text-properties style:text-underline-style="none" officeooo:rsid="001839fd"/>
    </style:style>
    <style:style style:name="T60" style:family="text">
      <style:text-properties style:text-underline-style="none" officeooo:rsid="0016ef78"/>
    </style:style>
    <style:style style:name="T61" style:family="text">
      <style:text-properties style:text-underline-style="none" officeooo:rsid="005a678e"/>
    </style:style>
    <style:style style:name="T62" style:family="text">
      <style:text-properties officeooo:rsid="001839fd"/>
    </style:style>
    <style:style style:name="T63" style:family="text">
      <style:text-properties officeooo:rsid="0018d593"/>
    </style:style>
    <style:style style:name="T64" style:family="text">
      <style:text-properties officeooo:rsid="0019f69a"/>
    </style:style>
    <style:style style:name="T65" style:family="text">
      <style:text-properties officeooo:rsid="001b9ece"/>
    </style:style>
    <style:style style:name="T66" style:family="text">
      <style:text-properties officeooo:rsid="001d52ba"/>
    </style:style>
    <style:style style:name="T67" style:family="text">
      <style:text-properties officeooo:rsid="00209e5d"/>
    </style:style>
    <style:style style:name="T68" style:family="text">
      <style:text-properties officeooo:rsid="00222ab4"/>
    </style:style>
    <style:style style:name="T69" style:family="text">
      <style:text-properties officeooo:rsid="0022fa1e"/>
    </style:style>
    <style:style style:name="T70" style:family="text">
      <style:text-properties officeooo:rsid="0023218a"/>
    </style:style>
    <style:style style:name="T71" style:family="text">
      <style:text-properties officeooo:rsid="002379eb"/>
    </style:style>
    <style:style style:name="T72" style:family="text">
      <style:text-properties officeooo:rsid="00255fa9"/>
    </style:style>
    <style:style style:name="T73" style:family="text">
      <style:text-properties officeooo:rsid="0027b4cb"/>
    </style:style>
    <style:style style:name="T74" style:family="text">
      <style:text-properties officeooo:rsid="00298b7f"/>
    </style:style>
    <style:style style:name="T75" style:family="text">
      <style:text-properties officeooo:rsid="002afe3a"/>
    </style:style>
    <style:style style:name="T76" style:family="text">
      <style:text-properties officeooo:rsid="002b8c95"/>
    </style:style>
    <style:style style:name="T77" style:family="text">
      <style:text-properties officeooo:rsid="002d1d6f"/>
    </style:style>
    <style:style style:name="T78" style:family="text">
      <style:text-properties officeooo:rsid="002d3cb9"/>
    </style:style>
    <style:style style:name="T79" style:family="text">
      <style:text-properties officeooo:rsid="002e0938"/>
    </style:style>
    <style:style style:name="T80" style:family="text">
      <style:text-properties officeooo:rsid="002e77fb"/>
    </style:style>
    <style:style style:name="T81" style:family="text">
      <style:text-properties officeooo:rsid="002eeaf4"/>
    </style:style>
    <style:style style:name="T82" style:family="text">
      <style:text-properties officeooo:rsid="00302057"/>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3697ba" style:font-style-asian="normal" style:font-weight-asian="normal" style:font-style-complex="normal" style:font-weight-complex="normal"/>
    </style:style>
    <style:style style:name="T85" style:family="text">
      <style:text-properties fo:font-style="normal" fo:font-weight="normal" officeooo:rsid="002afe3a" style:font-style-asian="normal" style:font-weight-asian="normal" style:font-style-complex="normal" style:font-weight-complex="normal"/>
    </style:style>
    <style:style style:name="T86" style:family="text">
      <style:text-properties fo:font-style="normal" fo:font-weight="normal" officeooo:rsid="00379b32" style:font-style-asian="normal" style:font-weight-asian="normal" style:font-style-complex="normal" style:font-weight-complex="normal"/>
    </style:style>
    <style:style style:name="T87" style:family="text">
      <style:text-properties fo:font-style="normal" fo:font-weight="normal" officeooo:rsid="003b53e9"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officeooo:rsid="0034bc1f"/>
    </style:style>
    <style:style style:name="T90" style:family="text">
      <style:text-properties officeooo:rsid="00379b32"/>
    </style:style>
    <style:style style:name="T91" style:family="text">
      <style:text-properties officeooo:rsid="0038679a"/>
    </style:style>
    <style:style style:name="T92" style:family="text">
      <style:text-properties officeooo:rsid="0039d87f"/>
    </style:style>
    <style:style style:name="T93" style:family="text">
      <style:text-properties officeooo:rsid="003b53e9"/>
    </style:style>
    <style:style style:name="T94" style:family="text">
      <style:text-properties officeooo:rsid="003e7d67"/>
    </style:style>
    <style:style style:name="T95" style:family="text">
      <style:text-properties officeooo:rsid="00407e6c"/>
    </style:style>
    <style:style style:name="T96" style:family="text">
      <style:text-properties officeooo:rsid="00413727"/>
    </style:style>
    <style:style style:name="T97" style:family="text">
      <style:text-properties officeooo:rsid="00423ced"/>
    </style:style>
    <style:style style:name="T98" style:family="text">
      <style:text-properties officeooo:rsid="004376aa"/>
    </style:style>
    <style:style style:name="T99" style:family="text">
      <style:text-properties officeooo:rsid="0045686a"/>
    </style:style>
    <style:style style:name="T100" style:family="text">
      <style:text-properties officeooo:rsid="00472f9d"/>
    </style:style>
    <style:style style:name="T101" style:family="text">
      <style:text-properties officeooo:rsid="0048f2c6"/>
    </style:style>
    <style:style style:name="T102" style:family="text">
      <style:text-properties officeooo:rsid="004b8f35"/>
    </style:style>
    <style:style style:name="T103" style:family="text">
      <style:text-properties officeooo:rsid="004b967f"/>
    </style:style>
    <style:style style:name="T104" style:family="text">
      <style:text-properties officeooo:rsid="004b9cfe"/>
    </style:style>
    <style:style style:name="T105" style:family="text">
      <style:text-properties officeooo:rsid="0053eb08"/>
    </style:style>
    <style:style style:name="T106" style:family="text">
      <style:text-properties officeooo:rsid="00556eab"/>
    </style:style>
    <style:style style:name="T107" style:family="text">
      <style:text-properties officeooo:rsid="00546024"/>
    </style:style>
    <style:style style:name="T108" style:family="text">
      <style:text-properties officeooo:rsid="005ba726"/>
    </style:style>
    <style:style style:name="T109" style:family="text">
      <style:text-properties officeooo:rsid="005d1533"/>
    </style:style>
    <style:style style:name="T110" style:family="text">
      <style:text-properties officeooo:rsid="005e4e65"/>
    </style:style>
    <style:style style:name="T111" style:family="text">
      <style:text-properties officeooo:rsid="006024e4"/>
    </style:style>
    <style:style style:name="T112" style:family="text">
      <style:text-properties officeooo:rsid="0062113c"/>
    </style:style>
    <style:style style:name="T113" style:family="text">
      <style:text-properties officeooo:rsid="0063229a"/>
    </style:style>
    <style:style style:name="T114"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bold" style:letter-kerning="true" style:font-name-asian="DejaVu Sans"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16"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bold" style:letter-kerning="true" style:font-name-asian="DejaVu Sans" style:font-size-asian="8pt" style:font-style-asian="normal" style:font-weight-asian="bold" style:font-name-complex="FreeSans" style:font-size-complex="8pt" style:font-style-complex="normal" style:font-weight-complex="bold" style:text-emphasize="none" style:font-relief="none" style:text-overline-style="none" style:text-overline-color="font-color"/>
    </style:style>
    <style:style style:name="T117"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5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4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1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5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1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9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4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4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0.9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4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6579in, 0in)" draw:image-opacity="100%" style:mirror="none" style:run-through="foreground"/>
    </style:style>
    <style:style style:name="gr5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6614in, 0in)" draw:image-opacity="100%" style:mirror="none" style:run-through="foreground"/>
    </style:style>
    <style:style style:name="gr5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2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5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831in, 1.6409in, 1.3193in, 0.5657in)" draw:image-opacity="100%" style:mirror="none" style:run-through="foreground"/>
    </style:style>
    <style:style style:name="gr5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61in, 1.7496in, 1.3189in, 0.4567in)" draw:image-opacity="100%" style:mirror="none"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7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4035in, 0in)" draw:image-opacity="100%" style:mirror="none"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3823in, 0in)" draw:image-opacity="100%" style:mirror="none" style:run-through="foreground"/>
    </style:style>
    <style:style style:name="gr6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307in" fo:min-width="1.5008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4831in, 0in)" draw:image-opacity="100%" style:mirror="none" style:run-through="foreground"/>
    </style:style>
    <style:style style:name="gr6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5232in, 0in)" draw:image-opacity="100%" style:mirror="none"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6457in, 0in)" draw:image-opacity="100%" style:mirror="none" style:run-through="foreground"/>
    </style:style>
    <style:style style:name="gr6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11in" fo:min-width="1.1846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7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6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6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4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9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7228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2654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0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6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7228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8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7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8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8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1.0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8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6724in, 3.2941in, 0in)" draw:image-opacity="100%" style:mirror="none" style:run-through="foreground"/>
    </style:style>
    <style:style style:name="gr8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961in, 3.2921in, 0in)" draw:image-opacity="100%" style:mirror="none" style:run-through="foreground"/>
    </style:style>
    <style:style style:name="gr8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3382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84"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2555in" fo:min-width="0.2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5016in" fo:min-width="0.50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5016in" fo:min-width="0.4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8" style:family="graphic">
      <style:graphic-properties draw:stroke="solid" svg:stroke-width="0in" svg:stroke-color="#f10d0c" draw:marker-start="Rounded_20_short_20_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9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8819in, 5.2795in, 0in)" draw:image-opacity="100%" style:mirror="none" style:run-through="foreground"/>
    </style:style>
    <style:style style:name="gr9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8819in, 5.2858in, 0in)" draw:image-opacity="100%" style:mirror="none"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dee7e5" draw:textarea-horizontal-align="justify" draw:textarea-vertical-align="bottom" draw:auto-grow-height="false" fo:min-height="1.7516in" fo:min-width="0.8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4016in" fo:min-width="0.4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dee7e5" draw:textarea-horizontal-align="justify" draw:textarea-vertical-align="bottom" draw:auto-grow-height="false" fo:min-height="1.0516in" fo:min-width="0.8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335in" fo:padding-top="0.0598in" fo:padding-bottom="0.0598in" fo:padding-left="0.1083in" fo:padding-right="0.1083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draw:frame draw:style-name="fr1" draw:name="graphics1" text:anchor-type="paragraph" svg:x="0.9165in" svg:y="0.0937in" svg:width="4.8598in" svg:height="1.1102in" draw:z-index="0"><draw:image xlink:href="Pictures/100000000000020F00000080149223C0FAB89B46.jpg" xlink:type="simple" xlink:show="embed" xlink:actuate="onLoad" draw:mime-type="image/jpeg"/></draw:frame></text:p>
      <text:p text:style-name="Subtitle"/>
      <text:p text:style-name="P60"><text:a xlink:type="simple" xlink:href="https://www.model-railway-signalling.co.uk/" text:style-name="Internet_20_link" text:visited-style-name="Visited_20_Internet_20_Link"><text:span text:style-name="T49"/></text:a></text:p>
      <text:p text:style-name="P60"><text:a xlink:type="simple" xlink:href="https://www.model-railway-signalling.co.uk/" text:style-name="Internet_20_link" text:visited-style-name="Visited_20_Internet_20_Link"><text:span text:style-name="T49"/></text:a></text:p>
      <text:p text:style-name="P60"><text:a xlink:type="simple" xlink:href="https://www.model-railway-signalling.co.uk/" text:style-name="Internet_20_link" text:visited-style-name="Visited_20_Internet_20_Link"><text:span text:style-name="T49">https://www.model-railway-signalling.co.uk/</text:span></text:a></text:p>
      <text:p text:style-name="P1"><text:span text:style-name="T51">©</text:span><text:span text:style-name="T52"> DCC Model Railway Signalling. All Rights Reserved.</text:span></text:p>
      <text:p text:style-name="P3"/>
      <text:p text:style-name="P60"><text:span text:style-name="T13">Signalling </text:span>Application <text:span text:style-name="T55">Networking</text:span> Guide</text:p>
      <text:p text:style-name="P57">Version <text:span text:style-name="T108">3</text:span>.0 – <text:span text:style-name="T108">March</text:span> 202<text:span text:style-name="T108">6</text:span></text:p>
      <text:p text:style-name="Text_20_body"/>
      <text:p text:style-name="P4"><text:span text:style-name="T14">The </text:span><text:span text:style-name="T15">DCC signalling system comes with application networking built in</text:span><text:span text:style-name="T12">, making it ideal for control of larger layouts (where the layout gets broken down into multiple signalling areas) or splitting smaller layouts down to </text:span><text:span text:style-name="T14">their </text:span><text:span text:style-name="T12">individual </text:span><text:span text:style-name="T16">block sections</text:span><text:span text:style-name="T12"> (with simulated block instruments) for real ‘true to prototype’ operation. </text:span><text:span text:style-name="T14">O</text:span><text:span text:style-name="T12">nly one instance of the application needs to be running on </text:span><text:span text:style-name="T14">the</text:span><text:span text:style-name="T12"> </text:span><text:span text:style-name="T14">main </text:span><text:span text:style-name="T12">Raspberry Pi (the instance providing the interface to the DCC bus and track sensor inputs from the GPIO pins). </text:span><text:span text:style-name="T14">O</text:span><text:span text:style-name="T12">ther instances can be hosted on </text:span><text:span text:style-name="T14">other platforms such as the Raspberry Pi Zero (which will provide additional sensor inputs) or </text:span><text:span text:style-name="T12">Windows or Linux as required.</text:span></text:p>
      <text:p text:style-name="P4">This guide provide<text:span text:style-name="T55">s</text:span> <text:span text:style-name="T55">instructions on how to configure and use the networking features.</text:span></text:p>
      <text:p text:style-name="P59"><text:span text:style-name="T107">All of the</text:span><text:span text:style-name="T50"> example layouts used in this guide </text:span><text:span text:style-name="T107">(and other example layout files) are packaged with the application. These can be accessed</text:span><text:span text:style-name="T17"> by selecting </text:span><text:span text:style-name="T11">File</text:span><text:span text:style-name="T17"> =&gt; </text:span><text:span text:style-name="T11">Examples</text:span><text:span text:style-name="T17"> from the Main Menu-bar and then selecting the appropriate file.</text:span></text:p>
      <text:p text:style-name="P58">Other documentation (such as the Application Networking Guide) is also packaged with<text:span text:style-name="T17"> the application (Select </text:span><text:span text:style-name="T11">Help</text:span><text:span text:style-name="T17"> =&gt; </text:span><text:span text:style-name="T11">Docs</text:span><text:span text:style-name="T17"> from the Main Menu-bar):</text:spa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651_398304742" text:style-name="Index_20_Link" text:visited-style-name="Index_20_Link">Introduction to Networking<text:tab/>2</text:a></text:p>
          <text:p text:style-name="P68"><text:a xlink:type="simple" xlink:href="#__RefHeading___Toc1807_3448514483" text:style-name="Index_20_Link" text:visited-style-name="Index_20_Link">Configuring the Signalling Network<text:tab/>3</text:a></text:p>
          <text:p text:style-name="P68"><text:a xlink:type="simple" xlink:href="#__RefHeading___Toc1816_3448514483" text:style-name="Index_20_Link" text:visited-style-name="Index_20_Link">Signal State and Track Occupancy<text:tab/>7</text:a></text:p>
          <text:p text:style-name="P68"><text:a xlink:type="simple" xlink:href="#__RefHeading___Toc2227_427111604" text:style-name="Index_20_Link" text:visited-style-name="Index_20_Link">DCC Accessory Commands<text:tab/>10</text:a></text:p>
          <text:p text:style-name="P68"><text:a xlink:type="simple" xlink:href="#__RefHeading___Toc2229_427111604" text:style-name="Index_20_Link" text:visited-style-name="Index_20_Link">GPIO Sensors<text:tab/>11</text:a></text:p>
          <text:p text:style-name="P68"><text:a xlink:type="simple" xlink:href="#__RefHeading___Toc1128_99759055" text:style-name="Index_20_Link" text:visited-style-name="Index_20_Link">Block Instruments<text:tab/>12</text:a></text:p>
          <text:p text:style-name="P68"><text:a xlink:type="simple" xlink:href="#__RefHeading___Toc2231_427111604" text:style-name="Index_20_Link" text:visited-style-name="Index_20_Link">DCC Locomotive Commands<text:tab/>16</text:a></text:p>
        </text:index-body>
      </text:table-of-content>
      <text:h text:style-name="P69" text:outline-level="1"/>
      <text:h text:style-name="P73" text:outline-level="1"><text:bookmark-start text:name="__RefHeading___Toc651_398304742"/>Introduction <text:span text:style-name="T55">to Networking</text:span><text:bookmark-end text:name="__RefHeading___Toc651_398304742"/></text:h>
      <text:p text:style-name="P5"><text:span text:style-name="T61">T</text:span><text:span text:style-name="T58">he </text:span><text:span text:style-name="T57">networking features of the DCC Signalling application </text:span><text:span text:style-name="T58">enable</text:span><text:span text:style-name="T57"> different instances of the application to ‘talk to each other’ </text:span><text:span text:style-name="T59">over </text:span><text:span text:style-name="T61">a local</text:span><text:span text:style-name="T59"> WiFi network</text:span><text:span text:style-name="T57">, </text:span><text:span text:style-name="T58">exchanging</text:span><text:span text:style-name="T57"> information </text:span><text:span text:style-name="T58">such as</text:span><text:span text:style-name="T57"> </text:span><text:span text:style-name="T58">signal state</text:span><text:span text:style-name="T57">, track occupancy, block instrument </text:span><text:span text:style-name="T58">state</text:span><text:span text:style-name="T57">, </text:span><text:span text:style-name="T58">track sensors</text:span><text:span text:style-name="T57"> and DCC commands.</text:span> <text:span text:style-name="T62"><text:s/></text:span></text:p>
      <text:p text:style-name="P44">It is important to note that application instances will only ‘talk to’ other instances running on the same network and will therefore not adversely affect or interfere with any other devices connected to your home WiFi network (computers, smart phones, smart televisions etc).</text:p>
      <text:p text:style-name="P45">If you only have a single system but you want to experiment with the networking features of the application then you can still do so – just run up two instances of the application on your system and configure them to ‘talk to’ each other over the network.</text:p>
      <text:h text:style-name="Heading_20_2" text:outline-level="2">The Publish/Subscribe <text:span text:style-name="T65">M</text:span>odel</text:h>
      <text:p text:style-name="P6">The <text:span text:style-name="T60">DCC Signalling application</text:span> uses a ‘publish/subscribe’ model for networking. Each<text:span text:style-name="T65"> application </text:span>instance (or network ‘node’) can be configured to ‘publish’ <text:span text:style-name="T69">state </text:span>information for other network nodes to <text:span text:style-name="T78">receive</text:span>. <text:span text:style-name="T65">However, to receive the published state information, other nodes first need t</text:span>o ‘opt in’ <text:span text:style-name="T69">by</text:span> ‘subscrib<text:span text:style-name="T69">ing</text:span>’ to <text:span text:style-name="T69">the appropriate items from the appropriate nodes</text:span>.</text:p>
      <text:p text:style-name="P9">At the heart of the <text:span text:style-name="T63">‘publish/subscribe’ model </text:span>is a message ‘broker’. Think of this as a telephone exchange, routing messages from the ‘publishing’ node to all nodes that have expressed an interest in those messages by ‘subscribing’.</text:p>
      <text:p text:style-name="P8">In the diagram below, Node 1 has been configured to ‘publish’ Signal 1 state <text:span text:style-name="T89">updates to the broker </text:span>and Node<text:span text:style-name="T70">s</text:span> 2 <text:span text:style-name="T70">and 3 have both</text:span> ‘subscribed’ to<text:span text:style-name="T64"> </text:span>Signal 1 state <text:span text:style-name="T64">updates</text:span> from Node 1. Now, whenever the <text:span text:style-name="T64">displayed aspect</text:span> of Signal 1 changes on Node 1, ‘<text:span text:style-name="T89">signal state updated’ </text:span>message<text:span text:style-name="T70">s</text:span> will be <text:span text:style-name="T64">sent to the broker and then forwarded to both Nodes 2 and 3. </text:span></text:p>
      <text:p text:style-name="P8"><text:span text:style-name="T64">Node 2 has also been configured to ‘publish’ Sensor 3 state updates to the broker and Node 1 </text:span>has ‘subscribed’ to <text:span text:style-name="T64">Sensor 3</text:span> state <text:span text:style-name="T64">updates</text:span> from Node <text:span text:style-name="T65">2</text:span>. <text:span text:style-name="T65">Now, whenever track sensor 3 is triggered on Node 2, a ‘sensor updated’ message will be sent to the broker and then forwarded to Node 1.</text:span></text:p>
      <text:p text:style-name="P7"/>
      <text:p text:style-name="P5"><draw:g text:anchor-type="paragraph" draw:z-index="3" draw:name="Shape1" draw:style-name="gr50"><draw:custom-shape draw:style-name="gr85" draw:text-style-name="P119" svg:width="0.7004in" svg:height="0.5004in" svg:x="2.4874in" svg:y="0.7756in"><text:p text:style-name="P117"><text:span text:style-name="T114">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119" svg:width="0.7004in" svg:height="0.6004in" svg:x="1.1874in" svg:y="0.7256in"><text:p text:style-name="P117"><text:span text:style-name="T114">DCC </text:span></text:p><text:p text:style-name="P117"><text:span text:style-name="T114">Signalling </text:span></text:p><text:p text:style-name="P117"><text:span text:style-name="T114">Application</text:span></text:p><text:p text:style-name="P117"><text:span text:style-name="T114">“</text:span><text:span text:style-name="T114">Node1”</text:span></text:p><draw:enhanced-geometry svg:viewBox="0 0 21600 21600" draw:type="rectangle" draw:enhanced-path="M 0 0 L 21600 0 21600 21600 0 21600 0 0 Z N"/></draw:custom-shape><draw:custom-shape draw:style-name="gr87" draw:text-style-name="P119" svg:width="0.6504in" svg:height="0.6004in" svg:x="3.7984in" svg:y="0.7256in"><text:p text:style-name="P117"><text:span text:style-name="T114">DCC </text:span></text:p><text:p text:style-name="P117"><text:span text:style-name="T114">Signalling </text:span></text:p><text:p text:style-name="P117"><text:span text:style-name="T114">Application</text:span></text:p><text:p text:style-name="P117"><text:span text:style-name="T114">“</text:span><text:span text:style-name="T114">Node2”</text:span></text:p><draw:enhanced-geometry svg:viewBox="0 0 21600 21600" draw:type="rectangle" draw:enhanced-path="M 0 0 L 21600 0 21600 21600 0 21600 0 0 Z N"/></draw:custom-shape><draw:line draw:style-name="gr88" draw:text-style-name="P116" svg:x1="2.4878in" svg:y1="0.926in" svg:x2="1.8878in" svg:y2="0.926in"><text:p/></draw:line><draw:line draw:style-name="gr88" draw:text-style-name="P116" svg:x1="1.8878in" svg:y1="1.126in" svg:x2="2.4878in" svg:y2="1.126in"><text:p/></draw:line><draw:line draw:style-name="gr88" draw:text-style-name="P116" svg:x1="3.7878in" svg:y1="0.926in" svg:x2="3.1878in" svg:y2="0.926in"><text:p/></draw:line><draw:line draw:style-name="gr88" draw:text-style-name="P116" svg:x1="3.1878in" svg:y1="1.126in" svg:x2="3.7378in" svg:y2="1.126in"><text:p/></draw:line><draw:custom-shape draw:style-name="gr89" draw:text-style-name="P118" svg:width="1.6004in" svg:height="0.3004in" svg:x="0.7874in" svg:y="0.1366in"><text:p text:style-name="P117"><text:span text:style-name="T114">Node 1 publishes</text:span></text:p><text:p text:style-name="P117"><text:span text:style-name="T114">Signal 1 State (to broker)</text:span></text:p><draw:enhanced-geometry svg:viewBox="0 0 21600 21600" draw:type="rectangle" draw:enhanced-path="M 0 0 L 21600 0 21600 21600 0 21600 0 0 Z N"/></draw:custom-shape><draw:line draw:style-name="gr54" draw:text-style-name="P116" svg:x1="3.7878in" svg:y1="1.476in" svg:x2="3.4984in" svg:y2="1.176in"><text:p/></draw:line><draw:custom-shape draw:style-name="gr89" draw:text-style-name="P118" svg:width="1.6004in" svg:height="0.3004in" svg:x="3.3165in" svg:y="0.1256in"><text:p text:style-name="P117"><text:span text:style-name="T114">Node 2 subscribes to</text:span></text:p><text:p text:style-name="P117"><text:span text:style-name="T114">Signal 1 State from “Node 1”</text:span></text:p><draw:enhanced-geometry svg:viewBox="0 0 21600 21600" draw:type="rectangle" draw:enhanced-path="M 0 0 L 21600 0 21600 21600 0 21600 0 0 Z N"/></draw:custom-shape><draw:custom-shape draw:style-name="gr89" draw:text-style-name="P118" svg:width="1.6004in" svg:height="0.3004in" svg:x="0.8374in" svg:y="1.6756in"><text:p text:style-name="P117"><text:span text:style-name="T114">Node 1 subscribes to</text:span></text:p><text:p text:style-name="P117"><text:span text:style-name="T114">Track Sensor 3 from “Node 2”</text:span></text:p><draw:enhanced-geometry svg:viewBox="0 0 21600 21600" draw:type="rectangle" draw:enhanced-path="M 0 0 L 21600 0 21600 21600 0 21600 0 0 Z N"/></draw:custom-shape><draw:custom-shape draw:style-name="gr89" draw:text-style-name="P118" svg:width="1.6004in" svg:height="0.3004in" svg:x="3.4874in" svg:y="1.4756in"><text:p text:style-name="P117"><text:span text:style-name="T114">Node 2 publishes</text:span></text:p><text:p text:style-name="P117"><text:span text:style-name="T114">Track Sensor 3 (to broker)</text:span></text:p><draw:enhanced-geometry svg:viewBox="0 0 21600 21600" draw:type="rectangle" draw:enhanced-path="M 0 0 L 21600 0 21600 21600 0 21600 0 0 Z N"/></draw:custom-shape><draw:line draw:style-name="gr54" draw:text-style-name="P116" svg:x1="1.9878in" svg:y1="0.426in" svg:x2="2.1878in" svg:y2="0.876in"><text:p/></draw:line><draw:line draw:style-name="gr54" draw:text-style-name="P116" svg:x1="1.9878in" svg:y1="1.676in" svg:x2="2.2378in" svg:y2="1.176in"><text:p/></draw:line><draw:line draw:style-name="gr54" draw:text-style-name="P116" svg:x1="3.7484in" svg:y1="0.426in" svg:x2="3.4484in" svg:y2="0.876in"><text:p/></draw:line><draw:custom-shape draw:style-name="gr86" draw:text-style-name="P119" svg:width="0.7004in" svg:height="0.6004in" svg:x="2.5374in" svg:y="2.2256in"><text:p text:style-name="P117"><text:span text:style-name="T114">DCC </text:span></text:p><text:p text:style-name="P117"><text:span text:style-name="T114">Signalling </text:span></text:p><text:p text:style-name="P117"><text:span text:style-name="T114">Application</text:span></text:p><text:p text:style-name="P117"><text:span text:style-name="T114">“</text:span><text:span text:style-name="T114">Node3”</text:span></text:p><draw:enhanced-geometry svg:viewBox="0 0 21600 21600" draw:type="rectangle" draw:enhanced-path="M 0 0 L 21600 0 21600 21600 0 21600 0 0 Z N"/></draw:custom-shape><draw:line draw:style-name="gr88" draw:text-style-name="P116" svg:x1="2.7378in" svg:y1="2.226in" svg:x2="2.7378in" svg:y2="1.276in"><text:p/></draw:line><draw:custom-shape draw:style-name="gr89" draw:text-style-name="P118" svg:width="1.6004in" svg:height="0.3004in" svg:x="3.4874in" svg:y="2.0256in"><text:p text:style-name="P117"><text:span text:style-name="T114">Node 3 subscribes to</text:span></text:p><text:p text:style-name="P117"><text:span text:style-name="T114">Signal 1 State from “Node 1”</text:span></text:p><draw:enhanced-geometry svg:viewBox="0 0 21600 21600" draw:type="rectangle" draw:enhanced-path="M 0 0 L 21600 0 21600 21600 0 21600 0 0 Z N"/></draw:custom-shape><draw:line draw:style-name="gr54" draw:text-style-name="P116" svg:x1="3.4878in" svg:y1="2.126in" svg:x2="2.7878in" svg:y2="1.726in"><text:p/></draw:line></draw:g></text:p>
      <text:p text:style-name="P5"/>
      <text:p text:style-name="P5"/>
      <text:p text:style-name="P5"/>
      <text:p text:style-name="P5"/>
      <text:p text:style-name="P5"/>
      <text:p text:style-name="P5"/>
      <text:p text:style-name="P9"/>
      <text:h text:style-name="P73" text:outline-level="1"><text:bookmark-start text:name="__RefHeading___Toc1807_3448514483"/>Configuring the <text:span text:style-name="T65">S</text:span>ignalling Network <text:bookmark-end text:name="__RefHeading___Toc1807_3448514483"/></text:h>
      <text:p text:style-name="P9">The remainder of this section assumes you have<text:span text:style-name="T50"> a purchased a DCC Signalling System from DCC Model Railway Signalling </text:span>which comes pre-installed with a broker. If this is not the case you will need to either stand up your own broker on your local network <text:span text:style-name="T89">(we’d recommend standing it up on the same device used to host the DCC Signalling application) </text:span>or use a broker out on the internet (changing the IP addresses and ports as appropriate).</text:p>
      <text:p text:style-name="P10">For this example, we’re going to configure a network with two ‘nodes’:</text:p>
      <text:list xml:id="list2093546713" text:style-name="L1">
        <text:list-item>
          <text:p text:style-name="P91">‘<text:span text:style-name="T21">Node1</text:span>’ – The application running on the DCC <text:span text:style-name="T66">S</text:span>ignalling <text:span text:style-name="T66">S</text:span>ystem itself (Raspberry Pi4)</text:p>
        </text:list-item>
        <text:list-item>
          <text:p text:style-name="P91">‘<text:span text:style-name="T21">Node2</text:span>’ – A second instance of the application running on another computer</text:p>
        </text:list-item>
      </text:list>
      <text:p text:style-name="P9"><draw:g text:anchor-type="paragraph" draw:z-index="1" draw:name="Shape2" draw:style-name="gr50"><draw:custom-shape draw:style-name="gr92" draw:text-style-name="P120" svg:width="1.0504in" svg:height="1.8504in" svg:x="2.6311in" svg:y="0.148in"><text:p text:style-name="P117"><text:span text:style-name="T114">DCC Signalling </text:span></text:p><text:p text:style-name="P117"><text:span text:style-name="T114">System (RPi-4)</text:span></text:p><draw:enhanced-geometry svg:viewBox="0 0 21600 21600" draw:type="rectangle" draw:enhanced-path="M 0 0 L 21600 0 21600 21600 0 21600 0 0 Z N"/></draw:custom-shape><draw:frame draw:style-name="gr66" draw:text-style-name="P116" svg:width="0.6685in" svg:height="0.5504in" svg:x="4.3413in" svg:y="0.1264in"><draw:image xlink:href="Pictures/1000020100000154000001186A691DB4C3AFC7D5.png" xlink:type="simple" xlink:show="embed" xlink:actuate="onLoad" draw:mime-type="image/png"><text:p/></draw:image></draw:frame><draw:custom-shape draw:style-name="gr93" draw:text-style-name="P119" svg:width="0.6504in" svg:height="0.5004in" svg:x="2.8311in" svg:y="1.098in"><text:p text:style-name="P117"><text:span text:style-name="T114">DCC </text:span></text:p><text:p text:style-name="P117"><text:span text:style-name="T114">Signalling </text:span></text:p><text:p text:style-name="P117"><text:span text:style-name="T114">Application</text:span></text:p><draw:enhanced-geometry svg:viewBox="0 0 21600 21600" draw:type="rectangle" draw:enhanced-path="M 0 0 L 21600 0 21600 21600 0 21600 0 0 Z N"/></draw:custom-shape><draw:custom-shape draw:style-name="gr93" draw:text-style-name="P119" svg:width="0.6504in" svg:height="0.5004in" svg:x="2.8311in" svg:y="0.3583in"><text:p text:style-name="P117"><text:span text:style-name="T114">Network</text:span></text:p><text:p text:style-name="P117"><text:span text:style-name="T114">Broker</text:span></text:p><draw:enhanced-geometry svg:viewBox="0 0 21600 21600" draw:type="rectangle" draw:enhanced-path="M 0 0 L 21600 0 21600 21600 0 21600 0 0 Z N"/></draw:custom-shape><draw:line draw:style-name="gr88" draw:text-style-name="P116" svg:x1="3.1811in" svg:y1="0.8583in" svg:x2="3.1811in" svg:y2="1.0583in"><text:p/></draw:line><draw:line draw:style-name="gr88" draw:text-style-name="P116" svg:x1="3.1811in" svg:y1="1.0976in" svg:x2="3.1811in" svg:y2="0.8976in"><text:p/></draw:line><draw:line draw:style-name="gr88" draw:text-style-name="P116" svg:x1="3.4811in" svg:y1="0.5976in" svg:x2="4.2811in" svg:y2="0.5976in"><text:p/></draw:line><draw:custom-shape draw:style-name="gr94" draw:text-style-name="P120" svg:width="1.0504in" svg:height="1.1504in" svg:x="4.1311in" svg:y="0.848in"><text:p text:style-name="P117"><text:span text:style-name="T114">Other </text:span></text:p><text:p text:style-name="P117"><text:span text:style-name="T114">Computer</text:span></text:p><draw:enhanced-geometry svg:viewBox="0 0 21600 21600" draw:type="rectangle" draw:enhanced-path="M 0 0 L 21600 0 21600 21600 0 21600 0 0 Z N"/></draw:custom-shape><draw:custom-shape draw:style-name="gr93" draw:text-style-name="P119" svg:width="0.6504in" svg:height="0.5004in" svg:x="4.3311in" svg:y="1.098in"><text:p text:style-name="P117"><text:span text:style-name="T114">DCC </text:span></text:p><text:p text:style-name="P117"><text:span text:style-name="T114">Signalling </text:span></text:p><text:p text:style-name="P117"><text:span text:style-name="T114">Application</text:span></text:p><draw:enhanced-geometry svg:viewBox="0 0 21600 21600" draw:type="rectangle" draw:enhanced-path="M 0 0 L 21600 0 21600 21600 0 21600 0 0 Z N"/></draw:custom-shape><draw:line draw:style-name="gr88" draw:text-style-name="P116" svg:x1="4.6811in" svg:y1="0.6976in" svg:x2="4.6811in" svg:y2="0.8976in"><text:p/></draw:line><draw:line draw:style-name="gr88" draw:text-style-name="P116" svg:x1="4.6811in" svg:y1="1.0976in" svg:x2="4.6811in" svg:y2="0.7476in"><text:p/></draw:line><draw:line draw:style-name="gr88" draw:text-style-name="P116" svg:x1="4.2811in" svg:y1="0.5976in" svg:x2="3.4811in" svg:y2="0.5976in"><text:p/></draw:line><draw:custom-shape draw:style-name="gr95" draw:text-style-name="P118" svg:width="1.0504in" svg:height="0.5004in" svg:x="1.1811in" svg:y="0.8264in"><text:p text:style-name="P117"><text:span text:style-name="T114">Network broker </text:span></text:p><text:p text:style-name="P117"><text:span text:style-name="T114">installed on DCC </text:span></text:p><text:p text:style-name="P117"><text:span text:style-name="T114">Signalling System</text:span></text:p><draw:enhanced-geometry svg:viewBox="0 0 21600 21600" draw:type="rectangle" draw:enhanced-path="M 0 0 L 21600 0 21600 21600 0 21600 0 0 Z N"/></draw:custom-shape><draw:line draw:style-name="gr54" draw:text-style-name="P116" svg:x1="2.2311in" svg:y1="1.0764in" svg:x2="2.7811in" svg:y2="0.7264in"><text:p/></draw:line></draw:g></text:p>
      <text:p text:style-name="P9"/>
      <text:p text:style-name="P9"/>
      <text:p text:style-name="P9"/>
      <text:p text:style-name="P9"/>
      <text:p text:style-name="P9"/>
      <text:p text:style-name="P9"/>
      <text:h text:style-name="Heading_20_2" text:outline-level="2">Node1 <text:span text:style-name="T66">(DCC Signalling system) </text:span></text:h>
      <text:p text:style-name="P9"><text:span text:style-name="T102">Open</text:span> the networking configuration <text:span text:style-name="T68">window</text:span> from the main menubar (<text:span text:style-name="T1">Settings =&gt; MQTT</text:span>). </text:p>
      <text:p text:style-name="P11">You will see that the broker <text:span text:style-name="T71">IP (Internet Protocol) </text:span>address and port fields are already populated. The <text:span text:style-name="T71"><text:s text:c="2"/>special </text:span>address of <text:span text:style-name="T1">127.0.0.1</text:span> refer<text:span text:style-name="T71">s </text:span>to the “localhost” (i.e. the machine the application is running on). As <text:span text:style-name="T71">this</text:span> is the DCC <text:span text:style-name="T66">S</text:span>ignalling <text:span text:style-name="T66">S</text:span>ystem <text:span text:style-name="T71">node, the broker is pre-installed and therefore running on the same “localhost” as the application. We therefore don’t need to change this field for ‘</text:span><text:span text:style-name="T38">Node1</text:span><text:span text:style-name="T71">’. The default port number of </text:span><text:span text:style-name="T2">1883</text:span><text:span text:style-name="T66"> should also be left unchanged.</text:span></text:p>
      <text:p text:style-name="P32">You should note that there is no username/password security enabled as part of the default <text:span text:style-name="T78">broker</text:span> <text:span text:style-name="T78">installation</text:span> so these fields should be left blank. This should be absolutely fine for normal us<text:span text:style-name="T102">e</text:span> on your local network as its ‘behind’ the firewall/router provided by your Internet Service Provider (ISP) and the information we are passing over the network is limited to <text:span text:style-name="T67">the internal</text:span> state of the signalling system (i.e. its not exactly <text:span text:style-name="T67">the </text:span>critical national infrastructure <text:span text:style-name="T67">of</text:span> the real <text:span text:style-name="T67">railway</text:span>). <text:span text:style-name="T67">That said, if you do want to enable </text:span>username/password security <text:span text:style-name="T67">for the broker you will be able to find the appropriate instructions on the internet (search Raspberry Pi and mosquitto MQTT broker).</text:span></text:p>
      <text:p text:style-name="P13">We first need to choose a name for our signalling network. This is user-configurable to enable multiple signalling networks to operate independently over the same local WiFi network without interfering with each other (e.g. <text:span text:style-name="T102">to support </text:span>club nights or model railway exhibitions). </text:p>
      <text:p text:style-name="P13">We also need to choose a unique name for this particular node <text:span text:style-name="T92">on the network</text:span>. </text:p>
      <text:p text:style-name="P12">In this case we’ll use ‘<text:span text:style-name="T45">Network1</text:span>’ for the network name and ‘<text:span text:style-name="T47">Node1</text:span>’ for the node name.</text:p>
      <text:p text:style-name="P15"><draw:g text:anchor-type="paragraph" draw:z-index="7" draw:name="Shape3" draw:style-name="gr50"><draw:frame draw:style-name="gr66" draw:text-style-name="P116" svg:width="2.2598in" svg:height="2.7803in" svg:x="2.15in" svg:y="0.0201in"><draw:image xlink:href="Pictures/100000000000017E000001D622D0D53580192F41.png" xlink:type="simple" xlink:show="embed" xlink:actuate="onLoad" draw:mime-type="image/png"><text:p/></draw:image></draw:frame><draw:custom-shape draw:style-name="gr73" draw:text-style-name="P118" svg:width="1.4823in" svg:height="0.5004in" svg:x="5.0181in" svg:y="0in"><text:p text:style-name="P117"><text:span text:style-name="T114">The network IP address </text:span></text:p><text:p text:style-name="P117"><text:span text:style-name="T114">of the computer that the</text:span></text:p><text:p text:style-name="P117"><text:span text:style-name="T114">Broker is running on</text:span></text:p><draw:enhanced-geometry svg:viewBox="0 0 21600 21600" draw:type="rectangle" draw:enhanced-path="M 0 0 L 21600 0 21600 21600 0 21600 0 0 Z N"/></draw:custom-shape><draw:custom-shape draw:style-name="gr74" draw:text-style-name="P118" svg:width="1.3004in" svg:height="0.4004in" svg:x="5.05in" svg:y="1.55in"><text:p text:style-name="P117"><text:span text:style-name="T114">Default port </text:span></text:p><text:p text:style-name="P117"><text:span text:style-name="T114">(do not change)</text:span></text:p><draw:enhanced-geometry svg:viewBox="0 0 21600 21600" draw:type="rectangle" draw:enhanced-path="M 0 0 L 21600 0 21600 21600 0 21600 0 0 Z N"/></draw:custom-shape><draw:custom-shape draw:style-name="gr75" draw:text-style-name="P118" svg:width="1.7004in" svg:height="0.6004in" svg:x="0in" svg:y="0.85in"><text:p text:style-name="P117"><text:span text:style-name="T114">The default broker installation</text:span></text:p><text:p text:style-name="P117"><text:span text:style-name="T114">does not apply username</text:span></text:p><text:p text:style-name="P117"><text:span text:style-name="T114">and password authentication</text:span></text:p><text:p text:style-name="P117"><text:span text:style-name="T114">(leave blank)</text:span></text:p><draw:enhanced-geometry svg:viewBox="0 0 21600 21600" draw:type="rectangle" draw:enhanced-path="M 0 0 L 21600 0 21600 21600 0 21600 0 0 Z N"/></draw:custom-shape><draw:custom-shape draw:style-name="gr74" draw:text-style-name="P118" svg:width="1.3004in" svg:height="0.4004in" svg:x="0.35in" svg:y="2.05in"><text:p text:style-name="P117"><text:span text:style-name="T114">Our network name</text:span></text:p><text:p text:style-name="P117"><text:span text:style-name="T114">will be </text:span><text:span text:style-name="T115">Network1</text:span></text:p><draw:enhanced-geometry svg:viewBox="0 0 21600 21600" draw:type="rectangle" draw:enhanced-path="M 0 0 L 21600 0 21600 21600 0 21600 0 0 Z N"/></draw:custom-shape><draw:custom-shape draw:style-name="gr74" draw:text-style-name="P118" svg:width="1.3004in" svg:height="0.4004in" svg:x="5.0398in" svg:y="2.15in"><text:p text:style-name="P117"><text:span text:style-name="T114">This node on Network1</text:span></text:p><text:p text:style-name="P117"><text:span text:style-name="T114">will be called </text:span><text:span text:style-name="T115">Node1</text:span></text:p><draw:enhanced-geometry svg:viewBox="0 0 21600 21600" draw:type="rectangle" draw:enhanced-path="M 0 0 L 21600 0 21600 21600 0 21600 0 0 Z N"/></draw:custom-shape><draw:line draw:style-name="gr54" draw:text-style-name="P116" svg:x1="1.7004in" svg:y1="1.1004in" svg:x2="2.3004in" svg:y2="1.0004in"><text:p/></draw:line><draw:line draw:style-name="gr54" draw:text-style-name="P116" svg:x1="5.0004in" svg:y1="0.1504in" svg:x2="3.7504in" svg:y2="0.5004in"><text:p/></draw:line><draw:line draw:style-name="gr54" draw:text-style-name="P116" svg:x1="5.0504in" svg:y1="1.7004in" svg:x2="3.6004in" svg:y2="0.7504in"><text:p/></draw:line><draw:line draw:style-name="gr54" draw:text-style-name="P116" svg:x1="5.0504in" svg:y1="2.2504in" svg:x2="4.2004in" svg:y2="1.5004in"><text:p/></draw:line><draw:line draw:style-name="gr54" draw:text-style-name="P116" svg:x1="1.6504in" svg:y1="2.2004in" svg:x2="2.7504in" svg:y2="1.5004in"><text:p/></draw:line><draw:custom-shape draw:style-name="gr53" draw:text-style-name="P118" svg:width="1.5004in" svg:height="0.5004in" svg:x="0.2in" svg:y="0.1in"><text:p text:style-name="P117"><text:span text:style-name="T114">You should also be</text:span></text:p><text:p text:style-name="P117"><text:span text:style-name="T114">Able to specify </text:span><text:span text:style-name="T116">localhost</text:span></text:p><text:p text:style-name="P117"><text:span text:style-name="T114">for the Broker Address</text:span></text:p><draw:enhanced-geometry svg:viewBox="0 0 21600 21600" draw:type="rectangle" draw:enhanced-path="M 0 0 L 21600 0 21600 21600 0 21600 0 0 Z N"/></draw:custom-shape><draw:line draw:style-name="gr54" draw:text-style-name="P116" svg:x1="1.7004in" svg:y1="0.3504in" svg:x2="2.2504in" svg:y2="0.5504in"><text:p/></draw:line><draw:custom-shape draw:style-name="gr76" draw:text-style-name="P118" svg:width="1.9004in" svg:height="0.6504in" svg:x="4.8in" svg:y="0.65in"><text:p text:style-name="P117"><text:span text:style-name="T114">For the main Signalling </text:span></text:p><text:p text:style-name="P117"><text:span text:style-name="T114">System, this can be specified</text:span></text:p><text:p text:style-name="P117"><text:span text:style-name="T114"><text:s/></text:span><text:span text:style-name="T114">as </text:span><text:span text:style-name="T115">127.0.0.1</text:span><text:span text:style-name="T114"> or </text:span><text:span text:style-name="T115">localhost</text:span><text:span text:style-name="T114"> </text:span></text:p><text:p text:style-name="P117"><text:span text:style-name="T114">(which both mean ‘this computer’)</text:span></text:p><draw:enhanced-geometry svg:viewBox="0 0 21600 21600" draw:type="rectangle" draw:enhanced-path="M 0 0 L 21600 0 21600 21600 0 21600 0 0 Z N"/></draw:custom-shape><draw:line draw:style-name="gr54" draw:text-style-name="P116" svg:x1="4.8004in" svg:y1="0.9004in" svg:x2="3.8004in" svg:y2="0.6004in"><text:p/></draw:line></draw:g><text:soft-page-break/></text:p>
      <text:p text:style-name="P14"/>
      <text:p text:style-name="P14"/>
      <text:p text:style-name="P14"/>
      <text:p text:style-name="P14"/>
      <text:p text:style-name="P14"/>
      <text:p text:style-name="P14"/>
      <text:p text:style-name="P14"/>
      <text:p text:style-name="P14"/>
      <text:p text:style-name="P14"/>
      <text:p text:style-name="P14">Other options you can select (as appropriate) are:</text:p>
      <text:list xml:id="list2854162089" text:style-name="L2">
        <text:list-item>
          <text:p text:style-name="P92">Enhanced MQTT debug loggging – <text:span text:style-name="T92">Realistically</text:span> you would only ever need to select this if you are having <text:span text:style-name="T92">real</text:span> problems <text:span text:style-name="T92">with your configuration </text:span>and need to send the application logs through to <text:span text:style-name="T78">us at </text:span>DCC Model Railway Signalling for further analysis/assistance.</text:p>
        </text:list-item>
        <text:list-item>
          <text:p text:style-name="P92">Connect to Broker on Layout load – The MQTT broker is always disconnected when loading a new layout file. <text:span text:style-name="T102">Select</text:span> this option (and save the layout file) if you want to automatically connect to the broker on layout load.</text:p>
        </text:list-item>
        <text:list-item>
          <text:p text:style-name="P92">Publish shutdown on Application exit – Primarily intended for networks that include remote<text:span text:style-name="T102"> </text:span>sensor nodes (i.e. <text:span text:style-name="T78">nodes providing additional track sensor inputs to the signalling system and </text:span>running without a keyboard, mouse or <text:span text:style-name="T78">monitor</text:span> connected). If this option is selected then a shutdown message will be published to all other network nodes on application exit.</text:p>
        </text:list-item>
        <text:list-item>
          <text:p text:style-name="P92">Quit application on reciept of shutdown – Primarily intended for remote sensor nodes <text:span text:style-name="T78">(see above) </text:span>to trigger a graceful system shutdown on reciept of the shutdown message.</text:p>
        </text:list-item>
      </text:list>
      <text:p text:style-name="P19"><text:span text:style-name="T79">You now need to </text:span><text:span text:style-name="T6">Apply</text:span><text:span text:style-name="T79"> the settings before we attempt connecting to the broker (don’t click OK as we want to keed the networking configuration </text:span>window <text:span text:style-name="T79">open until we have completed the setup). </text:span></text:p>
      <text:p text:style-name="P20"><text:span text:style-name="T80">To connect to the broker, either click on the </text:span><text:span text:style-name="T7">Test Broker Connectivity</text:span><text:span text:style-name="T80"> button in the networking configuration </text:span>window <text:span text:style-name="T80">or click on the </text:span><text:span text:style-name="T7">MQTT</text:span><text:span text:style-name="T80"> control on the Main Menubar and select </text:span><text:span text:style-name="T7">Connect </text:span><text:span text:style-name="T80">from the</text:span> <text:span text:style-name="T80">dropdown menu</text:span>. If successful, the Main Menubar <text:span text:style-name="T78">MQTT status</text:span> will show ‘Connected’.</text:p>
      <text:p text:style-name="P16"><draw:g text:anchor-type="paragraph" draw:z-index="2" draw:name="Shape4" draw:style-name="gr50"><draw:frame draw:style-name="gr90" draw:text-style-name="P116" svg:width="5.6122in" svg:height="0.4996in" svg:x="0.3945in" svg:y="0.1264in"><draw:image xlink:href="Pictures/10000000000004540000024596F6B5B0186FF26F.png" xlink:type="simple" xlink:show="embed" xlink:actuate="onLoad" draw:mime-type="image/png"><text:p/></draw:image></draw:frame><draw:custom-shape draw:style-name="gr74" draw:text-style-name="P118" svg:width="1.3004in" svg:height="0.4004in" svg:x="2.7445in" svg:y="0.8264in"><text:p text:style-name="P117"><text:span text:style-name="T114">MQTT status /control</text:span></text:p><text:p text:style-name="P117"><text:span text:style-name="T114">(showing disconnected)</text:span></text:p><draw:enhanced-geometry svg:viewBox="0 0 21600 21600" draw:type="rectangle" draw:enhanced-path="M 0 0 L 21600 0 21600 21600 0 21600 0 0 Z N"/></draw:custom-shape><draw:line draw:style-name="gr54" draw:text-style-name="P116" svg:x1="3.6445in" svg:y1="0.8264in" svg:x2="3.8945in" svg:y2="0.5264in"><text:p/></draw:line><draw:frame draw:style-name="gr91" draw:text-style-name="P116" svg:width="5.6122in" svg:height="0.4961in" svg:x="0.3945in" svg:y="1.3882in"><draw:image xlink:href="Pictures/1000000000000454000002458CEF8725753D6297.png" xlink:type="simple" xlink:show="embed" xlink:actuate="onLoad" draw:mime-type="image/png"><text:p/></draw:image></draw:frame><draw:custom-shape draw:style-name="gr74" draw:text-style-name="P118" svg:width="1.3004in" svg:height="0.4004in" svg:x="4.5445in" svg:y="0.7264in"><text:p text:style-name="P117"><text:span text:style-name="T114">MQTT status /control</text:span></text:p><text:p text:style-name="P117"><text:span text:style-name="T114">(showing connected)</text:span></text:p><draw:enhanced-geometry svg:viewBox="0 0 21600 21600" draw:type="rectangle" draw:enhanced-path="M 0 0 L 21600 0 21600 21600 0 21600 0 0 Z N"/></draw:custom-shape><draw:line draw:style-name="gr54" draw:text-style-name="P116" svg:x1="4.7445in" svg:y1="1.1264in" svg:x2="4.4445in" svg:y2="1.5945in"><text:p/></draw:line></draw:g></text:p>
      <text:p text:style-name="P16"/>
      <text:p text:style-name="P12"/>
      <text:p text:style-name="P12"/>
      <text:p text:style-name="P9"/>
      <text:p text:style-name="P9"/>
      <text:p text:style-name="P17"><text:soft-page-break/>Before we configure <text:span text:style-name="T102">the </text:span>other network node, we first need to find the<text:span text:style-name="T71"> IP </text:span>address of <text:span text:style-name="T71">the the main DCC signalling System</text:span> on the<text:span text:style-name="T71"> local WiFi </text:span>network <text:span text:style-name="T72">as this</text:span> will<text:span text:style-name="T71"> be the broker address we will have to specify when configuring the other signalling network node.</text:span> <text:s/><text:span text:style-name="T71">Note that when we talk about IP addresses on the local network, these are the </text:span><text:span text:style-name="T19">local</text:span><text:span text:style-name="T69"> network address assigned by your WiFi router and not the internet-facing IP address (assigned by the Internet Service Provider)</text:span>.</text:p>
      <text:p text:style-name="P21"><text:span text:style-name="T21">Note that most </text:span><text:span text:style-name="T22">WiFi</text:span><text:span text:style-name="T21"> routers will assign devices a “fixed” local IP address when they are first seen on the network. This means that when devices are shut down and subsequently powered up, the router will recognise them and assign the same IP address </text:span><text:span text:style-name="T23">as before</text:span><text:span text:style-name="T21">. <text:s/></text:span><text:span text:style-name="T24">O</text:span><text:span text:style-name="T21">nce you have configured your signalling network you should </text:span><text:span text:style-name="T24">therefore </text:span><text:span text:style-name="T21">never </text:span><text:span text:style-name="T24">need</text:span><text:span text:style-name="T21"> to update the con</text:span><text:span text:style-name="T23">f</text:span><text:span text:style-name="T21">iguration unless you change your router or perform a factory reset. Even routers that do not assign “fixed” </text:span><text:span text:style-name="T22">local </text:span><text:span text:style-name="T21">IP addresses by defaul</text:span><text:span text:style-name="T23">t</text:span><text:span text:style-name="T21"> can usually be configured to do so. If in doubt check the documentation for your home router or contact the supplier (normally your </text:span><text:span text:style-name="T22">Internet Service Provider</text:span><text:span text:style-name="T23">).</text:span></text:p>
      <text:p text:style-name="P16">To <text:span text:style-name="T72">find the local network address</text:span>, <text:span text:style-name="T81">select the </text:span><text:span text:style-name="T7">Status</text:span><text:span text:style-name="T80"> tab of</text:span> the<text:span text:style-name="T65"> networking configuration </text:span>window.</text:p>
      <text:p text:style-name="P16">This provides a list of all nodes <text:span text:style-name="T72">on the signalling network</text:span> that <text:span text:style-name="T79">have been ‘seen’</text:span>, the time they were last seen and an indication of status (the time is coloured green if they have been seen within the last 10 seconds, otherwise red). The <text:span text:style-name="T69">local </text:span>IP address of <text:span text:style-name="T80">each</text:span> node is also shown in the list.</text:p>
      <text:p text:style-name="P16">Assuming we have successfully connected to the broker, our node should be the only <text:span text:style-name="T80">item</text:span> in the list (as this is the only <text:span text:style-name="T92">network</text:span> node we have <text:span text:style-name="T92">configured</text:span>). If the broker is connected but nothing is showing in the list then try clicking <text:span text:style-name="T4">R</text:span><text:span text:style-name="T1">efresh</text:span> <text:span text:style-name="T6">Display</text:span>.</text:p>
      <text:p text:style-name="P16"><draw:g text:anchor-type="paragraph" draw:z-index="6" draw:name="Shape5" draw:style-name="gr50"><draw:frame draw:style-name="gr66" draw:text-style-name="P116" svg:width="2.2531in" svg:height="2.8016in" svg:x="2.2472in" svg:y="0.1256in"><draw:image xlink:href="Pictures/1000000000000165000001BC06D108802E5C91C9.png" xlink:type="simple" xlink:show="embed" xlink:actuate="onLoad" draw:mime-type="image/png"><text:p/></draw:image></draw:frame><draw:custom-shape draw:style-name="gr77" draw:text-style-name="P118" svg:width="1.9398in" svg:height="0.7004in" svg:x="0.0102in" svg:y="1.6256in"><text:p text:style-name="P117"><text:span text:style-name="T114">The ‘hostname’ of the computer</text:span></text:p><text:p text:style-name="P117"><text:span text:style-name="T114">we are running this instance</text:span></text:p><text:p text:style-name="P117"><text:span text:style-name="T114">of the signalling application on</text:span></text:p><text:p text:style-name="P117"><text:span text:style-name="T117">(</text:span><text:span text:style-name="T115">raspberrypi</text:span><text:span text:style-name="T117">)</text:span></text:p><draw:enhanced-geometry svg:viewBox="0 0 21600 21600" draw:type="rectangle" draw:enhanced-path="M 0 0 L 21600 0 21600 21600 0 21600 0 0 Z N"/></draw:custom-shape><draw:line draw:style-name="gr54" draw:text-style-name="P116" svg:x1="1.95in" svg:y1="1.8256in" svg:x2="2.95in" svg:y2="0.7756in"><text:p/></draw:line><draw:custom-shape draw:style-name="gr67" draw:text-style-name="P118" svg:width="1.9504in" svg:height="0.6004in" svg:x="0in" svg:y="0.8756in"><text:p text:style-name="P117"><text:span text:style-name="T114">The name we have given to</text:span></text:p><text:p text:style-name="P117"><text:span text:style-name="T114">this node on our signalling network</text:span></text:p><text:p text:style-name="P117"><text:span text:style-name="T117">(</text:span><text:span text:style-name="T115">Node1</text:span><text:span text:style-name="T117">)</text:span></text:p><draw:enhanced-geometry svg:viewBox="0 0 21600 21600" draw:type="rectangle" draw:enhanced-path="M 0 0 L 21600 0 21600 21600 0 21600 0 0 Z N"/></draw:custom-shape><draw:line draw:style-name="gr54" draw:text-style-name="P116" svg:x1="1.95in" svg:y1="1.1756in" svg:x2="2.45in" svg:y2="0.7256in"><text:p/></draw:line><draw:custom-shape draw:style-name="gr78" draw:text-style-name="P118" svg:width="2.0504in" svg:height="0.7504in" svg:x="4.7in" svg:y="1.5756in"><text:p text:style-name="P117"><text:span text:style-name="T114">The network IP address that the WiFi</text:span></text:p><text:p text:style-name="P117"><text:span text:style-name="T114">router has assigned to the computer</text:span></text:p><text:p text:style-name="P117"><text:span text:style-name="T114">DCC signalling system and hence</text:span></text:p><text:p text:style-name="P117"><text:span text:style-name="T114">the IP address of the MQTT broker</text:span></text:p><text:p text:style-name="P117"><text:span text:style-name="T117">(</text:span><text:span text:style-name="T115">192.168.1.74</text:span><text:span text:style-name="T117">)</text:span></text:p><draw:enhanced-geometry svg:viewBox="0 0 21600 21600" draw:type="rectangle" draw:enhanced-path="M 0 0 L 21600 0 21600 21600 0 21600 0 0 Z N"/></draw:custom-shape><draw:line draw:style-name="gr54" draw:text-style-name="P116" svg:x1="4.7in" svg:y1="1.9756in" svg:x2="3.65in" svg:y2="0.7756in"><text:p/></draw:line><draw:custom-shape draw:style-name="gr79" draw:text-style-name="P118" svg:width="2.0504in" svg:height="0.4504in" svg:x="4.7in" svg:y="0.8256in"><text:p text:style-name="P117"><text:span text:style-name="T114">The last time the Signalling node was</text:span></text:p><text:p text:style-name="P117"><text:span text:style-name="T114">seen (Green = Connected = Good)</text:span></text:p><draw:enhanced-geometry svg:viewBox="0 0 21600 21600" draw:type="rectangle" draw:enhanced-path="M 0 0 L 21600 0 21600 21600 0 21600 0 0 Z N"/></draw:custom-shape><draw:line draw:style-name="gr54" draw:text-style-name="P116" svg:x1="4.7in" svg:y1="1.0756in" svg:x2="4.3in" svg:y2="0.7756in"><text:p/></draw:line></draw:g></text:p>
      <text:p text:style-name="P16"/>
      <text:p text:style-name="P9"/>
      <text:p text:style-name="P9"/>
      <text:p text:style-name="P9"/>
      <text:p text:style-name="P9"/>
      <text:p text:style-name="P9"/>
      <text:p text:style-name="P9"/>
      <text:p text:style-name="P9"/>
      <text:p text:style-name="P9"/>
      <text:p text:style-name="P23">Make a note of the displayed <text:span text:style-name="T10">Hostname</text:span><text:span text:style-name="T105"> and </text:span><text:span text:style-name="T1">IP address</text:span> <text:span text:style-name="T72">for ‘</text:span><text:span text:style-name="T23">Node1</text:span><text:span text:style-name="T72">’ (the DCC Signalling system) </text:span><text:span text:style-name="T105">as we</text:span> <text:span text:style-name="T105">will need to enter this information</text:span><text:span text:style-name="T72"> </text:span>when configur<text:span text:style-name="T72">ing</text:span> other network nodes.</text:p>
      <text:h text:style-name="P69" text:outline-level="1"/>
      <text:h text:style-name="P79" text:outline-level="2"><text:bookmark-start text:name="__RefHeading___Toc11318_3072677067"/>Node<text:span text:style-name="T72">2</text:span> <text:span text:style-name="T66">(Secondary Node) </text:span><text:bookmark-end text:name="__RefHeading___Toc11318_3072677067"/></text:h>
      <text:p text:style-name="P24">On the second computer, start up the Signalling application and open<text:span text:style-name="T65"> the networking configuration window from the main menubar (</text:span><text:span text:style-name="T3">Settings =&gt; MQTT</text:span><text:span text:style-name="T65">).</text:span> </text:p>
      <text:p text:style-name="P24">Configuration is similar to ‘<text:span text:style-name="T21">Node1’</text:span>, but in this case we need to specify the local network address of the <text:span text:style-name="T103">main </text:span>DCC <text:span text:style-name="T103">S</text:span>ignalling node for the broker address (this is the <text:span text:style-name="T79">IP</text:span> address we made a note of in the previous section) <text:span text:style-name="T92">and set a unique name for the node (this will be ‘</text:span><text:span text:style-name="T48">Node2</text:span><text:span text:style-name="T92">’).</text:span></text:p>
      <text:p text:style-name="P24"><draw:g text:anchor-type="paragraph" draw:z-index="8" draw:name="Shape20" draw:style-name="gr50"><draw:frame draw:style-name="gr66" draw:text-style-name="P116" svg:width="2.2516in" svg:height="3.0689in" svg:x="2.363in" svg:y="-0.0193in"><draw:image xlink:href="Pictures/100000000000015B000001D93093FE951529B0BF.png" xlink:type="simple" xlink:show="embed" xlink:actuate="onLoad" draw:mime-type="image/png"><text:p/></draw:image></draw:frame><draw:custom-shape draw:style-name="gr68" draw:text-style-name="P118" svg:width="1.3004in" svg:height="0.3504in" svg:x="5.1146in" svg:y="1.3996in"><text:p text:style-name="P117"><text:span text:style-name="T114">Default port </text:span></text:p><text:p text:style-name="P117"><text:span text:style-name="T114">(do not change)</text:span></text:p><draw:enhanced-geometry svg:viewBox="0 0 21600 21600" draw:mirror-vertical="false" draw:type="rectangle" draw:enhanced-path="M 0 0 L 21600 0 21600 21600 0 21600 0 0 Z N"/></draw:custom-shape><draw:custom-shape draw:style-name="gr69" draw:text-style-name="P118" svg:width="1.7004in" svg:height="0.7004in" svg:x="0.1646in" svg:y="1.8996in"><text:p text:style-name="P117"><text:span text:style-name="T114">The network name</text:span></text:p><text:p text:style-name="P117"><text:span text:style-name="T114">will be </text:span><text:span text:style-name="T115">Network1</text:span></text:p><text:p text:style-name="P117"><text:span text:style-name="T114">(so we’re on the same</text:span></text:p><text:p text:style-name="P117"><text:span text:style-name="T114">Signalling network as Node1)</text:span></text:p><draw:enhanced-geometry svg:viewBox="0 0 21600 21600" draw:type="rectangle" draw:enhanced-path="M 0 0 L 21600 0 21600 21600 0 21600 0 0 Z N"/></draw:custom-shape><draw:custom-shape draw:style-name="gr70" draw:text-style-name="P118" svg:width="1.6004in" svg:height="0.7004in" svg:x="4.9646in" svg:y="2.0496in"><text:p text:style-name="P117"><text:span text:style-name="T114">This node on Network1</text:span></text:p><text:p text:style-name="P117"><text:span text:style-name="T114">will be called </text:span><text:span text:style-name="T116">Node2</text:span></text:p><text:p text:style-name="P117"><text:span text:style-name="T114">(each signalling application</text:span></text:p><text:p text:style-name="P117"><text:span text:style-name="T114"><text:s/></text:span><text:span text:style-name="T114">must have a unique name)</text:span></text:p><draw:enhanced-geometry svg:viewBox="0 0 21600 21600" draw:type="rectangle" draw:enhanced-path="M 0 0 L 21600 0 21600 21600 0 21600 0 0 Z N"/></draw:custom-shape><draw:line draw:style-name="gr54" draw:text-style-name="P116" svg:x1="2.0146in" svg:y1="1.05in" svg:x2="3.2646in" svg:y2="0.65in"><text:p/></draw:line><draw:line draw:style-name="gr54" draw:text-style-name="P116" svg:x1="4.9146in" svg:y1="0.85in" svg:x2="4.0646in" svg:y2="0.6in"><text:p/></draw:line><draw:line draw:style-name="gr54" draw:text-style-name="P116" svg:x1="4.9646in" svg:y1="2.25in" svg:x2="4.3646in" svg:y2="1.7in"><text:p/></draw:line><draw:line draw:style-name="gr54" draw:text-style-name="P116" svg:x1="1.8646in" svg:y1="2.2in" svg:x2="3.0146in" svg:y2="1.7in"><text:p/></draw:line><draw:custom-shape draw:style-name="gr71" draw:text-style-name="P118" svg:width="2.1504in" svg:height="0.7504in" svg:x="-0.1354in" svg:y="0.5996in"><text:p text:style-name="P117"><text:span text:style-name="T114">The network IP address that the WiFi</text:span></text:p><text:p text:style-name="P117"><text:span text:style-name="T114">router assigned to the DCC </text:span></text:p><text:p text:style-name="P117"><text:span text:style-name="T114">signalling system computer and hence</text:span></text:p><text:p text:style-name="P117"><text:span text:style-name="T114">the IP address of the MQTT broker</text:span></text:p><text:p text:style-name="P117"><text:span text:style-name="T117">(</text:span><text:span text:style-name="T115">192.168.1.74</text:span><text:span text:style-name="T117">)</text:span></text:p><draw:enhanced-geometry svg:viewBox="0 0 21600 21600" draw:type="rectangle" draw:enhanced-path="M 0 0 L 21600 0 21600 21600 0 21600 0 0 Z N"/></draw:custom-shape><draw:custom-shape draw:style-name="gr72" draw:text-style-name="P118" svg:width="1.9398in" svg:height="0.6504in" svg:x="4.9248in" svg:y="0.5496in"><text:p text:style-name="P117"><text:span text:style-name="T114">As an alternative you should be able</text:span></text:p><text:p text:style-name="P117"><text:span text:style-name="T114"><text:s/></text:span><text:span text:style-name="T114">to specify the ‘hostname’ of the </text:span></text:p><text:p text:style-name="P117"><text:span text:style-name="T114">DCC signalling system computer</text:span></text:p><text:p text:style-name="P117"><text:span text:style-name="T117">(</text:span><text:span text:style-name="T115">raspberrypi</text:span><text:span text:style-name="T117">)</text:span></text:p><draw:enhanced-geometry svg:viewBox="0 0 21600 21600" draw:type="rectangle" draw:enhanced-path="M 0 0 L 21600 0 21600 21600 0 21600 0 0 Z N"/></draw:custom-shape><draw:line draw:style-name="gr54" draw:text-style-name="P116" svg:x1="5.1146in" svg:y1="1.55in" svg:x2="3.8146in" svg:y2="0.85in"><text:p/></draw:line></draw:g></text:p>
      <text:p text:style-name="P24"/>
      <text:p text:style-name="P24"/>
      <text:p text:style-name="P24"/>
      <text:p text:style-name="P24"/>
      <text:p text:style-name="P24"/>
      <text:p text:style-name="P24"/>
      <text:p text:style-name="P24"/>
      <text:p text:style-name="P24"/>
      <text:p text:style-name="P24"/>
      <text:p text:style-name="P20"><text:span text:style-name="T79">You now need to </text:span><text:span text:style-name="T6">Apply</text:span><text:span text:style-name="T79"> the settings before we attempt connecting to the broker (don’t click OK as we want to keed the networking configuration </text:span>window <text:span text:style-name="T79">open until we have completed the setup). </text:span></text:p>
      <text:p text:style-name="P20"><text:span text:style-name="T80">To connect to the broker, either click on the </text:span><text:span text:style-name="T7">Test Broker Connectivity</text:span><text:span text:style-name="T80"> button in the networking configuration </text:span>window <text:span text:style-name="T80">or click on the </text:span><text:span text:style-name="T7">MQTT</text:span><text:span text:style-name="T80"> control on the Main Menubar and select </text:span><text:span text:style-name="T7">Connect </text:span><text:span text:style-name="T80">from the</text:span> <text:span text:style-name="T80">dropdown menu</text:span>. If successful, the Main Menubar <text:span text:style-name="T78">MQTT status</text:span> will show ‘Connected’.</text:p>
      <text:p text:style-name="P22"><text:span text:style-name="T103">If you now select the </text:span><text:span text:style-name="T7">Status</text:span><text:span text:style-name="T80"> tab of</text:span> the<text:span text:style-name="T65"> networking configuration </text:span>window <text:span text:style-name="T103">(on either node)</text:span>, <text:span text:style-name="T103">both nodes should now appear in the list. </text:span><text:span text:style-name="T106">The network configuration is now complete.</text:span></text:p>
      <text:p text:style-name="P18"><draw:g text:anchor-type="paragraph" draw:z-index="9" draw:name="Shape7" draw:style-name="gr50"><draw:frame draw:style-name="gr66" draw:text-style-name="P116" svg:width="2.2378in" svg:height="3.0504in" svg:x="0.1772in" svg:y="0.0319in"><draw:image xlink:href="Pictures/100000000000015B000001D9526A65C08552BD76.png" xlink:type="simple" xlink:show="embed" xlink:actuate="onLoad" draw:mime-type="image/png"><text:p/></draw:image></draw:frame><draw:custom-shape draw:style-name="gr67" draw:text-style-name="P118" svg:width="1.9504in" svg:height="0.6004in" svg:x="3.3272in" svg:y="0.8819in"><text:p text:style-name="P117"><text:span text:style-name="T114">Node1 and Node2 should now</text:span></text:p><text:p text:style-name="P117"><text:span text:style-name="T114">be showing as connected </text:span></text:p><text:p text:style-name="P117"><text:span text:style-name="T114">(on both running instances</text:span></text:p><text:p text:style-name="P117"><text:span text:style-name="T114">of the signalling application)</text:span></text:p><draw:enhanced-geometry svg:viewBox="0 0 21600 21600" draw:type="rectangle" draw:enhanced-path="M 0 0 L 21600 0 21600 21600 0 21600 0 0 Z N"/></draw:custom-shape><draw:line draw:style-name="gr54" draw:text-style-name="P116" svg:x1="3.3272in" svg:y1="1.0819in" svg:x2="2.2772in" svg:y2="0.7319in"><text:p/></draw:line></draw:g></text:p>
      <text:p text:style-name="P18"/>
      <text:p text:style-name="P18"/>
      <text:p text:style-name="P18"/>
      <text:p text:style-name="P18"/>
      <text:p text:style-name="P18"/>
      <text:p text:style-name="P18"/>
      <text:p text:style-name="P18"/>
      <text:p text:style-name="P24"/>
      <text:p text:style-name="P24"/>
      <text:h text:style-name="Heading_20_1" text:outline-level="1"><text:bookmark-start text:name="__RefHeading___Toc1816_3448514483"/><text:soft-page-break/>Signal <text:span text:style-name="T74">State</text:span> and Track <text:span text:style-name="T73">Occupancy</text:span><text:bookmark-end text:name="__RefHeading___Toc1816_3448514483"/></text:h>
      <text:p text:style-name="P37">The remainder of this guide will assume you are already familiar with basic layout configuration after having worked through the application quickstart guide.</text:p>
      <text:p text:style-name="P28">For this example, we need to create two separate layout files, one to run on ‘<text:span text:style-name="T21">Node1</text:span>’ (the main DCC Signalling System) and one to run on ‘<text:span text:style-name="T21">Node</text:span><text:span text:style-name="T25">2</text:span><text:span text:style-name="T77">’ </text:span>(the second computer on our signalling network). </text:p>
      <text:p text:style-name="P28"><text:span text:style-name="T89">Note that the Track Section which ‘joins’ the two layouts needs to be represented on both layouts as each Node needs to be able to change the state (‘</text:span><text:span text:style-name="T29">Node1</text:span><text:span text:style-name="T89">’ will be passing trains into this section when Signal 2 is passed and ‘</text:span><text:span text:style-name="T29">Node2</text:span><text:span text:style-name="T89">’ will be clearing this section when Signal 3 is passed).</text:span></text:p>
      <text:p text:style-name="P26"><draw:g text:anchor-type="paragraph" draw:z-index="4" draw:name="Shape6" draw:style-name="gr50"><draw:frame draw:style-name="gr81" draw:text-style-name="P116" svg:width="6.3996in" svg:height="2.0087in" svg:x="0.0008in" svg:y="2.3783in"><draw:image xlink:href="Pictures/100000000000038C0000024523C6A08DEB278394.png" xlink:type="simple" xlink:show="embed" xlink:actuate="onLoad" draw:mime-type="image/png"><text:p/></draw:image></draw:frame><draw:frame draw:style-name="gr82" draw:text-style-name="P116" svg:width="6.4114in" svg:height="2.0815in" svg:x="0in" svg:y="0.1264in"><draw:image xlink:href="Pictures/100000000000038C000002451A6EE0D82978B0DE.png" xlink:type="simple" xlink:show="embed" xlink:actuate="onLoad" draw:mime-type="image/png"><text:p/></draw:image></draw:frame><draw:custom-shape draw:style-name="gr83" draw:text-style-name="P118" svg:width="1.5551in" svg:height="0.4504in" svg:x="1.3453in" svg:y="1.9264in"><text:p text:style-name="P117"><text:span text:style-name="T114">These represent the same</text:span></text:p><text:p text:style-name="P117"><text:span text:style-name="T114">Physical track section</text:span></text:p><draw:enhanced-geometry svg:viewBox="0 0 21600 21600" draw:type="rectangle" draw:enhanced-path="M 0 0 L 21600 0 21600 21600 0 21600 0 0 Z N"/></draw:custom-shape><draw:line draw:style-name="gr54" draw:text-style-name="P116" svg:x1="2.9in" svg:y1="2.1264in" svg:x2="4.65in" svg:y2="1.6764in"><text:p/></draw:line><draw:line draw:style-name="gr54" draw:text-style-name="P116" svg:x1="1.65in" svg:y1="3.4264in" svg:x2="2.6in" svg:y2="3.7264in"><text:p/></draw:line><draw:line draw:style-name="gr84" draw:text-style-name="P116" svg:x1="1.65in" svg:y1="2.3764in" svg:x2="1.65in" svg:y2="3.4264in"><text:p/></draw:lin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Configuring Publish and Subscribe</text:h>
      <text:p text:style-name="P38">We first <text:span text:style-name="T93">need</text:span> to configure these layouts so that <text:span text:style-name="T73">all signals </text:span>(when cleared) will<text:span text:style-name="T73"> display the correct aspect, </text:span>taking into account the<text:span text:style-name="T73"> displayed aspect of the signal ahead</text:span>. A<text:span text:style-name="T21">s a reminder - this is achieved by specifying the ‘signal ahead’ on the </text:span><text:span text:style-name="T45">Interlocking</text:span><text:span text:style-name="T40"> tab of the signal configuration dialog</text:span>.</text:p>
      <text:p text:style-name="P38">For Signal 2 (on ‘<text:span text:style-name="T21">Node1</text:span>’) the ‘signal ahead’ will be Signal 3 (on ‘<text:span text:style-name="T21">Node2</text:span>’). This means that:</text:p>
      <text:list xml:id="list3650324583" text:style-name="L3">
        <text:list-item>
          <text:p text:style-name="P82">‘<text:span text:style-name="T21">Node2</text:span>’ needs to ‘publish’ Signal 3 to <text:span text:style-name="T93">the broker</text:span></text:p>
        </text:list-item>
        <text:list-item>
          <text:p text:style-name="P93">‘<text:span text:style-name="T21">Node1</text:span>’ needs to ‘subscribe’ to Signal 3 from ‘<text:span text:style-name="T21">Node</text:span><text:span text:style-name="T26">2</text:span><text:span text:style-name="T81">’</text:span></text:p>
        </text:list-item>
      </text:list>
      <text:p text:style-name="P29">We <text:span text:style-name="T89">also want</text:span> to seamlessly pass trains from track section to track section as each signal is passed. <text:s/><text:span text:style-name="T89">A</text:span><text:span text:style-name="T29">s a reminder - this is achieved by specifying the ‘</text:span><text:span text:style-name="T30">section behind</text:span><text:span text:style-name="T29">’ </text:span><text:span text:style-name="T30">and ‘’section ahead’ </text:span><text:span text:style-name="T29">on the </text:span><text:span text:style-name="T46">Automation</text:span><text:span text:style-name="T42"> tab of the signal configuration dialog.</text:span></text:p>
      <text:p text:style-name="P41">As Section 3 (on ‘<text:span text:style-name="T21">Node1</text:span>’) and Section 4 (on ‘<text:span text:style-name="T21">Node2</text:span>’) represent the same physical Track Section, we need to configure these to ‘mirror’ each other – so when the state of Section 3 is changed (by ‘<text:span text:style-name="T39">N</text:span><text:span text:style-name="T21">ode1</text:span>’ the changes are also reflected in Section 3 (on ‘<text:span text:style-name="T21">Node2</text:span>’<text:span text:style-name="T103">)</text:span> and vice versa. </text:p>
      <text:p text:style-name="P41"><text:soft-page-break/>This means that:</text:p>
      <text:list xml:id="list2869886713" text:style-name="L4">
        <text:list-item>
          <text:p text:style-name="P83">‘<text:span text:style-name="T21">Node</text:span><text:span text:style-name="T27">1</text:span><text:span text:style-name="T75">’</text:span> needs to ‘publish’ <text:span text:style-name="T75">Section 3</text:span> to <text:span text:style-name="T93">the broker</text:span></text:p>
        </text:list-item>
        <text:list-item>
          <text:p text:style-name="P84"><text:span text:style-name="T84">‘</text:span><text:span text:style-name="T43">Node</text:span><text:span text:style-name="T41">2</text:span><text:span text:style-name="T85">’ </text:span><text:span text:style-name="T84">needs to ‘publish’ </text:span><text:span text:style-name="T85">Section </text:span><text:span text:style-name="T86">4</text:span><text:span text:style-name="T84"> to </text:span><text:span text:style-name="T87">the broker</text:span></text:p>
        </text:list-item>
        <text:list-item>
          <text:p text:style-name="P84">‘<text:span text:style-name="T21">Node1</text:span>’ needs to ‘subscribe’ to Section <text:span text:style-name="T90">4</text:span> <text:span text:style-name="T90">from</text:span> ‘<text:span text:style-name="T21">Node2</text:span>’</text:p>
        </text:list-item>
        <text:list-item>
          <text:p text:style-name="P83">‘<text:span text:style-name="T21">Node</text:span><text:span text:style-name="T27">2</text:span><text:span text:style-name="T75">’</text:span> needs to ‘subscribe’ <text:span text:style-name="T82">to Section 3 from</text:span> ‘<text:span text:style-name="T21">Node1</text:span>’</text:p>
          <text:p text:style-name="P85"/>
        </text:list-item>
      </text:list>
      <text:p text:style-name="P31"><text:span text:style-name="T76">The ‘publishing’ and ‘subscribing’ of layout items is configured via the ‘</text:span><text:span text:style-name="T5">publish</text:span><text:span text:style-name="T76">’ and ‘</text:span><text:span text:style-name="T5">subscribe</text:span><text:span text:style-name="T76">’ tabs of the networking configuration window (</text:span><text:span text:style-name="T3">Settings =&gt; MQTT</text:span><text:span text:style-name="T65">) .</text:span></text:p>
      <text:p text:style-name="P43">Publishing is straightforward in that we just <text:span text:style-name="T93">need to specify</text:span> the IDs of the items we want to make available to other nodes. However, subscribing is slightly <text:span text:style-name="T103">different</text:span> as we also also need to specify the source node for each item. <text:s/></text:p>
      <text:p text:style-name="P39"><text:span text:style-name="T76">Remote item IDs are therefore specified as <text:s/>‘</text:span><text:span text:style-name="T5">nodeID-itemID</text:span><text:span text:style-name="T76">’ (note the hyphen used as a seperator), so for example, a subscription to Signal 1 from ‘</text:span><text:span text:style-name="T28">Node2</text:span><text:span text:style-name="T76">’ would be specified as ‘</text:span><text:span text:style-name="T5">Node2-1</text:span><text:span text:style-name="T76">”</text:span></text:p>
      <text:h text:style-name="Heading_20_3" text:outline-level="3">Node1 (DCC Signalling system) <text:span text:style-name="T93">publish and subscribe</text:span></text:h>
      <text:p text:style-name="P34"><draw:g text:anchor-type="paragraph" draw:z-index="16" draw:name="Shape8" draw:style-name="gr1"><draw:frame draw:style-name="gr36" draw:text-style-name="P116" svg:width="2.2114in" svg:height="2.7504in" svg:x="4.3016in" svg:y="0.0835in"><draw:image xlink:href="Pictures/1000000000000165000001BCD7AB2848EF7FA311.png" xlink:type="simple" xlink:show="embed" xlink:actuate="onLoad" draw:mime-type="image/png"><text:p/></draw:image></draw:frame><draw:frame draw:style-name="gr37" draw:text-style-name="P116" svg:width="2.2516in" svg:height="2.8004in" svg:x="0in" svg:y="0.0835in"><draw:image xlink:href="Pictures/1000000000000165000001BC723EECD6F4348E50.png" xlink:type="simple" xlink:show="embed" xlink:actuate="onLoad" draw:mime-type="image/png"><text:p/></draw:image></draw:frame><draw:custom-shape draw:style-name="gr38" draw:text-style-name="P118" svg:width="1.3004in" svg:height="0.5004in" svg:x="2.5516in" svg:y="1.1835in"><text:p text:style-name="P117"><text:span text:style-name="T114">‘</text:span><text:span text:style-name="T114">Node1’ is subscribed to:</text:span></text:p><text:p text:style-name="P117"><text:span text:style-name="T114">Signal 3 from ‘Node2’</text:span></text:p><text:p text:style-name="P117"><text:span text:style-name="T114">Section 4 from ‘Node2’</text:span></text:p><draw:enhanced-geometry svg:viewBox="0 0 21600 21600" draw:type="rectangle" draw:enhanced-path="M 0 0 L 21600 0 21600 21600 0 21600 0 0 Z N"/></draw:custom-shape><draw:custom-shape draw:style-name="gr39" draw:text-style-name="P118" svg:width="1.1504in" svg:height="0.5004in" svg:x="2.4362in" svg:y="0.4335in"><text:p text:style-name="P117"><text:span text:style-name="T114"><text:s/>‘</text:span><text:span text:style-name="T114">Node1’ is set to</text:span></text:p><text:p text:style-name="P117"><text:span text:style-name="T114">publish Section 3</text:span></text:p><text:p text:style-name="P117"><text:span text:style-name="T114">To other nodes</text:span></text:p><draw:enhanced-geometry svg:viewBox="0 0 21600 21600" draw:type="rectangle" draw:enhanced-path="M 0 0 L 21600 0 21600 21600 0 21600 0 0 Z N"/></draw:custom-shape><draw:line draw:style-name="gr40" draw:text-style-name="P116" svg:x1="2.4362in" svg:y1="0.7335in" svg:x2="0.2512in" svg:y2="1.7835in"><text:p/></draw:line><draw:line draw:style-name="gr41" draw:text-style-name="P116" svg:x1="3.8512in" svg:y1="1.4835in" svg:x2="4.3012in" svg:y2="1.5835in"><text:p/></draw:line><draw:line draw:style-name="gr42" draw:text-style-name="P116" svg:x1="3.8512in" svg:y1="1.2835in" svg:x2="4.3012in" svg:y2="1.2835in"><text:p/></draw:line></draw:g></text:p>
      <text:p text:style-name="P34"/>
      <text:p text:style-name="P30"/>
      <text:p text:style-name="P27"/>
      <text:p text:style-name="P26"/>
      <text:p text:style-name="P26"/>
      <text:p text:style-name="P26"/>
      <text:p text:style-name="P26"/>
      <text:p text:style-name="P26"/>
      <text:h text:style-name="P64" text:outline-level="3">Node<text:span text:style-name="T72">2</text:span> <text:span text:style-name="T66">(Secondary Node) publish and subscribe</text:span></text:h>
      <text:p text:style-name="P26"><draw:g text:anchor-type="paragraph" draw:z-index="15" draw:name="Shape9" draw:style-name="gr1"><draw:frame draw:style-name="gr43" draw:text-style-name="P116" svg:width="2.2394in" svg:height="2.785in" svg:x="4.322in" svg:y="0.0835in"><draw:image xlink:href="Pictures/1000000000000165000001BC1F1B1880A255E8A2.png" xlink:type="simple" xlink:show="embed" xlink:actuate="onLoad" draw:mime-type="image/png"><text:p/></draw:image></draw:frame><draw:frame draw:style-name="gr44" draw:text-style-name="P116" svg:width="2.2114in" svg:height="2.7504in" svg:x="0in" svg:y="0.1181in"><draw:image xlink:href="Pictures/1000000000000165000001BC64819848410C8AEB.png" xlink:type="simple" xlink:show="embed" xlink:actuate="onLoad" draw:mime-type="image/png"><text:p/></draw:image></draw:frame><draw:custom-shape draw:style-name="gr45" draw:text-style-name="P118" svg:width="1.3004in" svg:height="0.5004in" svg:x="2.5819in" svg:y="1.2181in"><text:p text:style-name="P117"><text:span text:style-name="T114">‘</text:span><text:span text:style-name="T114">Node2’ is subscribed to:</text:span></text:p><text:p text:style-name="P117"><text:span text:style-name="T114">Section 3 from ‘Node1’</text:span></text:p><draw:enhanced-geometry svg:viewBox="0 0 21600 21600" draw:type="rectangle" draw:enhanced-path="M 0 0 L 21600 0 21600 21600 0 21600 0 0 Z N"/></draw:custom-shape><draw:custom-shape draw:style-name="gr46" draw:text-style-name="P118" svg:width="1.1504in" svg:height="0.6504in" svg:x="2.5457in" svg:y="0.3681in"><text:p text:style-name="P117"><text:span text:style-name="T114"><text:s/>‘</text:span><text:span text:style-name="T114">Node2’ is set to</text:span></text:p><text:p text:style-name="P117"><text:span text:style-name="T114">Publish Signal 3</text:span></text:p><text:p text:style-name="P117"><text:span text:style-name="T114">and Section 4</text:span></text:p><text:p text:style-name="P117"><text:span text:style-name="T114">To other nodes</text:span></text:p><draw:enhanced-geometry svg:viewBox="0 0 21600 21600" draw:type="rectangle" draw:enhanced-path="M 0 0 L 21600 0 21600 21600 0 21600 0 0 Z N"/></draw:custom-shape><draw:line draw:style-name="gr47" draw:text-style-name="P116" svg:x1="2.561in" svg:y1="0.8681in" svg:x2="0.261in" svg:y2="1.7681in"><text:p/></draw:line><draw:line draw:style-name="gr48" draw:text-style-name="P116" svg:x1="3.8823in" svg:y1="1.4181in" svg:x2="4.311in" svg:y2="1.6181in"><text:p/></draw:line><draw:line draw:style-name="gr49" draw:text-style-name="P116" svg:x1="2.561in" svg:y1="0.6181in" svg:x2="0.261in" svg:y2="1.4681in"><text:p/></draw:line></draw:g></text:p>
      <text:p text:style-name="P26"/>
      <text:p text:style-name="P26"/>
      <text:p text:style-name="P26"/>
      <text:p text:style-name="P26"/>
      <text:p text:style-name="P26"/>
      <text:p text:style-name="P26"/>
      <text:p text:style-name="P26"/>
      <text:p text:style-name="P26"/>
      <text:p text:style-name="P26"/>
      <text:h text:style-name="P75" text:outline-level="2"><text:soft-page-break/>Configuring <text:span text:style-name="T91">the layouts</text:span></text:h>
      <text:p text:style-name="P40">Once the <text:span text:style-name="T93">publish and subscribe</text:span> configuration<text:span text:style-name="T103">s</text:span> <text:span text:style-name="T103">have</text:span> been <text:span text:style-name="T93">applied</text:span> <text:span text:style-name="T93">to</text:span> both nodes, the ‘subscribed’ Signals and Track Sections can then be used as part of the <text:span text:style-name="T93">normal </text:span>layout configuration.</text:p>
      <text:p text:style-name="P40">For ‘<text:span text:style-name="T21">Node1</text:span>’ Signal 2, <text:s/>the ‘signal ahead’ can now be specified as ‘<text:span text:style-name="T1">Node2-3</text:span>’:</text:p>
      <text:p text:style-name="P40"><draw:g text:anchor-type="paragraph" draw:z-index="10" draw:name="Shape10" draw:style-name="gr50"><draw:frame draw:style-name="gr64" draw:text-style-name="P116" svg:width="4.1453in" svg:height="1.4496in" svg:x="0in" svg:y="0.1264in"><draw:image xlink:href="Pictures/10000000000002B9000002B2ECC8BFF1B9A18218.png" xlink:type="simple" xlink:show="embed" xlink:actuate="onLoad" draw:mime-type="image/png"><text:p/></draw:image></draw:frame><draw:custom-shape draw:style-name="gr65" draw:text-style-name="P118" svg:width="1.4016in" svg:height="0.5012in" svg:x="4.6535in" svg:y="0.5264in"><text:p text:style-name="P117"><text:span text:style-name="T114"><text:s/></text:span><text:span text:style-name="T114">Remote Signal specified </text:span></text:p><text:p text:style-name="P117"><text:span text:style-name="T114">for the ‘signal ahead’</text:span></text:p><text:p text:style-name="P117"><text:span text:style-name="T114">(Signal 3 from Node2)</text:span></text:p><draw:enhanced-geometry svg:viewBox="0 0 21600 21600" draw:type="rectangle" draw:enhanced-path="M 0 0 L 21600 0 21600 21600 0 21600 0 0 Z N"/></draw:custom-shape><draw:line draw:style-name="gr54" draw:text-style-name="P116" svg:x1="4.6539in" svg:y1="0.7264in" svg:x2="3.7531in" svg:y2="0.6264in"><text:p/></draw:line></draw:g></text:p>
      <text:p text:style-name="P35">Configuring the layouts</text:p>
      <text:p text:style-name="P35"/>
      <text:p text:style-name="P35"/>
      <text:p text:style-name="P36"/>
      <text:p text:style-name="Standard"/>
      <text:p text:style-name="P40"><text:span text:style-name="T84">Section 3 (on ‘</text:span><text:span text:style-name="T43">Node1</text:span><text:span text:style-name="T84">’) </text:span><text:span text:style-name="T83">can now be configured to mirror ‘</text:span><text:span text:style-name="T88">Node2-4</text:span><text:span text:style-name="T83">’ and similarly</text:span><text:span text:style-name="T84"> Section 4 (on ‘</text:span><text:span text:style-name="T43">Node2</text:span><text:span text:style-name="T84">’) <text:s/></text:span><text:span text:style-name="T83">can be configured to mirror ‘</text:span><text:span text:style-name="T88">Node1-3</text:span><text:span text:style-name="T83">’:</text:span></text:p>
      <text:p text:style-name="P42"><draw:g text:anchor-type="paragraph" draw:z-index="11" draw:name="Shape11" draw:style-name="gr50"><draw:frame draw:style-name="gr61" draw:text-style-name="P116" svg:width="2.0067in" svg:height="1.6335in" svg:x="0.0008in" svg:y="0.1425in"><draw:image xlink:href="Pictures/1000000000000150000001A017CBB3A60A8FB5A8.png" xlink:type="simple" xlink:show="embed" xlink:actuate="onLoad" draw:mime-type="image/png"><text:p/></draw:image></draw:frame><draw:frame draw:style-name="gr62" draw:text-style-name="P116" svg:width="2.0004in" svg:height="1.5996in" svg:x="4.5571in" svg:y="0.1264in"><draw:image xlink:href="Pictures/10000000000001500000019F468282747EA041F2.png" xlink:type="simple" xlink:show="embed" xlink:actuate="onLoad" draw:mime-type="image/png"><text:p/></draw:image></draw:frame><draw:custom-shape draw:style-name="gr63" draw:text-style-name="P118" svg:width="1.6004in" svg:height="0.5004in" svg:x="2.4071in" svg:y="1.1256in"><text:p text:style-name="P117"><text:span text:style-name="T114">Track Section 4 (on ‘Node2’)</text:span></text:p><text:p text:style-name="P117"><text:span text:style-name="T114">Is configured to ‘mirror’</text:span></text:p><text:p text:style-name="P117"><text:span text:style-name="T114">Track Section 3 (on ‘Node1’)</text:span></text:p><draw:enhanced-geometry svg:viewBox="0 0 21600 21600" draw:mirror-vertical="false" draw:mirror-horizontal="false" draw:type="rectangle" draw:enhanced-path="M 0 0 L 21600 0 21600 21600 0 21600 0 0 Z N"/></draw:custom-shape><draw:custom-shape draw:style-name="gr63" draw:text-style-name="P118" svg:width="1.6004in" svg:height="0.5004in" svg:x="2.4071in" svg:y="0.2256in"><text:p text:style-name="P117"><text:span text:style-name="T114">Track Section 3 (on ‘Node1’)</text:span></text:p><text:p text:style-name="P117"><text:span text:style-name="T114">Is configured to ‘mirror’</text:span></text:p><text:p text:style-name="P117"><text:span text:style-name="T114">Track Section 4 (on ‘Node2’)</text:span></text:p><draw:enhanced-geometry svg:viewBox="0 0 21600 21600" draw:mirror-vertical="false" draw:mirror-horizontal="false" draw:type="rectangle" draw:enhanced-path="M 0 0 L 21600 0 21600 21600 0 21600 0 0 Z N"/></draw:custom-shape><draw:line draw:style-name="gr54" draw:text-style-name="P116" svg:x1="4.0067in" svg:y1="1.376in" svg:x2="4.7567in" svg:y2="1.576in"><text:p/></draw:line><draw:line draw:style-name="gr54" draw:text-style-name="P116" svg:x1="2.4067in" svg:y1="0.526in" svg:x2="0.6567in" svg:y2="1.626in"><text:p/></draw:line></draw:g></text:p>
      <text:p text:style-name="P42"/>
      <text:p text:style-name="P42"/>
      <text:p text:style-name="P42"/>
      <text:p text:style-name="P42"/>
      <text:p text:style-name="P42"/>
      <text:p text:style-name="P39"/>
      <text:p text:style-name="P39"><text:span text:style-name="T91">To complete the </text:span><text:span text:style-name="T93">networked </text:span><text:span text:style-name="T91">layout configuration:</text:span></text:p>
      <text:list xml:id="list2834913457" text:style-name="L5">
        <text:list-item>
          <text:p text:style-name="P86">Configure all other signals with details of the ‘local’ signal ahead.</text:p>
        </text:list-item>
        <text:list-item>
          <text:p text:style-name="P86">Configure Signal 4 as a Timed Signal (this will be the ‘exit’ signal from our layout).</text:p>
        </text:list-item>
        <text:list-item>
          <text:p text:style-name="P86">Configure all signals (except Signal 4) to be Overridden if the section ahead is occupied.</text:p>
        </text:list-item>
        <text:list-item>
          <text:p text:style-name="P86">Configure all signals with details of the ‘local’ section ahead and section behind – we don’t need to worry about ‘remote’ track sections for <text:span text:style-name="T103">the signals’</text:span> track occupancy configuration as this will be handled by our ‘mirrored sections’ configuration.</text:p>
        </text:list-item>
      </text:list>
      <text:h text:style-name="P75" text:outline-level="2"><text:span text:style-name="T91">Testing</text:span> <text:span text:style-name="T91">the layouts</text:span></text:h>
      <text:p text:style-name="P62">To test the configuration, ensure both nodes are connected to the broker and <text:span text:style-name="T93">all</text:span> signals <text:span text:style-name="T93">are cleared.</text:span></text:p>
      <text:p text:style-name="P62"/>
      <text:p text:style-name="P62"><text:span text:style-name="T93">If you click on Section 3 (on ‘</text:span><text:span text:style-name="T31">Node1</text:span><text:span text:style-name="T93">’) to change it to OCCUPIED, Section 4 (on ‘</text:span><text:span text:style-name="T31">Node2</text:span><text:span text:style-name="T93">’) should also change to OCCUPIED. Similarly, if you click on Section 4 (on ‘</text:span><text:span text:style-name="T31">Node2</text:span><text:span text:style-name="T93">’) to change it to CLEAR, Section 3 (on ‘</text:span><text:span text:style-name="T31">Node1</text:span><text:span text:style-name="T93">’) should also change to CLEAR. </text:span></text:p>
      <text:p text:style-name="P62"/>
      <text:p text:style-name="P63"><text:span text:style-name="T93">Trains</text:span> can <text:span text:style-name="T93">also</text:span> be ‘passed through’ the layout by setting Section 1 on ‘<text:span text:style-name="T21">Node1</text:span>’ to OCCUPIED and then simulating ‘signal passed’ events for each signal along the route in turn. The train should be seamlessly passed from one <text:span text:style-name="T103">node</text:span> to the other (in terms of track occupancy), with all signals <text:span text:style-name="T103">(on both nodes)</text:span> displaying the correct aspects in relation to the signal ahead.</text:p>
      <text:p text:style-name="P61"/>
      <text:h text:style-name="P71" text:outline-level="1"><text:bookmark-start text:name="__RefHeading___Toc2227_427111604"/><text:soft-page-break/>DCC <text:span text:style-name="T109">Accessory </text:span>Command<text:span text:style-name="T110">s</text:span><text:bookmark-end text:name="__RefHeading___Toc2227_427111604"/></text:h>
      <text:p text:style-name="P106">If you only have a single DCC Signalling system providing the DCC bus interface to the layout, then we also need to configure the network such that all <text:span text:style-name="T103">other nodes send their </text:span>DCC <text:span text:style-name="T109">accessory </text:span>commands to <text:span text:style-name="T109">the </text:span><text:span text:style-name="T110">main </text:span><text:span text:style-name="T109">signalling system node</text:span> <text:span text:style-name="T109">and then </text:span>out to the layout.</text:p>
      <text:p text:style-name="P106">This configuration is straightforward, in that we just need to configure ‘<text:span text:style-name="T21">Node2</text:span>’ to publish it’s DCC command feed to the <text:span text:style-name="T103">broker</text:span> and configure ‘<text:span text:style-name="T21">Node1</text:span>’ to subscribe to this command feed:</text:p>
      <text:p text:style-name="P107"><draw:g text:anchor-type="paragraph" draw:z-index="18" draw:name="Shape12" draw:style-name="gr1"><draw:frame draw:style-name="gr24" draw:text-style-name="P116" svg:width="2.2067in" svg:height="2.7441in" svg:x="0.0008in" svg:y="0.1264in"><draw:image xlink:href="Pictures/1000000000000165000001BC8CC6E98C165941F1.png" xlink:type="simple" xlink:show="embed" xlink:actuate="onLoad" draw:mime-type="image/png"><text:p/></draw:image></draw:frame><draw:frame draw:style-name="gr25" draw:text-style-name="P116" svg:width="2.1913in" svg:height="2.7252in" svg:x="4.7008in" svg:y="0.1264in"><draw:image xlink:href="Pictures/1000000000000165000001BC24DF4F2BD4F2BB54.png" xlink:type="simple" xlink:show="embed" xlink:actuate="onLoad" draw:mime-type="image/png"><text:p/></draw:image></draw:frame><draw:custom-shape draw:style-name="gr26" draw:text-style-name="P118" svg:width="1.6004in" svg:height="0.5004in" svg:x="2.6508in" svg:y="0.3764in"><text:p text:style-name="P117"><text:span text:style-name="T114">‘</text:span><text:span text:style-name="T114">Node2’ is now configured</text:span></text:p><text:p text:style-name="P117"><text:span text:style-name="T114">to publish the DCC </text:span></text:p><text:p text:style-name="P117"><text:span text:style-name="T114">Command feed to ‘Node1’</text:span></text:p><draw:enhanced-geometry svg:viewBox="0 0 21600 21600" draw:mirror-vertical="false" draw:mirror-horizontal="false" draw:type="rectangle" draw:enhanced-path="M 0 0 L 21600 0 21600 21600 0 21600 0 0 Z N"/></draw:custom-shape><draw:custom-shape draw:style-name="gr27" draw:text-style-name="P118" svg:width="1.6004in" svg:height="0.5004in" svg:x="2.5008in" svg:y="1.1764in"><text:p text:style-name="P117"><text:span text:style-name="T114">‘</text:span><text:span text:style-name="T114">Node1’ is now subscribed</text:span></text:p><text:p text:style-name="P117"><text:span text:style-name="T114">to the DCC Command</text:span></text:p><text:p text:style-name="P117"><text:span text:style-name="T114">Feed from ‘Node2’</text:span></text:p><draw:enhanced-geometry svg:viewBox="0 0 21600 21600" draw:mirror-vertical="false" draw:mirror-horizontal="false" draw:type="rectangle" draw:enhanced-path="M 0 0 L 21600 0 21600 21600 0 21600 0 0 Z N"/></draw:custom-shape><draw:line draw:style-name="gr28" draw:text-style-name="P116" svg:x1="2.5008in" svg:y1="1.3764in" svg:x2="0.5008in" svg:y2="0.6764in"><text:p/></draw:line><draw:line draw:style-name="gr29" draw:text-style-name="P116" svg:x1="4.2508in" svg:y1="0.6264in" svg:x2="4.7008in" svg:y2="0.6764in"><text:p/></draw:line></draw:g></text:p>
      <text:p text:style-name="P107"/>
      <text:p text:style-name="P107"/>
      <text:p text:style-name="P107"/>
      <text:p text:style-name="P108"/>
      <text:p text:style-name="P108"/>
      <text:p text:style-name="P108"/>
      <text:p text:style-name="P108"/>
      <text:p text:style-name="P108"/>
      <text:p text:style-name="P108"/>
      <text:p text:style-name="Standard"><text:bookmark-start text:name="__RefHeading___Toc1126_99759055"/>Now the Signals on ‘Node2’ can be configured with the the appropriate DCC commands to change the aspects. These commands will now be sent via the broker to ‘Node1’ which will then forward them to the SPROG DCC programmer/controller and then out to the layout via the DCC bus.<text:bookmark-end text:name="__RefHeading___Toc1126_99759055"/></text:p>
      <text:p text:style-name="Standard"/>
      <text:p text:style-name="P89">Note that if you configure the main DCC Signalling system to publish its DCC Accessory command feed <text:s/>then commands will only be sent out to the network and <text:span text:style-name="T20">not</text:span> to the local Sprog interface.</text:p>
      <text:h text:style-name="P70" text:outline-level="1"><text:span text:style-name="T54"/></text:h>
      <text:h text:style-name="P74" text:outline-level="1"><text:bookmark-start text:name="__RefHeading___Toc2229_427111604"/><text:span text:style-name="T53">GPIO</text:span> Sensors<text:bookmark-end text:name="__RefHeading___Toc2229_427111604"/></text:h>
      <text:p text:style-name="P47"><text:span text:style-name="T95">We</text:span> might also want to use the <text:span text:style-name="T111">one</text:span> system node to provide the interface for all <text:span text:style-name="T111">track sensors out on the layout</text:span>. To achieve this, the configuration follows the same pattern <text:span text:style-name="T104">as for signals and track sections </text:span>in that ‘<text:span text:style-name="T21">Node1</text:span>’ will need to publish the appropriate <text:span text:style-name="T109">GPIO</text:span> sensors to the broker and ‘<text:span text:style-name="T21">Node2</text:span>’ will need to subscribe to those <text:span text:style-name="T109">GPIO </text:span>sensors from ‘<text:span text:style-name="T21">Node1</text:span>’:</text:p>
      <text:p text:style-name="P46"><draw:g text:anchor-type="paragraph" draw:z-index="17" draw:name="Shape21" draw:style-name="gr1"><draw:frame draw:style-name="gr30" draw:text-style-name="P116" svg:width="2.2516in" svg:height="2.8004in" svg:x="-0.1791in" svg:y="0.1256in"><draw:image xlink:href="Pictures/1000000000000165000001BC50BDB42C80A14196.png" xlink:type="simple" xlink:show="embed" xlink:actuate="onLoad" draw:mime-type="image/png"><text:p/></draw:image></draw:frame><draw:custom-shape draw:style-name="gr31" draw:text-style-name="P118" svg:width="1.6004in" svg:height="0.5004in" svg:x="2.3709in" svg:y="1.1756in"><text:p text:style-name="P117"><text:span text:style-name="T114">‘</text:span><text:span text:style-name="T114">Node2’ is now subscribed to</text:span></text:p><text:p text:style-name="P117"><text:span text:style-name="T114">GPIO Sensors 3 and 4</text:span></text:p><text:p text:style-name="P117"><text:span text:style-name="T114">From ‘Node1’</text:span></text:p><draw:enhanced-geometry svg:viewBox="0 0 21600 21600" draw:mirror-vertical="false" draw:mirror-horizontal="false" draw:type="rectangle" draw:enhanced-path="M 0 0 L 21600 0 21600 21600 0 21600 0 0 Z N"/></draw:custom-shape><draw:custom-shape draw:style-name="gr32" draw:text-style-name="P118" svg:width="1.6004in" svg:height="0.5004in" svg:x="2.4709in" svg:y="1.9756in"><text:p text:style-name="P117"><text:span text:style-name="T114">‘</text:span><text:span text:style-name="T114">Node1’ is now publishing</text:span></text:p><text:p text:style-name="P117"><text:span text:style-name="T114">GPIO Sensors 3 and 4</text:span></text:p><draw:enhanced-geometry svg:viewBox="0 0 21600 21600" draw:mirror-vertical="false" draw:mirror-horizontal="false" draw:type="rectangle" draw:enhanced-path="M 0 0 L 21600 0 21600 21600 0 21600 0 0 Z N"/></draw:custom-shape><draw:line draw:style-name="gr33" draw:text-style-name="P116" svg:x1="2.4709in" svg:y1="2.1756in" svg:x2="0.3209in" svg:y2="2.4756in"><text:p/></draw:line><draw:line draw:style-name="gr34" draw:text-style-name="P116" svg:x1="3.9709in" svg:y1="1.5756in" svg:x2="4.5209in" svg:y2="2.2256in"><text:p/></draw:line><draw:frame draw:style-name="gr35" draw:text-style-name="P116" svg:width="2.2504in" svg:height="2.7988in" svg:x="4.5209in" svg:y="0.1272in"><draw:image xlink:href="Pictures/1000000000000165000001BC8FC56F6F70746F58.png" xlink:type="simple" xlink:show="embed" xlink:actuate="onLoad" draw:mime-type="image/png"><text:p/></draw:image></draw:frame></draw:g></text:p>
      <text:p text:style-name="P26"/>
      <text:p text:style-name="P26"/>
      <text:p text:style-name="P26"/>
      <text:p text:style-name="P26"/>
      <text:p text:style-name="P26"/>
      <text:p text:style-name="P25"/>
      <text:p text:style-name="P24"/>
      <text:p text:style-name="P24"/>
      <text:p text:style-name="P24"/>
      <text:p text:style-name="P48">The subscribed <text:span text:style-name="T110">GPIO</text:span> sensors <text:span text:style-name="T94">(fron ‘</text:span><text:span text:style-name="T32">Node1</text:span><text:span text:style-name="T94">’)</text:span> can now be used in the configuration of the ‘<text:span text:style-name="T21">Node2</text:span>’ layout to generate ‘signal passed’ events:</text:p>
      <text:p text:style-name="P48"><draw:g text:anchor-type="paragraph" draw:z-index="12" draw:name="Shape14" draw:style-name="gr50"><draw:frame draw:style-name="gr58" draw:text-style-name="P116" svg:width="4.1217in" svg:height="1.5803in" svg:x="0.0291in" svg:y="1.9457in"><draw:image xlink:href="Pictures/10000000000002B9000002B21F3562AE5525B997.png" xlink:type="simple" xlink:show="embed" xlink:actuate="onLoad" draw:mime-type="image/png"><text:p/></draw:image></draw:frame><draw:frame draw:style-name="gr59" draw:text-style-name="P116" svg:width="4.1421in" svg:height="1.5996in" svg:x="0.0008in" svg:y="0.1256in"><draw:image xlink:href="Pictures/10000000000002B9000002B26B9CAE3890A650E2.png" xlink:type="simple" xlink:show="embed" xlink:actuate="onLoad" draw:mime-type="image/png"><text:p/></draw:image></draw:frame><draw:custom-shape draw:style-name="gr60" draw:text-style-name="P118" svg:width="1.7177in" svg:height="0.5504in" svg:x="4.4008in" svg:y="1.5756in"><text:p text:style-name="P117"><text:span text:style-name="T114">Remote Track Sensors </text:span></text:p><text:p text:style-name="P117"><text:span text:style-name="T114">(from ‘Node1’) used in the</text:span></text:p><text:p text:style-name="P117"><text:span text:style-name="T114"><text:s/>‘</text:span><text:span text:style-name="T114">Node2’ layout configuration</text:span></text:p><draw:enhanced-geometry svg:viewBox="0 0 21600 21600" draw:mirror-vertical="false" draw:mirror-horizontal="false" draw:type="rectangle" draw:enhanced-path="M 0 0 L 21600 0 21600 21600 0 21600 0 0 Z N"/></draw:custom-shape><draw:line draw:style-name="gr54" draw:text-style-name="P116" svg:x1="4.4008in" svg:y1="1.7256in" svg:x2="3.1508in" svg:y2="1.4256in"><text:p/></draw:line><draw:line draw:style-name="gr54" draw:text-style-name="P116" svg:x1="4.4008in" svg:y1="2.0256in" svg:x2="3.1508in" svg:y2="3.1756in"><text:p/></draw:line></draw:g></text:p>
      <text:p text:style-name="P24"/>
      <text:p text:style-name="P24"/>
      <text:p text:style-name="P24"/>
      <text:p text:style-name="P24"/>
      <text:p text:style-name="P24"/>
      <text:p text:style-name="P24"/>
      <text:p text:style-name="P24"/>
      <text:p text:style-name="Standard"/>
      <text:p text:style-name="Standard"/>
      <text:p text:style-name="Standard"/>
      <text:p text:style-name="Standard"/>
      <text:p text:style-name="Standard"/>
      <text:p text:style-name="Standard"/>
      <text:p text:style-name="Standard"/>
      <text:p text:style-name="P110"><text:s/>The ability to use networked <text:span text:style-name="T110">GPIO</text:span> Sensors is particularly useful as this enables additional <text:span text:style-name="T104">r</text:span>emote <text:span text:style-name="T104">n</text:span>odes (running without monitor, keyboard or mouse) to be installed around the layout, providing additional inputs and simplifying the wiring to the Main DCC Signalling system.<text:span text:style-name="T56"> </text:span></text:p>
      <text:h text:style-name="P72" text:outline-level="1"><text:bookmark-start text:name="__RefHeading___Toc1128_99759055"/><text:soft-page-break/>Block Instruments<text:bookmark-end text:name="__RefHeading___Toc1128_99759055"/></text:h>
      <text:p text:style-name="P2">The DCC Signalling application also allows Block Instruments to be networked together. This enables layouts to be split into individual ‘block sections’ each being controlled by its own ‘signal box’. Trains can then be ‘offered’ and ‘accepted’ between signal boxes, with ‘bell codes’ being used for communication between <text:span text:style-name="T104">them</text:span>.</text:p>
      <text:p text:style-name="P2">For this example, we’re going to add a second layout to the example used in the sections above, comprising two block sections (one hosted on each node), with a single line joining the two: </text:p>
      <text:h text:style-name="P69" text:outline-level="1"><draw:g text:anchor-type="paragraph" draw:z-index="13" draw:name="Shape15" draw:style-name="gr50"><draw:frame draw:style-name="gr55" draw:text-style-name="P116" svg:width="4.6469in" svg:height="1.4996in" svg:x="0in" svg:y="0.2925in"><draw:image xlink:href="Pictures/10000000000003350000024548C0FCDCFA4B6DBF.png" xlink:type="simple" xlink:show="embed" xlink:actuate="onLoad" draw:mime-type="image/png"><text:p/></draw:image></draw:frame><draw:frame draw:style-name="gr56" draw:text-style-name="P116" svg:width="4.6504in" svg:height="1.5169in" svg:x="1.5in" svg:y="2.176in"><draw:image xlink:href="Pictures/100000000000033500000245D58202A4BE641F90.png" xlink:type="simple" xlink:show="embed" xlink:actuate="onLoad" draw:mime-type="image/png"><text:p/></draw:image></draw:frame><draw:custom-shape draw:style-name="gr57" draw:text-style-name="P118" svg:width="1.0004in" svg:height="0.3004in" svg:x="5.0465in" svg:y="0.8925in"><text:p text:style-name="P117"><text:span text:style-name="T114">Instrument 1</text:span></text:p><draw:enhanced-geometry svg:viewBox="0 0 21600 21600" draw:mirror-vertical="false" draw:mirror-horizontal="false" draw:type="rectangle" draw:enhanced-path="M 0 0 L 21600 0 21600 21600 0 21600 0 0 Z N"/></draw:custom-shape><draw:custom-shape draw:style-name="gr57" draw:text-style-name="P118" svg:width="1.0004in" svg:height="0.3004in" svg:x="0.05in" svg:y="2.7425in"><text:p text:style-name="P117"><text:span text:style-name="T114">Instrument 2</text:span></text:p><draw:enhanced-geometry svg:viewBox="0 0 21600 21600" draw:mirror-vertical="false" draw:mirror-horizontal="false" draw:type="rectangle" draw:enhanced-path="M 0 0 L 21600 0 21600 21600 0 21600 0 0 Z N"/></draw:custom-shape><draw:line draw:style-name="gr54" draw:text-style-name="P116" svg:x1="1.05in" svg:y1="2.8925in" svg:x2="1.65in" svg:y2="2.9425in"><text:p/></draw:line><draw:line draw:style-name="gr54" draw:text-style-name="P116" svg:x1="5.0465in" svg:y1="1.0425in" svg:x2="4.4965in" svg:y2="1.0925in"><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onfiguring Publish and Subscribe</text:h>
      <text:p text:style-name="P50">The network configuration is straightforward in that each ‘block section’ is self-contained so we don’t need to publish and/or subsribe to any signals – just the block instruments. <text:span text:style-name="T104">B</text:span>efore we can link the block instruments together, we therefore need to configure:</text:p>
      <text:list xml:id="list1717327582" text:style-name="L6">
        <text:list-item>
          <text:p text:style-name="P87">‘<text:span text:style-name="T21">Node1</text:span>’ publishes Instrument 1 to the broker</text:p>
        </text:list-item>
        <text:list-item>
          <text:p text:style-name="P87">‘<text:span text:style-name="T21">Node1</text:span>’ subscribes to Instrument 2 from ‘<text:span text:style-name="T21">Node2</text:span>’</text:p>
        </text:list-item>
        <text:list-item>
          <text:p text:style-name="P87">‘<text:span text:style-name="T21">Node</text:span><text:span text:style-name="T33">2</text:span>’ publishes Instrument <text:span text:style-name="T96">2</text:span> to the broker</text:p>
        </text:list-item>
        <text:list-item>
          <text:p text:style-name="P94">‘<text:span text:style-name="T40">Node</text:span><text:span text:style-name="T44">2</text:span><text:span text:style-name="T96">’</text:span> subscribes to Instrument <text:span text:style-name="T96">1</text:span> from ‘<text:span text:style-name="T21">Node</text:span><text:span text:style-name="T33">1</text:span>’</text:p>
        </text:list-item>
      </text:list>
      <text:h text:style-name="P65" text:outline-level="3"/>
      <text:h text:style-name="P67" text:outline-level="3">Node1 (DCC Signalling system) <text:span text:style-name="T93">publish and subscribe</text:span></text:h>
      <text:p text:style-name="P51"><draw:g text:anchor-type="paragraph" draw:z-index="19" draw:name="Shape13" draw:style-name="gr1"><draw:frame draw:style-name="gr18" draw:text-style-name="P116" svg:width="2.2516in" svg:height="2.8004in" svg:x="4.5in" svg:y="0.0835in"><draw:image xlink:href="Pictures/1000000000000165000001BCA482CD0433677F53.png" xlink:type="simple" xlink:show="embed" xlink:actuate="onLoad" draw:mime-type="image/png"><text:p/></draw:image></draw:frame><draw:frame draw:style-name="gr19" draw:text-style-name="P116" svg:width="2.2776in" svg:height="2.8323in" svg:x="0in" svg:y="0.1016in"><draw:image xlink:href="Pictures/1000000000000165000001BC6ABAA31858B8C73D.png" xlink:type="simple" xlink:show="embed" xlink:actuate="onLoad" draw:mime-type="image/png"><text:p/></draw:image></draw:frame><draw:custom-shape draw:style-name="gr20" draw:text-style-name="P118" svg:width="1.5004in" svg:height="0.4004in" svg:x="2.639in" svg:y="0.8673in"><text:p text:style-name="P117"><text:span text:style-name="T114">‘</text:span><text:span text:style-name="T114">Node1’ is publishing</text:span></text:p><text:p text:style-name="P117"><text:span text:style-name="T114">Instrument 1</text:span></text:p><draw:enhanced-geometry svg:viewBox="0 0 21600 21600" draw:mirror-vertical="false" draw:mirror-horizontal="false" draw:type="rectangle" draw:enhanced-path="M 0 0 L 21600 0 21600 21600 0 21600 0 0 Z N"/></draw:custom-shape><draw:custom-shape draw:style-name="gr21" draw:text-style-name="P118" svg:width="1.5004in" svg:height="0.4004in" svg:x="2.639in" svg:y="1.5173in"><text:p text:style-name="P117"><text:span text:style-name="T114">‘</text:span><text:span text:style-name="T114">Node1’ is subscribing to</text:span></text:p><text:p text:style-name="P117"><text:span text:style-name="T114">Instrument 2 from ‘Node2’</text:span></text:p><draw:enhanced-geometry svg:viewBox="0 0 21600 21600" draw:mirror-vertical="false" draw:mirror-horizontal="false" draw:type="rectangle" draw:enhanced-path="M 0 0 L 21600 0 21600 21600 0 21600 0 0 Z N"/></draw:custom-shape><draw:line draw:style-name="gr22" draw:text-style-name="P116" svg:x1="2.6386in" svg:y1="1.0677in" svg:x2="0.25in" svg:y2="2.1335in"><text:p/></draw:line><draw:line draw:style-name="gr23" draw:text-style-name="P116" svg:x1="4.1386in" svg:y1="1.7177in" svg:x2="4.55in" svg:y2="1.8835in"><text:p/></draw:line></draw:g></text:p>
      <text:p text:style-name="P51"/>
      <text:p text:style-name="P51"/>
      <text:p text:style-name="P51"/>
      <text:p text:style-name="P51"/>
      <text:p text:style-name="P51"/>
      <text:p text:style-name="P51"/>
      <text:p text:style-name="P51"/>
      <text:p text:style-name="P51"/>
      <text:p text:style-name="P51"/>
      <text:h text:style-name="P65" text:outline-level="3">Node<text:span text:style-name="T72">2</text:span> <text:span text:style-name="T66">(Secondary Node) publish and subscribe</text:span></text:h>
      <text:p text:style-name="P52"><draw:g text:anchor-type="paragraph" draw:z-index="20" draw:name="Shape16" draw:style-name="gr1"><draw:frame draw:style-name="gr12" draw:text-style-name="P116" svg:width="2.2114in" svg:height="2.7512in" svg:x="0.0008in" svg:y="0.0839in"><draw:image xlink:href="Pictures/1000000000000165000001BC9F243323B5AB157C.png" xlink:type="simple" xlink:show="embed" xlink:actuate="onLoad" draw:mime-type="image/png"><text:p/></draw:image></draw:frame><draw:custom-shape draw:style-name="gr13" draw:text-style-name="P118" svg:width="1.5004in" svg:height="0.4004in" svg:x="2.4634in" svg:y="0.8346in"><text:p text:style-name="P117"><text:span text:style-name="T114">‘</text:span><text:span text:style-name="T114">Node2’ is publishing</text:span></text:p><text:p text:style-name="P117"><text:span text:style-name="T114">Instrument 2</text:span></text:p><draw:enhanced-geometry svg:viewBox="0 0 21600 21600" draw:mirror-vertical="false" draw:mirror-horizontal="false" draw:type="rectangle" draw:enhanced-path="M 0 0 L 21600 0 21600 21600 0 21600 0 0 Z N"/></draw:custom-shape><draw:custom-shape draw:style-name="gr14" draw:text-style-name="P118" svg:width="1.5004in" svg:height="0.4004in" svg:x="2.4508in" svg:y="1.6846in"><text:p text:style-name="P117"><text:span text:style-name="T114">‘</text:span><text:span text:style-name="T114">Node2’ is subscribing to</text:span></text:p><text:p text:style-name="P117"><text:span text:style-name="T114">Instrument 1 from ‘Node1’</text:span></text:p><draw:enhanced-geometry svg:viewBox="0 0 21600 21600" draw:mirror-vertical="false" draw:mirror-horizontal="false" draw:type="rectangle" draw:enhanced-path="M 0 0 L 21600 0 21600 21600 0 21600 0 0 Z N"/></draw:custom-shape><draw:line draw:style-name="gr15" draw:text-style-name="P116" svg:x1="2.4634in" svg:y1="1.0346in" svg:x2="0.3008in" svg:y2="2.0846in"><text:p/></draw:line><draw:frame draw:style-name="gr16" draw:text-style-name="P116" svg:width="2.2106in" svg:height="2.7496in" svg:x="4.2508in" svg:y="0.0854in"><draw:image xlink:href="Pictures/1000000000000165000001BC019403FE6A254468.png" xlink:type="simple" xlink:show="embed" xlink:actuate="onLoad" draw:mime-type="image/png"><text:p/></draw:image></draw:frame><draw:line draw:style-name="gr17" draw:text-style-name="P116" svg:x1="3.9508in" svg:y1="1.8846in" svg:x2="4.3008in" svg:y2="1.9346in"><text:p/></draw:line></draw:g></text:p>
      <text:p text:style-name="P52"/>
      <text:p text:style-name="P52"/>
      <text:p text:style-name="P52"/>
      <text:p text:style-name="P52"/>
      <text:p text:style-name="P52"/>
      <text:p text:style-name="P52"/>
      <text:p text:style-name="P52"/>
      <text:p text:style-name="P52"/>
      <text:p text:style-name="P52"/>
      <text:h text:style-name="P76" text:outline-level="2"/>
      <text:h text:style-name="P79" text:outline-level="2">Configuring the layouts</text:h>
      <text:p text:style-name="P49">The <text:span text:style-name="T97">block instruments on their respective nodes can now be linked together. On each Node, edit the block instrument configuration and specify the linked block instrument to be the ‘subscribed’ block instrument from the other networked node:</text:span></text:p>
      <text:p text:style-name="P49"><draw:g text:anchor-type="paragraph" draw:z-index="5" draw:name="Shape18" draw:style-name="gr50"><draw:frame draw:style-name="gr66" draw:text-style-name="P116" svg:width="2.1004in" svg:height="1.9787in" svg:x="0in" svg:y="0.3756in"><draw:image xlink:href="Pictures/100000000000014700000134183F178113B4A5FD.png" xlink:type="simple" xlink:show="embed" xlink:actuate="onLoad" draw:mime-type="image/png"><text:p/></draw:image></draw:frame><draw:frame draw:style-name="gr66" draw:text-style-name="P116" svg:width="2.124in" svg:height="2.0004in" svg:x="4.3764in" svg:y="0.3756in"><draw:image xlink:href="Pictures/100000000000014700000134523A20D9DCA9FC48.png" xlink:type="simple" xlink:show="embed" xlink:actuate="onLoad" draw:mime-type="image/png"><text:p/></draw:image></draw:frame><draw:custom-shape draw:style-name="gr53" draw:text-style-name="P118" svg:width="1.5004in" svg:height="0.5004in" svg:x="2.5in" svg:y="0.5756in"><text:p text:style-name="P117"><text:span text:style-name="T114">Instrument 1 on ‘Node1’</text:span></text:p><text:p text:style-name="P117"><text:span text:style-name="T114">Is now linked to </text:span></text:p><text:p text:style-name="P117"><text:span text:style-name="T114">Instrument 2 from ‘Node2’</text:span></text:p><draw:enhanced-geometry svg:viewBox="0 0 21600 21600" draw:mirror-vertical="false" draw:mirror-horizontal="false" draw:type="rectangle" draw:enhanced-path="M 0 0 L 21600 0 21600 21600 0 21600 0 0 Z N"/></draw:custom-shape><draw:custom-shape draw:style-name="gr53" draw:text-style-name="P118" svg:width="1.5004in" svg:height="0.5004in" svg:x="2.55in" svg:y="1.5756in"><text:p text:style-name="P117"><text:span text:style-name="T114">Instrument 2 on ‘Node2’</text:span></text:p><text:p text:style-name="P117"><text:span text:style-name="T114">Is now linked to </text:span></text:p><text:p text:style-name="P117"><text:span text:style-name="T114">Instrument 1 from ‘Node1’</text:span></text:p><draw:enhanced-geometry svg:viewBox="0 0 21600 21600" draw:mirror-vertical="false" draw:mirror-horizontal="false" draw:type="rectangle" draw:enhanced-path="M 0 0 L 21600 0 21600 21600 0 21600 0 0 Z N"/></draw:custom-shape><draw:line draw:style-name="gr54" draw:text-style-name="P116" svg:x1="4.05in" svg:y1="1.776in" svg:x2="5.4in" svg:y2="1.426in"><text:p/></draw:line><draw:line draw:style-name="gr54" draw:text-style-name="P116" svg:x1="2.5in" svg:y1="0.826in" svg:x2="1.7in" svg:y2="1.226in"><text:p/></draw:line><draw:custom-shape draw:style-name="gr80" draw:text-style-name="P118" svg:width="1.3004in" svg:height="0.2004in" svg:x="0.4in" svg:y="0.1256in"><text:p text:style-name="P117"><text:span text:style-name="T114">Node 1 – Instrument 1</text:span></text:p><draw:enhanced-geometry svg:viewBox="0 0 21600 21600" draw:mirror-vertical="false" draw:mirror-horizontal="false" draw:type="rectangle" draw:enhanced-path="M 0 0 L 21600 0 21600 21600 0 21600 0 0 Z N"/></draw:custom-shape><draw:custom-shape draw:style-name="gr80" draw:text-style-name="P118" svg:width="1.3004in" svg:height="0.2004in" svg:x="4.8in" svg:y="0.1256in"><text:p text:style-name="P117"><text:span text:style-name="T114">Node 2 – Instrument 2</text:span></text:p><draw:enhanced-geometry svg:viewBox="0 0 21600 21600" draw:mirror-vertical="false" draw:mirror-horizontal="false" draw:type="rectangle" draw:enhanced-path="M 0 0 L 21600 0 21600 21600 0 21600 0 0 Z N"/></draw:custom-shape></draw:g></text:p>
      <text:p text:style-name="P49"/>
      <text:p text:style-name="P49"/>
      <text:p text:style-name="P49"/>
      <text:p text:style-name="P49"/>
      <text:p text:style-name="P49"/>
      <text:p text:style-name="P49"/>
      <text:p text:style-name="P53"/>
      <text:p text:style-name="P54">To complete the configuration, the <text:span text:style-name="T98">home </text:span>signal <text:span text:style-name="T98">that controls access into the next</text:span> block section <text:span text:style-name="T98">should then be interlocked with the ‘local’ block instrument protecting that section. </text:span></text:p>
      <text:list xml:id="list2321419748" text:style-name="L7">
        <text:list-item>
          <text:p text:style-name="P88">On ‘Node1’ - Signal 10 needs interlocking with Instrument 1.</text:p>
        </text:list-item>
        <text:list-item>
          <text:p text:style-name="P95">On ‘Node2’ - Signal 13 needs interlocking with Instrument 2.</text:p>
        </text:list-item>
      </text:list>
      <text:p text:style-name="P55">This is achieved by specifying the local block instrument on the <text:span text:style-name="T1">Interlocking</text:span> tab of the Signal Configuration Dialog:</text:p>
      <text:p text:style-name="P55"><draw:g text:anchor-type="paragraph" draw:z-index="14" draw:name="Shape19" draw:style-name="gr50"><draw:frame draw:style-name="gr51" draw:text-style-name="P116" svg:width="4.3004in" svg:height="1.4976in" svg:x="0in" svg:y="0.1256in"><draw:image xlink:href="Pictures/10000000000002B9000002B2773038BBF3941BEB.png" xlink:type="simple" xlink:show="embed" xlink:actuate="onLoad" draw:mime-type="image/png"><text:p/></draw:image></draw:frame><draw:frame draw:style-name="gr52" draw:text-style-name="P116" svg:width="4.3004in" svg:height="1.4961in" svg:x="0in" svg:y="1.8728in"><draw:image xlink:href="Pictures/10000000000002B9000002B256B4781624BC81F8.png" xlink:type="simple" xlink:show="embed" xlink:actuate="onLoad" draw:mime-type="image/png"><text:p/></draw:image></draw:frame><draw:custom-shape draw:style-name="gr53" draw:text-style-name="P118" svg:width="1.5004in" svg:height="0.5004in" svg:x="4.95in" svg:y="0.3728in"><text:p text:style-name="P117"><text:span text:style-name="T114">On ‘Node1’:</text:span></text:p><text:p text:style-name="P117"><text:span text:style-name="T114">Signal 10 is interlocked</text:span></text:p><text:p text:style-name="P117"><text:span text:style-name="T114">With Block Instrument 1</text:span></text:p><draw:enhanced-geometry svg:viewBox="0 0 21600 21600" draw:mirror-vertical="false" draw:mirror-horizontal="false" draw:type="rectangle" draw:enhanced-path="M 0 0 L 21600 0 21600 21600 0 21600 0 0 Z N"/></draw:custom-shape><draw:custom-shape draw:style-name="gr53" draw:text-style-name="P118" svg:width="1.5004in" svg:height="0.5004in" svg:x="4.95in" svg:y="2.1228in"><text:p text:style-name="P117"><text:span text:style-name="T114">On ‘Node2’:</text:span></text:p><text:p text:style-name="P117"><text:span text:style-name="T114">Signal 13 is interlocked</text:span></text:p><text:p text:style-name="P117"><text:span text:style-name="T114">With Block Instrument 2</text:span></text:p><draw:enhanced-geometry svg:viewBox="0 0 21600 21600" draw:mirror-vertical="false" draw:mirror-horizontal="false" draw:type="rectangle" draw:enhanced-path="M 0 0 L 21600 0 21600 21600 0 21600 0 0 Z N"/></draw:custom-shape><draw:line draw:style-name="gr54" draw:text-style-name="P116" svg:x1="4.95in" svg:y1="0.5728in" svg:x2="4.25in" svg:y2="0.6728in"><text:p/></draw:line><draw:line draw:style-name="gr54" draw:text-style-name="P116" svg:x1="4.95in" svg:y1="2.3228in" svg:x2="4.25in" svg:y2="2.4228in"><text:p/></draw:line></draw:g></text:p>
      <text:p text:style-name="P55"/>
      <text:p text:style-name="P55"/>
      <text:p text:style-name="P55"/>
      <text:p text:style-name="P55"/>
      <text:p text:style-name="P55"/>
      <text:p text:style-name="P55"/>
      <text:p text:style-name="P55"/>
      <text:p text:style-name="P55"/>
      <text:p text:style-name="Text_20_body"/>
      <text:h text:style-name="P77" text:outline-level="2"/>
      <text:h text:style-name="P80" text:outline-level="2">Testing the layouts</text:h>
      <text:p text:style-name="P56">To test the linking of the block instruments, <text:span text:style-name="T1">left click</text:span> on the <text:span text:style-name="T1">Telegraph</text:span> key of one of the Block Instruments. The Telegraph key on the other Block Instrument should flash and you should also hear <text:s/>the telegraph bell <text:span text:style-name="T104">(assuming</text:span> you have sound enabled<text:span text:style-name="T104">)</text:span>. </text:p>
      <text:p text:style-name="P56">To test communication the other way, <text:span text:style-name="T1">left click</text:span> on the <text:span text:style-name="T1">Telegraph</text:span> key of the other Instrument. </text:p>
      <text:p text:style-name="P33">Note that if you <text:span text:style-name="T1">right click</text:span> on the Telegraph key, this will bring up list of common bell codes in another window that you can use for reference for the remainder of this section.</text:p>
      <text:p text:style-name="P56">In their default states, both Instruments are showing ‘<text:span text:style-name="T101">LINE BLOCKED</text:span>’, which means that Signal 10 (on ‘<text:span text:style-name="T21">Node1</text:span>’) and signal 13 (on ‘<text:span text:style-name="T21">Node2</text:span>’) should both be locked (at DANGER).</text:p>
      <text:p text:style-name="P56">A typical sequence of events might be:</text:p>
      <text:list xml:id="list1475541131" text:style-name="L8">
        <text:list-item>
          <text:p text:style-name="P96"><text:span text:style-name="T100">Signalman at </text:span>‘<text:span text:style-name="T21">Node1</text:span>’ <text:span text:style-name="T100">calls attention to the signalman at ‘Node2’ via the Telegraph.</text:span></text:p>
        </text:list-item>
        <text:list-item>
          <text:p text:style-name="P98">Signalman at ‘<text:span text:style-name="T21">Node2</text:span>’ acknowledges (by repeating the same code back).</text:p>
        </text:list-item>
        <text:list-item>
          <text:p text:style-name="P98">Signalman at <text:span text:style-name="T99">‘</text:span><text:span text:style-name="T36">Node1</text:span><text:span text:style-name="T99">’ </text:span>asks if the line is clear for an express passenger train.</text:p>
        </text:list-item>
        <text:list-item>
          <text:p text:style-name="P98">Signalman at ‘<text:span text:style-name="T21">Node2</text:span>’ acknowledges (by repeating the same code back)</text:p>
        </text:list-item>
        <text:list-item>
          <text:p text:style-name="P99">Signalman at ‘<text:span text:style-name="T21">Node2</text:span>’ sets the Block Instrument to ‘<text:span text:style-name="T8">CLEAR</text:span>’ <text:s/><text:span text:style-name="T101">(Line Clear).</text:span></text:p>
          <text:list>
            <text:list-item>
              <text:p text:style-name="P101">Note that the ‘Node1’ Block Instrument will also show ‘Line clear’ (repeating the ‘Node2’ Instrument) <text:span text:style-name="T101">with</text:span> greyed out <text:span text:style-name="T101">controls </text:span>as ‘Node2’ <text:span text:style-name="T104">now </text:span>has control.</text:p>
            </text:list-item>
          </text:list>
        </text:list-item>
        <text:list-item>
          <text:p text:style-name="P97"><text:span text:style-name="T100">Signalman at </text:span>‘<text:span text:style-name="T21">Node1</text:span>’ <text:span text:style-name="T100">can now set Signal 10 to CLEAR (as it is now unlocked) to allow the train stopped at Signal 10 to proceed into the next block section.</text:span></text:p>
        </text:list-item>
        <text:list-item>
          <text:p text:style-name="P97"><text:span text:style-name="T100">As the train passes the signal, the </text:span>‘<text:span text:style-name="T21">Node1</text:span>’ <text:span text:style-name="T100">Signalman sends “Train Entering Section” and returns Signal 10 to DANGER.</text:span></text:p>
        </text:list-item>
        <text:list-item>
          <text:p text:style-name="P99">Signalman at ‘<text:span text:style-name="T21">Node2</text:span>’ acknowledges (by repeating the same code back) <text:span text:style-name="T101">and sets the </text:span>Block Instrument to ‘<text:span text:style-name="T8">OCCUP</text:span>’ <text:span text:style-name="T101">(Train on Line).</text:span></text:p>
          <text:list>
            <text:list-item>
              <text:p text:style-name="P100"><text:span text:style-name="T21">Note that the ‘Node1’ Block Instrument will also show ‘</text:span><text:span text:style-name="T34">Train on Line</text:span><text:span text:style-name="T21">’ (repeating the ‘Node2’ Instrument) and the controls </text:span><text:span text:style-name="T34">will remain</text:span><text:span text:style-name="T21"> greyed out as ‘Node2’ </text:span><text:span text:style-name="T34">still </text:span><text:span text:style-name="T21">has control. </text:span></text:p>
            </text:list-item>
            <text:list-item>
              <text:p text:style-name="P102">Signal 10 will also now be locked at DANGER, preventing the ‘Node1’ signalman sending another train into the same block section.</text:p>
            </text:list-item>
          </text:list>
        </text:list-item>
        <text:list-item>
          <text:p text:style-name="P103"><text:span text:style-name="T100">Signalman at ‘Node2’ sends “Train Arrived” as soon as the train passes the ‘Node2’ distant signal and sets the Block Instrument back to ‘</text:span><text:span text:style-name="T9">LINE BLOCKED</text:span><text:span text:style-name="T100">’. </text:span></text:p>
          <text:list>
            <text:list-item>
              <text:p text:style-name="P104"><text:span text:style-name="T35">Note that the ‘Node1’ Block Instrument will also show ‘</text:span><text:span text:style-name="T37">Line Blocked</text:span><text:span text:style-name="T35">’ (repeating the ‘Node2’ Instrument) . </text:span><text:span text:style-name="T37">In this state</text:span><text:span text:style-name="T35"> the controls</text:span><text:span text:style-name="T37"> are re-enabled (allowing either signalman to accept a train offered by the signalman at the other signal box</text:span><text:span text:style-name="T35">. </text:span></text:p>
            </text:list-item>
            <text:list-item>
              <text:p text:style-name="P104"><text:span text:style-name="T34">Signal 10 will also </text:span><text:span text:style-name="T37">remain </text:span><text:span text:style-name="T34"><text:s/>locked at DANGER.</text:span></text:p>
            </text:list-item>
          </text:list>
        </text:list-item>
      </text:list>
      <text:p text:style-name="P105"><text:span text:style-name="T34"/></text:p>
      <text:h text:style-name="P73" text:outline-level="1"><text:bookmark-start text:name="__RefHeading___Toc2231_427111604"/>DCC Locomotive Commands<text:bookmark-end text:name="__RefHeading___Toc2231_427111604"/></text:h>
      <text:p text:style-name="P111">Networking can also be configured to allow throttles to be used on remote DCC Signalling nodes (either throttle windows opened from the <text:span text:style-name="T112">main application or</text:span> <text:span text:style-name="T112">on your smartphone via the ‘Throttle Server’</text:span> <text:span text:style-name="T112">running on the remote signalling node.</text:span></text:p>
      <text:p text:style-name="P112">Note that when using networking for train control we would recommend investing in a dedicated WiFi router for your layout (separate from your home wi-fi network) to protect yourself from network glitches resulting from poor WiFi signals or other network traffic.</text:p>
      <text:p text:style-name="P112">Configuration is nearly identical to that for the DCC Accessory command feed, but in this case the ‘publisher’ node also needs to know the name of the main signalling system node to enable feedback (when requesting and releasing locomotive sessions, and for status updates when DCC power is enabled or disabled on the main signalling system node)</text:p>
      <text:h text:style-name="P81" text:outline-level="3"><draw:g text:anchor-type="paragraph" draw:z-index="21" draw:name="Shape17" draw:style-name="gr1"><draw:frame draw:style-name="gr2" draw:text-style-name="P116" svg:width="2.2114in" svg:height="2.7504in" svg:x="4.5083in" svg:y="0.478in"><draw:image xlink:href="Pictures/1000000000000165000001BC6E9A95D1451373D3.png" xlink:type="simple" xlink:show="embed" xlink:actuate="onLoad" draw:mime-type="image/png"><text:p/></draw:image></draw:frame><draw:frame draw:style-name="gr3" draw:text-style-name="P116" svg:width="2.2189in" svg:height="2.7594in" svg:x="0.0008in" svg:y="0.528in"><draw:image xlink:href="Pictures/1000000000000165000001BC5FFBF3CCDC887C47.png" xlink:type="simple" xlink:show="embed" xlink:actuate="onLoad" draw:mime-type="image/png"><text:p/></draw:image></draw:frame><draw:custom-shape draw:style-name="gr4" draw:text-style-name="P118" svg:width="1.5004in" svg:height="0.4004in" svg:x="2.4697in" svg:y="0.578in"><text:p text:style-name="P117"><text:span text:style-name="T114">‘</text:span><text:span text:style-name="T114">Node2’ is publishing the</text:span></text:p><text:p text:style-name="P117"><text:span text:style-name="T114">DCC Loco command feed</text:span></text:p><draw:enhanced-geometry svg:viewBox="0 0 21600 21600" draw:mirror-vertical="false" draw:mirror-horizontal="false" draw:type="rectangle" draw:enhanced-path="M 0 0 L 21600 0 21600 21600 0 21600 0 0 Z N"/></draw:custom-shape><draw:line draw:style-name="gr5" draw:text-style-name="P116" svg:x1="2.4697in" svg:y1="1.2276in" svg:x2="2.0197in" svg:y2="1.5276in"><text:p/></draw:line><draw:custom-shape draw:style-name="gr6" draw:text-style-name="P118" svg:width="1.5004in" svg:height="0.4004in" svg:x="2.4697in" svg:y="1.078in"><text:p text:style-name="P117"><text:span text:style-name="T114">‘</text:span><text:span text:style-name="T114">Node1 is the main </text:span></text:p><text:p text:style-name="P117"><text:span text:style-name="T114">Signalling Node (hosting </text:span></text:p><text:p text:style-name="P117"><text:span text:style-name="T114">the DCC bus interface</text:span></text:p><draw:enhanced-geometry svg:viewBox="0 0 21600 21600" draw:mirror-vertical="false" draw:mirror-horizontal="false" draw:type="rectangle" draw:enhanced-path="M 0 0 L 21600 0 21600 21600 0 21600 0 0 Z N"/></draw:custom-shape><draw:custom-shape draw:style-name="gr7" draw:text-style-name="P118" svg:width="1.7504in" svg:height="0.3504in" svg:x="0.2697in" svg:y="0.128in"><text:p text:style-name="P117"><text:span text:style-name="T114">‘</text:span><text:span text:style-name="T114">Node2’ Configuration</text:span></text:p><text:p text:style-name="P117"><text:span text:style-name="T114">(Hosting the remote throttles)</text:span></text:p><draw:enhanced-geometry svg:viewBox="0 0 21600 21600" draw:mirror-vertical="false" draw:mirror-horizontal="false" draw:type="rectangle" draw:enhanced-path="M 0 0 L 21600 0 21600 21600 0 21600 0 0 Z N"/></draw:custom-shape><draw:line draw:style-name="gr8" draw:text-style-name="P116" svg:x1="2.4697in" svg:y1="0.7276in" svg:x2="0.3697in" svg:y2="1.3276in"><text:p/></draw:line><draw:custom-shape draw:style-name="gr9" draw:text-style-name="P118" svg:width="1.7004in" svg:height="0.5004in" svg:x="2.5197in" svg:y="2.078in"><text:p text:style-name="P117"><text:span text:style-name="T114">‘</text:span><text:span text:style-name="T114">Node1’ is subscribed to the</text:span></text:p><text:p text:style-name="P117"><text:span text:style-name="T114">DCC Loco command feed</text:span></text:p><text:p text:style-name="P117"><text:span text:style-name="T114">From the throttles on Node 2</text:span></text:p><draw:enhanced-geometry svg:viewBox="0 0 21600 21600" draw:mirror-vertical="false" draw:mirror-horizontal="false" draw:type="rectangle" draw:enhanced-path="M 0 0 L 21600 0 21600 21600 0 21600 0 0 Z N"/></draw:custom-shape><draw:line draw:style-name="gr10" draw:text-style-name="P116" svg:x1="3.5197in" svg:y1="2.0776in" svg:x2="4.5697in" svg:y2="1.3276in"><text:p/></draw:line><draw:custom-shape draw:style-name="gr11" draw:text-style-name="P118" svg:width="1.7504in" svg:height="0.3504in" svg:x="4.7197in" svg:y="0.078in"><text:p text:style-name="P117"><text:span text:style-name="T114">‘</text:span><text:span text:style-name="T114">Node1 Configuration</text:span></text:p><text:p text:style-name="P117"><text:span text:style-name="T114">(The Main DCC Signalling Node)</text:span></text:p><draw:enhanced-geometry svg:viewBox="0 0 21600 21600" draw:mirror-vertical="false" draw:mirror-horizontal="false" draw:type="rectangle" draw:enhanced-path="M 0 0 L 21600 0 21600 21600 0 21600 0 0 Z N"/></draw:custom-shape></draw:g></text:h>
      <text:p text:style-name="P114"/>
      <text:p text:style-name="P114"/>
      <text:p text:style-name="P114"/>
      <text:p text:style-name="P114"/>
      <text:p text:style-name="P114"/>
      <text:p text:style-name="P114"/>
      <text:p text:style-name="P114"/>
      <text:h text:style-name="P78" text:outline-level="2"/>
      <text:h text:style-name="P113" text:outline-level="2"/>
      <text:h text:style-name="P113" text:outline-level="2"/>
      <text:h text:style-name="P115" text:outline-level="2">Once configured, throttle windows can be opened on the remote signalling node and locomotives selected/controlled as normal (note that the roster <text:span text:style-name="T18">must</text:span> also exist in the remote node configuration as it is <text:span text:style-name="T18">not</text:span> automatically transferred from the main signalling node)</text:h>
      <text:h text:style-name="P115" text:outline-level="2">Note that the DCC Power Status button at the top of each throttle window will show the DCC Power status of the <text:span text:style-name="T18">main DCC Signalling System Node</text:span>. The power status of the main DCC signalling system node can also be toggled on/off as required by clicking the button.</text:h>
      <text:h text:style-name="P115" text:outline-level="2">The same is true of any throttles connected into the Throttle Server running on the remote signalling node (power state and power control is associated with the <text:span text:style-name="T18">main DCC Signalling System Node</text:span>. </text:h>
      <text:h text:style-name="P90" text:outline-level="2">Note that if you configure the main DCC Signalling system to publish its DCC <text:span text:style-name="T113">Loco </text:span>command feed then commands will only be sent out to the network and <text:span text:style-name="T20">not</text:span> to the local Sprog interfac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07:28:10.070636447</meta:creation-date>
    <dc:date>2026-03-21T11:29:37.841578474</dc:date>
    <meta:editing-duration>PT23H35M55S</meta:editing-duration>
    <meta:editing-cycles>96</meta:editing-cycles>
    <meta:generator>LibreOffice/7.0.4.2$Linux_AARCH64 LibreOffice_project/00$Build-2</meta:generator>
    <meta:document-statistic meta:table-count="0" meta:image-count="1" meta:object-count="0" meta:page-count="16" meta:paragraph-count="146" meta:word-count="3755" meta:character-count="22592" meta:non-whitespace-character-count="18969"/>
  </office:meta>
</office:document-meta>
</file>