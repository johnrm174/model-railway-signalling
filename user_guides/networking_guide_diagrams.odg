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1BCC701AC37A75C361B.png" manifest:media-type="image/png"/>
  <manifest:file-entry manifest:full-path="Pictures/1000000000000165000001BCF89C29C7B3195219.png" manifest:media-type="image/png"/>
  <manifest:file-entry manifest:full-path="Pictures/1000000000000165000001BC09D764D6196394BF.png" manifest:media-type="image/png"/>
  <manifest:file-entry manifest:full-path="Pictures/1000000000000147000001340D872148305F063F.png" manifest:media-type="image/png"/>
  <manifest:file-entry manifest:full-path="Pictures/100000000000014700000134B79E91F0C4300D49.png" manifest:media-type="image/png"/>
  <manifest:file-entry manifest:full-path="Pictures/1000000000000165000001BC76197EB03CBACC3E.png" manifest:media-type="image/png"/>
  <manifest:file-entry manifest:full-path="Pictures/100000000000038C000002451A6EE0D82978B0DE.png" manifest:media-type="image/png"/>
  <manifest:file-entry manifest:full-path="Pictures/1000020100000154000001186A691DB4C3AFC7D5.png" manifest:media-type="image/png"/>
  <manifest:file-entry manifest:full-path="Pictures/1000000000000165000001BCB0C98BDFE6D8BD8C.png" manifest:media-type="image/png"/>
  <manifest:file-entry manifest:full-path="Pictures/1000000000000165000001BC09D713D0A01E9587.png" manifest:media-type="image/png"/>
  <manifest:file-entry manifest:full-path="Pictures/1000000000000454000002458CEF8725753D6297.png" manifest:media-type="image/png"/>
  <manifest:file-entry manifest:full-path="Pictures/100000000000015B000001D92B345720B05C07CB.png" manifest:media-type="image/png"/>
  <manifest:file-entry manifest:full-path="Pictures/100000000000033500000245D58202A4BE641F90.png" manifest:media-type="image/png"/>
  <manifest:file-entry manifest:full-path="Pictures/10000000000002B9000002B2E1A08D675E5CE56A.png" manifest:media-type="image/png"/>
  <manifest:file-entry manifest:full-path="Pictures/10000000000004540000024596F6B5B0186FF26F.png" manifest:media-type="image/png"/>
  <manifest:file-entry manifest:full-path="Pictures/10000000000003350000024532F5BE0472C488F5.png" manifest:media-type="image/png"/>
  <manifest:file-entry manifest:full-path="Pictures/1000000000000165000001BCCA132BAD99FC9A81.png" manifest:media-type="image/png"/>
  <manifest:file-entry manifest:full-path="Pictures/100000000000015B000001D9A7052D4179A17D44.png" manifest:media-type="image/png"/>
  <manifest:file-entry manifest:full-path="Pictures/100000000000038C0000024523C6A08DEB278394.png" manifest:media-type="image/png"/>
  <manifest:file-entry manifest:full-path="Pictures/1000000000000165000001BCF49D612665B18178.png" manifest:media-type="image/png"/>
  <manifest:file-entry manifest:full-path="Pictures/1000000000000165000001BC894B57863B73E218.png" manifest:media-type="image/png"/>
  <manifest:file-entry manifest:full-path="Pictures/10000000000002B9000002B278EE16C780AA294A.png" manifest:media-type="image/png"/>
  <manifest:file-entry manifest:full-path="Pictures/100000000000017E000001D6AE1E9B92D933304F.png" manifest:media-type="image/png"/>
  <manifest:file-entry manifest:full-path="Pictures/10000000000001500000019F468282747EA041F2.png" manifest:media-type="image/png"/>
  <manifest:file-entry manifest:full-path="Pictures/10000000000002B9000002B28AA1ABBC663988A7.png" manifest:media-type="image/png"/>
  <manifest:file-entry manifest:full-path="Pictures/1000000000000165000001BCEF0164848E621BDF.png" manifest:media-type="image/png"/>
  <manifest:file-entry manifest:full-path="Pictures/1000000000000165000001BC7851D354CE338FC7.png" manifest:media-type="image/png"/>
  <manifest:file-entry manifest:full-path="Pictures/1000000000000150000001A017CBB3A60A8FB5A8.png" manifest:media-type="image/png"/>
  <manifest:file-entry manifest:full-path="Pictures/1000000000000165000001BCD06E00FFA76776A3.png" manifest:media-type="image/png"/>
  <manifest:file-entry manifest:full-path="Pictures/10000000000002B9000002B276BD77CE9E682FCC.png" manifest:media-type="image/png"/>
  <manifest:file-entry manifest:full-path="Pictures/1000000000000165000001BCE2318589A07A6353.png" manifest:media-type="image/png"/>
  <manifest:file-entry manifest:full-path="Pictures/1000000000000165000001BCDD0C44E3A5EB7F28.png" manifest:media-type="image/png"/>
  <manifest:file-entry manifest:full-path="Pictures/1000000000000165000001BCA8D0B1EF42617086.png" manifest:media-type="image/png"/>
  <manifest:file-entry manifest:full-path="Pictures/10000000000002B9000002B2BC69ADEF58F7CD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bottom" draw:auto-grow-height="false" fo:min-height="4.449cm" fo:min-width="2.16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1.02cm" fo:min-width="1.151cm"/>
      <style:paragraph-properties style:writing-mode="lr-tb"/>
    </style:style>
    <style:style style:name="gr4" style:family="graphic" style:parent-style-name="objectwithoutfill">
      <style:graphic-properties svg:stroke-color="#f10d0c" draw:marker-start="Rounded_20_short_20_Arrow" draw:marker-end="" draw:marker-end-width="0.3cm" draw:fill="none" draw:textarea-vertical-align="middle"/>
    </style:style>
    <style:style style:name="gr5" style:family="graphic" style:parent-style-name="standard">
      <style:graphic-properties draw:fill-color="#dee7e5" draw:textarea-horizontal-align="justify" draw:textarea-vertical-align="bottom" draw:auto-grow-height="false" fo:min-height="2.671cm" fo:min-width="2.167cm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648cm" fo:min-width="0.758cm"/>
      <style:paragraph-properties style:writing-mode="lr-tb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274cm" fo:min-width="1.278cm"/>
      <style:paragraph-properties style:writing-mode="lr-tb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1.274cm" fo:min-width="1.151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115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1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76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1cm, 0cm)" draw:image-opacity="100%" style:mirror="none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26cm, 0cm)" draw:image-opacity="100%" style:mirror="none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274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374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75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3.766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3.512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4.909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4.655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4.909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374cm" fo:padding-top="0.151cm" fo:padding-bottom="0.151cm" fo:padding-left="0.276cm" fo:padding-right="0.276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8cm, 8.367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1cm, 8.362cm, 0cm)" draw:image-opacity="100%" style:mirror="none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398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369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369cm" fo:padding-top="0.151cm" fo:padding-bottom="0.151cm" fo:padding-left="0.276cm" fo:padding-right="0.27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67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69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cm, 0cm)" draw:image-opacity="100%" style:mirror="none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00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185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131cm, 0cm)" draw:image-opacity="100%" style:mirror="none"/>
    </style:style>
    <style:style style:name="gr5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095cm" fo:min-width="3.81cm" fo:padding-top="0.151cm" fo:padding-bottom="0.151cm" fo:padding-left="0.276cm" fo:padding-right="0.276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15cm, 4.168cm, 3.351cm, 1.437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59cm, 4.444cm, 3.35cm, 1.16cm)" draw:image-opacity="100%" style:mirror="none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3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4cm, 0cm)" draw:image-opacity="100%" style:mirror="none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893cm" fo:padding-top="0.151cm" fo:padding-bottom="0.151cm" fo:padding-left="0.276cm" fo:padding-right="0.276cm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766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89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dee7e5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5ce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4.699cm" svg:x="7.223cm" svg:y="8.674cm">
          <text:p text:style-name="P1"><text:span text:style-name="T1">DCC Signalling </text:span></text:p>
          <text:p text:style-name="P1"><text:span text:style-name="T1">System (RPi-4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97cm" svg:height="1.397cm" svg:x="11.568cm" svg:y="8.62cm">
          <draw:image xlink:href="Pictures/1000020100000154000001186A691DB4C3AFC7D5.png" xlink:type="simple" xlink:show="embed" xlink:actuate="onLoad" draw:mime-type="image/png">
            <text:p/>
          </draw:image>
        </draw:frame>
        <draw:custom-shape draw:style-name="gr3" draw:text-style-name="P4" draw:layer="layout" svg:width="1.651cm" svg:height="1.27cm" svg:x="7.73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7.731cm" svg:y="9.209cm">
          <text:p text:style-name="P1"><text:span text:style-name="T1">Network</text:span></text:p>
          <text:p text:style-name="P1"><text:span text:style-name="T1">Brok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2cm" svg:y1="10.479cm" svg:x2="8.62cm" svg:y2="10.987cm">
          <text:p/>
        </draw:line>
        <draw:line draw:style-name="gr4" draw:text-style-name="P3" draw:layer="layout" svg:x1="8.62cm" svg:y1="11.087cm" svg:x2="8.62cm" svg:y2="10.579cm">
          <text:p/>
        </draw:line>
        <draw:line draw:style-name="gr4" draw:text-style-name="P3" draw:layer="layout" svg:x1="9.382cm" svg:y1="9.817cm" svg:x2="11.414cm" svg:y2="9.817cm">
          <text:p/>
        </draw:line>
        <draw:custom-shape draw:style-name="gr5" draw:text-style-name="P2" draw:layer="layout" svg:width="2.667cm" svg:height="2.921cm" svg:x="11.033cm" svg:y="10.452cm">
          <text:p text:style-name="P1"><text:span text:style-name="T1">Other </text:span></text:p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11.54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3cm" svg:y1="10.071cm" svg:x2="12.43cm" svg:y2="10.579cm">
          <text:p/>
        </draw:line>
        <draw:line draw:style-name="gr4" draw:text-style-name="P3" draw:layer="layout" svg:x1="12.43cm" svg:y1="11.087cm" svg:x2="12.43cm" svg:y2="10.198cm">
          <text:p/>
        </draw:line>
        <draw:line draw:style-name="gr4" draw:text-style-name="P3" draw:layer="layout" svg:x1="11.414cm" svg:y1="9.817cm" svg:x2="9.382cm" svg:y2="9.817cm">
          <text:p/>
        </draw:line>
        <draw:custom-shape draw:style-name="gr6" draw:text-style-name="P4" draw:layer="layout" svg:width="1.778cm" svg:height="1.27cm" svg:x="7.223cm" svg:y="2.905cm">
          <text:p text:style-name="P1"><text:span text:style-name="T1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78cm" svg:height="1.524cm" svg:x="3.921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1”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51cm" svg:height="1.524cm" svg:x="10.552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2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3cm" svg:y1="3.286cm" svg:x2="5.699cm" svg:y2="3.286cm">
          <text:p/>
        </draw:line>
        <draw:line draw:style-name="gr4" draw:text-style-name="P3" draw:layer="layout" svg:x1="5.699cm" svg:y1="3.794cm" svg:x2="7.223cm" svg:y2="3.794cm">
          <text:p/>
        </draw:line>
        <draw:line draw:style-name="gr4" draw:text-style-name="P3" draw:layer="layout" svg:x1="10.525cm" svg:y1="3.286cm" svg:x2="9.001cm" svg:y2="3.286cm">
          <text:p/>
        </draw:line>
        <draw:line draw:style-name="gr4" draw:text-style-name="P3" draw:layer="layout" svg:x1="9.001cm" svg:y1="3.794cm" svg:x2="10.398cm" svg:y2="3.794cm">
          <text:p/>
        </draw:line>
        <draw:custom-shape draw:style-name="gr9" draw:text-style-name="P6" draw:layer="layout" svg:width="4.064cm" svg:height="0.762cm" svg:x="2.905cm" svg:y="1.281cm">
          <text:p text:style-name="P5"><text:span text:style-name="T1">Node 1 publishes</text:span></text:p>
          <text:p text:style-name="P5"><text:span text:style-name="T1">Signal 1 State (to 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4.683cm" svg:x2="9.79cm" svg:y2="3.921cm">
          <text:p/>
        </draw:line>
        <draw:custom-shape draw:style-name="gr11" draw:text-style-name="P6" draw:layer="layout" svg:width="4.064cm" svg:height="0.762cm" svg:x="9.328cm" svg:y="1.254cm">
          <text:p text:style-name="P5"><text:span text:style-name="T1">Node 2 subscribes to</text:span></text:p>
          <text:p text:style-name="P5"><text:span text:style-name="T1">Signal 1 State from “Node 1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64cm" svg:height="0.762cm" svg:x="3.032cm" svg:y="5.191cm">
          <text:p text:style-name="P5"><text:span text:style-name="T1">Node 1 subscribes to</text:span></text:p>
          <text:p text:style-name="P5"><text:span text:style-name="T1">Track Sensor 3 from “Node 2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0.762cm" svg:x="9.763cm" svg:y="4.683cm">
          <text:p text:style-name="P5"><text:span text:style-name="T1">Node 2 publishes</text:span></text:p>
          <text:p text:style-name="P5"><text:span text:style-name="T1">Track Sensor 3 (to 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953cm" svg:y1="2.016cm" svg:x2="6.461cm" svg:y2="3.159cm">
          <text:p/>
        </draw:line>
        <draw:line draw:style-name="gr10" draw:text-style-name="P3" draw:layer="layout" svg:x1="5.953cm" svg:y1="5.191cm" svg:x2="6.588cm" svg:y2="3.921cm">
          <text:p/>
        </draw:line>
        <draw:line draw:style-name="gr10" draw:text-style-name="P3" draw:layer="layout" svg:x1="10.425cm" svg:y1="2.016cm" svg:x2="9.663cm" svg:y2="3.159cm">
          <text:p/>
        </draw:line>
        <draw:custom-shape draw:style-name="gr14" draw:text-style-name="P6" draw:layer="layout" svg:width="2.667cm" svg:height="1.27cm" svg:x="3.54cm" svg:y="10.398cm">
          <text:p text:style-name="P5"><text:span text:style-name="T1">Network broker </text:span></text:p>
          <text:p text:style-name="P5"><text:span text:style-name="T1">installed on DCC </text:span></text:p>
          <text:p text:style-name="P5"><text:span text:style-name="T1">Signalling Syste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1.033cm" svg:x2="7.604cm" svg:y2="10.144cm">
          <text:p/>
        </draw:line>
        <draw:frame draw:style-name="gr2" draw:text-style-name="P3" draw:layer="layout" svg:width="5.739cm" svg:height="7.061cm" svg:x="7.35cm" svg:y="14.64cm">
          <draw:image xlink:href="Pictures/100000000000017E000001D6AE1E9B92D933304F.png" xlink:type="simple" xlink:show="embed" xlink:actuate="onLoad" draw:mime-type="image/png">
            <text:p/>
          </draw:image>
        </draw:frame>
        <draw:custom-shape draw:style-name="gr15" draw:text-style-name="P6" draw:layer="layout" svg:width="3.764cm" svg:height="1.27cm" svg:x="14.635cm" svg:y="14.589cm">
          <text:p text:style-name="P5"><text:span text:style-name="T1">The network IP address </text:span></text:p>
          <text:p text:style-name="P5"><text:span text:style-name="T1">of the computer that the</text:span></text:p>
          <text:p text:style-name="P5"><text:span text:style-name="T1">Broker is running on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302cm" svg:height="1.016cm" svg:x="14.716cm" svg:y="18.526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318cm" svg:height="1.524cm" svg:x="1.889cm" svg:y="16.748cm">
          <text:p text:style-name="P5"><text:span text:style-name="T1">The default broker installation</text:span></text:p>
          <text:p text:style-name="P5"><text:span text:style-name="T1">does not apply username</text:span></text:p>
          <text:p text:style-name="P5"><text:span text:style-name="T1">and password authentication</text:span></text:p>
          <text:p text:style-name="P5"><text:span text:style-name="T1">(leave blank)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302cm" svg:height="1.016cm" svg:x="2.778cm" svg:y="19.796cm">
          <text:p text:style-name="P5"><text:span text:style-name="T1">Our network name</text:span></text:p>
          <text:p text:style-name="P5"><text:span text:style-name="T1">will be </text:span><text:span text:style-name="T2">Network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302cm" svg:height="1.016cm" svg:x="14.689cm" svg:y="20.05cm">
          <text:p text:style-name="P5"><text:span text:style-name="T1">This node on Network1</text:span></text:p>
          <text:p text:style-name="P5"><text:span text:style-name="T1">will be called </text:span><text:span text:style-name="T2">Node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7.383cm" svg:x2="7.731cm" svg:y2="17.129cm">
          <text:p/>
        </draw:line>
        <draw:line draw:style-name="gr10" draw:text-style-name="P3" draw:layer="layout" svg:x1="14.589cm" svg:y1="14.97cm" svg:x2="11.414cm" svg:y2="15.859cm">
          <text:p/>
        </draw:line>
        <draw:line draw:style-name="gr10" draw:text-style-name="P3" draw:layer="layout" svg:x1="14.716cm" svg:y1="18.907cm" svg:x2="11.033cm" svg:y2="16.494cm">
          <text:p/>
        </draw:line>
        <draw:line draw:style-name="gr10" draw:text-style-name="P3" draw:layer="layout" svg:x1="14.716cm" svg:y1="20.304cm" svg:x2="12.557cm" svg:y2="18.399cm">
          <text:p/>
        </draw:line>
        <draw:line draw:style-name="gr10" draw:text-style-name="P3" draw:layer="layout" svg:x1="6.08cm" svg:y1="20.177cm" svg:x2="8.874cm" svg:y2="18.399cm">
          <text:p/>
        </draw:line>
        <draw:frame draw:style-name="gr20" draw:text-style-name="P3" draw:layer="layout" svg:width="14.254cm" svg:height="1.269cm" svg:x="2.27cm" svg:y="22.59cm">
          <draw:image xlink:href="Pictures/10000000000004540000024596F6B5B0186FF26F.png" xlink:type="simple" xlink:show="embed" xlink:actuate="onLoad" draw:mime-type="image/png">
            <text:p/>
          </draw:image>
        </draw:frame>
        <draw:custom-shape draw:style-name="gr21" draw:text-style-name="P6" draw:layer="layout" svg:width="3.302cm" svg:height="1.016cm" svg:x="8.239cm" svg:y="24.368cm">
          <text:p text:style-name="P5"><text:span text:style-name="T1">MQTT status /control</text:span></text:p>
          <text:p text:style-name="P5"><text:span text:style-name="T1">(showing dis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24.368cm" svg:x2="11.16cm" svg:y2="23.606cm">
          <text:p/>
        </draw:line>
        <draw:frame draw:style-name="gr22" draw:text-style-name="P3" draw:layer="layout" svg:width="14.254cm" svg:height="1.259cm" svg:x="2.27cm" svg:y="25.795cm">
          <draw:image xlink:href="Pictures/1000000000000454000002458CEF8725753D6297.png" xlink:type="simple" xlink:show="embed" xlink:actuate="onLoad" draw:mime-type="image/png">
            <text:p/>
          </draw:image>
        </draw:frame>
        <draw:custom-shape draw:style-name="gr23" draw:text-style-name="P6" draw:layer="layout" svg:width="3.302cm" svg:height="1.016cm" svg:x="12.811cm" svg:y="24.114cm">
          <text:p text:style-name="P5"><text:span text:style-name="T1">MQTT status /control</text:span></text:p>
          <text:p text:style-name="P5"><text:span text:style-name="T1">(showing 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319cm" svg:y1="25.13cm" svg:x2="12.557cm" svg:y2="26.319cm">
          <text:p/>
        </draw:line>
        <draw:custom-shape draw:style-name="gr7" draw:text-style-name="P4" draw:layer="layout" svg:width="1.778cm" svg:height="1.524cm" svg:x="7.35cm" svg:y="6.58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3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58cm" svg:y1="6.588cm" svg:x2="7.858cm" svg:y2="4.175cm">
          <text:p/>
        </draw:line>
        <draw:custom-shape draw:style-name="gr24" draw:text-style-name="P6" draw:layer="layout" svg:width="4.064cm" svg:height="0.762cm" svg:x="9.763cm" svg:y="6.08cm">
          <text:p text:style-name="P5"><text:span text:style-name="T1">Node 3 subscribes to</text:span></text:p>
          <text:p text:style-name="P5"><text:span text:style-name="T1">Signal 1 State from “Node 1”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763cm" svg:y1="6.334cm" svg:x2="7.985cm" svg:y2="5.318cm">
          <text:p/>
        </draw:line>
        <draw:custom-shape draw:style-name="gr25" draw:text-style-name="P6" draw:layer="layout" svg:width="3.81cm" svg:height="1.27cm" svg:x="2.397cm" svg:y="14.843cm">
          <text:p text:style-name="P5"><text:span text:style-name="T1">You should also be</text:span></text:p>
          <text:p text:style-name="P5"><text:span text:style-name="T1">Able to specify </text:span><text:span text:style-name="T3">localhost</text:span></text:p>
          <text:p text:style-name="P5"><text:span text:style-name="T1">for the Broker Addres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5.478cm" svg:x2="7.604cm" svg:y2="15.986cm">
          <text:p/>
        </draw:line>
        <draw:custom-shape draw:style-name="gr26" draw:text-style-name="P6" draw:layer="layout" svg:width="4.826cm" svg:height="1.651cm" svg:x="14.081cm" svg:y="16.24cm">
          <text:p text:style-name="P5"><text:span text:style-name="T1">For the main Signalling </text:span></text:p>
          <text:p text:style-name="P5"><text:span text:style-name="T1">System, this can be specified</text:span></text:p>
          <text:p text:style-name="P5"><text:span text:style-name="T1"><text:s/></text:span><text:span text:style-name="T1">as </text:span><text:span text:style-name="T2">127.0.0.1</text:span><text:span text:style-name="T1"> or </text:span><text:span text:style-name="T2">localhost</text:span><text:span text:style-name="T1"> </text:span></text:p>
          <text:p text:style-name="P5"><text:span text:style-name="T1">(which both mean ‘this computer’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081cm" svg:y1="16.875cm" svg:x2="11.541cm" svg:y2="16.113cm">
          <text:p/>
        </draw:line>
      </draw:page>
      <draw:page draw:name="page2" draw:style-name="dp1" draw:master-page-name="Default">
        <draw:frame draw:style-name="gr2" draw:text-style-name="P3" draw:layer="layout" svg:width="5.683cm" svg:height="7.747cm" svg:x="5.953cm" svg:y="17.764cm">
          <draw:image xlink:href="Pictures/100000000000015B000001D9A7052D4179A17D44.png" xlink:type="simple" xlink:show="embed" xlink:actuate="onLoad" draw:mime-type="image/png">
            <text:p/>
          </draw:image>
        </draw:frame>
        <draw:frame draw:style-name="gr2" draw:text-style-name="P3" draw:layer="layout" svg:width="5.718cm" svg:height="7.794cm" svg:x="8.109cm" svg:y="9.208cm">
          <draw:image xlink:href="Pictures/100000000000015B000001D92B345720B05C07CB.png" xlink:type="simple" xlink:show="embed" xlink:actuate="onLoad" draw:mime-type="image/png">
            <text:p/>
          </draw:image>
        </draw:frame>
        <draw:frame draw:style-name="gr2" draw:text-style-name="P3" draw:layer="layout" svg:width="5.721cm" svg:height="7.115cm" svg:x="7.979cm" svg:y="1.508cm">
          <draw:image xlink:href="Pictures/1000000000000165000001BCB0C98BDFE6D8BD8C.png" xlink:type="simple" xlink:show="embed" xlink:actuate="onLoad" draw:mime-type="image/png">
            <text:p/>
          </draw:image>
        </draw:frame>
        <draw:custom-shape draw:style-name="gr27" draw:text-style-name="P6" draw:layer="layout" svg:width="4.926cm" svg:height="1.778cm" svg:x="2.297cm" svg:y="5.318cm">
          <text:p text:style-name="P5"><text:span text:style-name="T1">The ‘hostname’ of the computer</text:span></text:p>
          <text:p text:style-name="P5"><text:span text:style-name="T1">we are running this instance</text:span></text:p>
          <text:p text:style-name="P5"><text:span text:style-name="T1">of the signalling application on</text:span></text:p>
          <text:p text:style-name="P5"><text:span text:style-name="T4">(</text:span><text:span text:style-name="T2">raspberrypi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5.826cm" svg:x2="9.763cm" svg:y2="3.159cm">
          <text:p/>
        </draw:line>
        <draw:custom-shape draw:style-name="gr28" draw:text-style-name="P6" draw:layer="layout" svg:width="4.953cm" svg:height="1.524cm" svg:x="2.27cm" svg:y="3.413cm">
          <text:p text:style-name="P5"><text:span text:style-name="T1">The name we have given to</text:span></text:p>
          <text:p text:style-name="P5"><text:span text:style-name="T1">this node on our signalling network</text:span></text:p>
          <text:p text:style-name="P5"><text:span text:style-name="T4">(</text:span><text:span text:style-name="T2">Node1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4.175cm" svg:x2="8.493cm" svg:y2="3.032cm">
          <text:p/>
        </draw:line>
        <draw:custom-shape draw:style-name="gr29" draw:text-style-name="P6" draw:layer="layout" svg:width="3.302cm" svg:height="0.889cm" svg:x="15.097cm" svg:y="12.811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30" draw:text-style-name="P6" draw:layer="layout" svg:width="4.318cm" svg:height="1.778cm" svg:x="2.524cm" svg:y="14.081cm">
          <text:p text:style-name="P5"><text:span text:style-name="T1">The network name</text:span></text:p>
          <text:p text:style-name="P5"><text:span text:style-name="T1">will be </text:span><text:span text:style-name="T2">Network1</text:span></text:p>
          <text:p text:style-name="P5"><text:span text:style-name="T1">(so we’re on the same</text:span></text:p>
          <text:p text:style-name="P5"><text:span text:style-name="T1">Signalling network as Node1)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064cm" svg:height="1.778cm" svg:x="14.716cm" svg:y="14.462cm">
          <text:p text:style-name="P5"><text:span text:style-name="T1">This node on Network1</text:span></text:p>
          <text:p text:style-name="P5"><text:span text:style-name="T1">will be called </text:span><text:span text:style-name="T3">Node2</text:span></text:p>
          <text:p text:style-name="P5"><text:span text:style-name="T5">(each signalling application</text:span></text:p>
          <text:p text:style-name="P5"><text:span text:style-name="T5"><text:s/></text:span><text:span text:style-name="T5">must have a unique name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11.922cm" svg:x2="10.398cm" svg:y2="10.906cm">
          <text:p/>
        </draw:line>
        <draw:line draw:style-name="gr10" draw:text-style-name="P3" draw:layer="layout" svg:x1="14.589cm" svg:y1="11.414cm" svg:x2="12.43cm" svg:y2="10.779cm">
          <text:p/>
        </draw:line>
        <draw:line draw:style-name="gr10" draw:text-style-name="P3" draw:layer="layout" svg:x1="14.716cm" svg:y1="14.97cm" svg:x2="13.192cm" svg:y2="13.573cm">
          <text:p/>
        </draw:line>
        <draw:line draw:style-name="gr10" draw:text-style-name="P3" draw:layer="layout" svg:x1="6.842cm" svg:y1="14.843cm" svg:x2="9.763cm" svg:y2="13.573cm">
          <text:p/>
        </draw:line>
        <draw:custom-shape draw:style-name="gr32" draw:text-style-name="P6" draw:layer="layout" svg:width="4.953cm" svg:height="1.524cm" svg:x="13.954cm" svg:y="19.923cm">
          <text:p text:style-name="P5"><text:span text:style-name="T1">Node1 and Node2 should now</text:span></text:p>
          <text:p text:style-name="P5"><text:span text:style-name="T1">be showing as connected </text:span></text:p>
          <text:p text:style-name="P5"><text:span text:style-name="T1">(on both running instances</text:span></text:p>
          <text:p text:style-name="P5"><text:span text:style-name="T1">of the signalling application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954cm" svg:y1="20.431cm" svg:x2="11.287cm" svg:y2="19.542cm">
          <text:p/>
        </draw:line>
        <draw:custom-shape draw:style-name="gr33" draw:text-style-name="P6" draw:layer="layout" svg:width="5.461cm" svg:height="1.905cm" svg:x="14.208cm" svg:y="5.191cm">
          <text:p text:style-name="P5"><text:span text:style-name="T1">The network IP address that the WiFi</text:span></text:p>
          <text:p text:style-name="P5"><text:span text:style-name="T1">router has assigned to the DCC </text:span></text:p>
          <text:p text:style-name="P5"><text:span text:style-name="T1">signalling system computer and hence</text:span></text:p>
          <text:p text:style-name="P5"><text:span text:style-name="T1">the IP address of the MQTT broker</text:span></text:p>
          <text:p text:style-name="P5"><text:span text:style-name="T4">(</text:span><text:span text:style-name="T2">192.168.1.74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208cm" svg:y1="6.207cm" svg:x2="11.541cm" svg:y2="3.159cm">
          <text:p/>
        </draw:line>
        <draw:custom-shape draw:style-name="gr34" draw:text-style-name="P6" draw:layer="layout" svg:width="5.207cm" svg:height="1.143cm" svg:x="14.208cm" svg:y="3.286cm">
          <text:p text:style-name="P5"><text:span text:style-name="T1">The last time the Signalling Node was</text:span></text:p>
          <text:p text:style-name="P5"><text:span text:style-name="T1">seen (Green = Connected = Goo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208cm" svg:y1="3.921cm" svg:x2="13.192cm" svg:y2="3.159cm">
          <text:p/>
        </draw:line>
        <draw:custom-shape draw:style-name="gr35" draw:text-style-name="P6" draw:layer="layout" svg:width="5.461cm" svg:height="1.905cm" svg:x="1.762cm" svg:y="10.779cm">
          <text:p text:style-name="P5"><text:span text:style-name="T1">The network IP address that the WiFi</text:span></text:p>
          <text:p text:style-name="P5"><text:span text:style-name="T1">router assigned to the DCC </text:span></text:p>
          <text:p text:style-name="P5"><text:span text:style-name="T1">signalling system computer and hence</text:span></text:p>
          <text:p text:style-name="P5"><text:span text:style-name="T1">the IP address of the MQTT broker</text:span></text:p>
          <text:p text:style-name="P5"><text:span text:style-name="T4">(</text:span><text:span text:style-name="T2">192.168.1.74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.926cm" svg:height="1.651cm" svg:x="14.616cm" svg:y="10.652cm">
          <text:p text:style-name="P5"><text:span text:style-name="T1">As an alternative you should be able</text:span></text:p>
          <text:p text:style-name="P5"><text:span text:style-name="T1"><text:s/></text:span><text:span text:style-name="T1">to specify the ‘hostname’ of the </text:span></text:p>
          <text:p text:style-name="P5"><text:span text:style-name="T1">DCC signalling system computer</text:span></text:p>
          <text:p text:style-name="P5"><text:span text:style-name="T4">(</text:span><text:span text:style-name="T2">raspberrypi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.097cm" svg:y1="13.192cm" svg:x2="11.795cm" svg:y2="11.414cm">
          <text:p/>
        </draw:line>
      </draw:page>
      <draw:page draw:name="page3" draw:style-name="dp1" draw:master-page-name="Default">
        <draw:frame draw:style-name="gr37" draw:text-style-name="P7" draw:layer="layout" svg:width="5.687cm" svg:height="7.073cm" svg:x="13.601cm" svg:y="20.724cm">
          <draw:image xlink:href="Pictures/1000000000000165000001BCCA132BAD99FC9A81.png" xlink:type="simple" xlink:show="embed" xlink:actuate="onLoad" draw:mime-type="image/png">
            <text:p/>
          </draw:image>
        </draw:frame>
        <draw:frame draw:style-name="gr37" draw:text-style-name="P7" draw:layer="layout" svg:width="5.616cm" svg:height="6.985cm" svg:x="2.623cm" svg:y="20.812cm">
          <draw:image xlink:href="Pictures/1000000000000165000001BCF49D612665B18178.png" xlink:type="simple" xlink:show="embed" xlink:actuate="onLoad" draw:mime-type="image/png">
            <text:p/>
          </draw:image>
        </draw:frame>
        <draw:frame draw:style-name="gr37" draw:text-style-name="P7" draw:layer="layout" svg:width="5.616cm" svg:height="6.985cm" svg:x="13.573cm" svg:y="13.192cm">
          <draw:image xlink:href="Pictures/1000000000000165000001BC09D713D0A01E9587.png" xlink:type="simple" xlink:show="embed" xlink:actuate="onLoad" draw:mime-type="image/png">
            <text:p/>
          </draw:image>
        </draw:frame>
        <draw:frame draw:style-name="gr37" draw:text-style-name="P7" draw:layer="layout" svg:width="5.718cm" svg:height="7.112cm" svg:x="2.648cm" svg:y="13.192cm">
          <draw:image xlink:href="Pictures/1000000000000165000001BC894B57863B73E218.png" xlink:type="simple" xlink:show="embed" xlink:actuate="onLoad" draw:mime-type="image/png">
            <text:p/>
          </draw:image>
        </draw:frame>
        <draw:frame draw:style-name="gr38" draw:text-style-name="P3" draw:layer="layout" svg:width="16.255cm" svg:height="5.1cm" svg:x="2.525cm" svg:y="6.949cm">
          <draw:image xlink:href="Pictures/100000000000038C0000024523C6A08DEB278394.png" xlink:type="simple" xlink:show="embed" xlink:actuate="onLoad" draw:mime-type="image/png">
            <text:p/>
          </draw:image>
        </draw:frame>
        <draw:frame draw:style-name="gr39" draw:text-style-name="P3" draw:layer="layout" svg:width="16.284cm" svg:height="5.287cm" svg:x="2.524cm" svg:y="1.228cm">
          <draw:image xlink:href="Pictures/100000000000038C000002451A6EE0D82978B0DE.png" xlink:type="simple" xlink:show="embed" xlink:actuate="onLoad" draw:mime-type="image/png">
            <text:p/>
          </draw:image>
        </draw:frame>
        <draw:custom-shape draw:style-name="gr40" draw:text-style-name="P6" draw:layer="layout" svg:width="3.95cm" svg:height="1.143cm" svg:x="5.94cm" svg:y="5.8cm">
          <text:p text:style-name="P5"><text:span text:style-name="T1">These represent the same</text:span></text:p>
          <text:p text:style-name="P5"><text:span text:style-name="T1">Physical track sectio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9cm" svg:y1="6.308cm" svg:x2="14.335cm" svg:y2="5.165cm">
          <text:p/>
        </draw:line>
        <draw:line draw:style-name="gr10" draw:text-style-name="P3" draw:layer="layout" svg:x1="6.715cm" svg:y1="9.61cm" svg:x2="9.128cm" svg:y2="10.372cm">
          <text:p/>
        </draw:line>
        <draw:line draw:style-name="gr41" draw:text-style-name="P3" draw:layer="layout" svg:x1="6.715cm" svg:y1="6.943cm" svg:x2="6.715cm" svg:y2="9.61cm">
          <text:p/>
        </draw:line>
        <draw:custom-shape draw:style-name="gr42" draw:text-style-name="P6" draw:layer="layout" svg:width="3.302cm" svg:height="1.27cm" svg:x="9.128cm" svg:y="15.986cm">
          <text:p text:style-name="P5"><text:span text:style-name="T1">‘</text:span><text:span text:style-name="T1">Node1’ is subscribed to:</text:span></text:p>
          <text:p text:style-name="P5"><text:span text:style-name="T1">Signal 3 from ‘Node2’</text:span></text:p>
          <text:p text:style-name="P5"><text:span text:style-name="T1">Section 4 from ‘Node2’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2.921cm" svg:height="1.27cm" svg:x="8.836cm" svg:y="14.081cm">
          <text:p text:style-name="P5"><text:span text:style-name="T1"><text:s/>‘</text:span><text:span text:style-name="T1">Node1’ is set to</text:span></text:p>
          <text:p text:style-name="P5"><text:span text:style-name="T1">publish Section 3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836cm" svg:y1="14.843cm" svg:x2="3.286cm" svg:y2="17.51cm">
          <text:p/>
        </draw:line>
        <draw:line draw:style-name="gr10" draw:text-style-name="P3" draw:layer="layout" svg:x1="12.43cm" svg:y1="16.748cm" svg:x2="13.573cm" svg:y2="17.002cm">
          <text:p/>
        </draw:line>
        <draw:line draw:style-name="gr10" draw:text-style-name="P3" draw:layer="layout" svg:x1="12.43cm" svg:y1="16.24cm" svg:x2="13.573cm" svg:y2="16.24cm">
          <text:p/>
        </draw:line>
        <draw:custom-shape draw:style-name="gr44" draw:text-style-name="P6" draw:layer="layout" svg:width="3.302cm" svg:height="1.27cm" svg:x="9.182cm" svg:y="23.606cm">
          <text:p text:style-name="P5"><text:span text:style-name="T1">‘</text:span><text:span text:style-name="T1">Node2’ is subscribed to:</text:span></text:p>
          <text:p text:style-name="P5"><text:span text:style-name="T1">Section 3 from ‘Node1’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2.921cm" svg:height="1.651cm" svg:x="9.09cm" svg:y="21.447cm">
          <text:p text:style-name="P5"><text:span text:style-name="T1"><text:s/>‘</text:span><text:span text:style-name="T1">Node2’ is set to</text:span></text:p>
          <text:p text:style-name="P5"><text:span text:style-name="T1">Publish Signal 3</text:span></text:p>
          <text:p text:style-name="P5"><text:span text:style-name="T1">and Section 4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128cm" svg:y1="22.717cm" svg:x2="3.286cm" svg:y2="25.003cm">
          <text:p/>
        </draw:line>
        <draw:line draw:style-name="gr10" draw:text-style-name="P3" draw:layer="layout" svg:x1="12.484cm" svg:y1="24.114cm" svg:x2="13.573cm" svg:y2="24.622cm">
          <text:p/>
        </draw:line>
        <draw:line draw:style-name="gr10" draw:text-style-name="P3" draw:layer="layout" svg:x1="9.128cm" svg:y1="22.082cm" svg:x2="3.286cm" svg:y2="24.241cm">
          <text:p/>
        </draw:line>
      </draw:page>
      <draw:page draw:name="page4" draw:style-name="dp1" draw:master-page-name="Default">
        <draw:frame draw:style-name="gr37" draw:text-style-name="P7" draw:layer="layout" svg:width="5.718cm" svg:height="7.112cm" svg:x="1.762cm" svg:y="19.923cm">
          <draw:image xlink:href="Pictures/1000000000000165000001BC7851D354CE338FC7.png" xlink:type="simple" xlink:show="embed" xlink:actuate="onLoad" draw:mime-type="image/png">
            <text:p/>
          </draw:image>
        </draw:frame>
        <draw:frame draw:style-name="gr37" draw:text-style-name="P7" draw:layer="layout" svg:width="5.604cm" svg:height="6.97cm" svg:x="1.762cm" svg:y="12.43cm">
          <draw:image xlink:href="Pictures/1000000000000165000001BCEF0164848E621BDF.png" xlink:type="simple" xlink:show="embed" xlink:actuate="onLoad" draw:mime-type="image/png">
            <text:p/>
          </draw:image>
        </draw:frame>
        <draw:frame draw:style-name="gr37" draw:text-style-name="P7" draw:layer="layout" svg:width="5.565cm" svg:height="6.921cm" svg:x="13.7cm" svg:y="12.43cm">
          <draw:image xlink:href="Pictures/1000000000000165000001BC76197EB03CBACC3E.png" xlink:type="simple" xlink:show="embed" xlink:actuate="onLoad" draw:mime-type="image/png">
            <text:p/>
          </draw:image>
        </draw:frame>
        <draw:frame draw:style-name="gr46" draw:text-style-name="P3" draw:layer="layout" svg:width="5.095cm" svg:height="4.149cm" svg:x="2.382cm" svg:y="5.74cm">
          <draw:image xlink:href="Pictures/1000000000000150000001A017CBB3A60A8FB5A8.png" xlink:type="simple" xlink:show="embed" xlink:actuate="onLoad" draw:mime-type="image/png">
            <text:p/>
          </draw:image>
        </draw:frame>
        <draw:frame draw:style-name="gr47" draw:text-style-name="P3" draw:layer="layout" svg:width="5.08cm" svg:height="4.063cm" svg:x="13.954cm" svg:y="5.7cm">
          <draw:image xlink:href="Pictures/10000000000001500000019F468282747EA041F2.png" xlink:type="simple" xlink:show="embed" xlink:actuate="onLoad" draw:mime-type="image/png">
            <text:p/>
          </draw:image>
        </draw:frame>
        <draw:frame draw:style-name="gr48" draw:text-style-name="P3" draw:layer="layout" svg:width="10.52cm" svg:height="3.681cm" svg:x="2.778cm" svg:y="1.508cm">
          <draw:image xlink:href="Pictures/10000000000002B9000002B278EE16C780AA294A.png" xlink:type="simple" xlink:show="embed" xlink:actuate="onLoad" draw:mime-type="image/png">
            <text:p/>
          </draw:image>
        </draw:frame>
        <draw:custom-shape draw:style-name="gr49" draw:text-style-name="P6" draw:layer="layout" svg:width="4.064cm" svg:height="1.27cm" svg:x="8.493cm" svg:y="8.239cm">
          <text:p text:style-name="P5"><text:span text:style-name="T1">Track Section 4 (on ‘Node2’)</text:span></text:p>
          <text:p text:style-name="P5"><text:span text:style-name="T1">Is configured to ‘mirror’</text:span></text:p>
          <text:p text:style-name="P5"><text:span text:style-name="T1">Track Section 3 (on ‘Node1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6" draw:layer="layout" svg:width="3.556cm" svg:height="1.27cm" svg:x="14.589cm" svg:y="2.524cm">
          <text:p text:style-name="P5"><text:span text:style-name="T1"><text:s/></text:span><text:span text:style-name="T1">Remote Signal specified </text:span></text:p>
          <text:p text:style-name="P5"><text:span text:style-name="T1">for the ‘signal ahead’</text:span></text:p>
          <text:p text:style-name="P5"><text:span text:style-name="T1">(Signal 3 from Node2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589cm" svg:y1="3.032cm" svg:x2="12.303cm" svg:y2="2.778cm">
          <text:p/>
        </draw:line>
        <draw:custom-shape draw:style-name="gr51" draw:text-style-name="P6" draw:layer="layout" svg:width="4.064cm" svg:height="1.27cm" svg:x="8.493cm" svg:y="5.953cm">
          <text:p text:style-name="P5"><text:span text:style-name="T1">Track Section 3 (on ‘Node1’)</text:span></text:p>
          <text:p text:style-name="P5"><text:span text:style-name="T1">Is configured to ‘mirror’</text:span></text:p>
          <text:p text:style-name="P5"><text:span text:style-name="T1">Track Section 4 (on ‘Node2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557cm" svg:y1="8.874cm" svg:x2="14.462cm" svg:y2="9.382cm">
          <text:p/>
        </draw:line>
        <draw:line draw:style-name="gr10" draw:text-style-name="P3" draw:layer="layout" svg:x1="8.493cm" svg:y1="6.715cm" svg:x2="4.048cm" svg:y2="9.509cm">
          <text:p/>
        </draw:line>
        <draw:custom-shape draw:style-name="gr52" draw:text-style-name="P6" draw:layer="layout" svg:width="4.064cm" svg:height="1.27cm" svg:x="8.493cm" svg:y="13.065cm">
          <text:p text:style-name="P5"><text:span text:style-name="T1">‘</text:span><text:span text:style-name="T1">Node2’ is now configured</text:span></text:p>
          <text:p text:style-name="P5"><text:span text:style-name="T1">to publish the DCC </text:span></text:p>
          <text:p text:style-name="P5"><text:span text:style-name="T1">Command feed to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6" draw:layer="layout" svg:width="4.064cm" svg:height="1.27cm" svg:x="8.112cm" svg:y="15.097cm">
          <text:p text:style-name="P5"><text:span text:style-name="T1">‘</text:span><text:span text:style-name="T1">Node1’ is now subscribed</text:span></text:p>
          <text:p text:style-name="P5"><text:span text:style-name="T1">to the DCC Command</text:span></text:p>
          <text:p text:style-name="P5"><text:span text:style-name="T1">Feed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5.605cm" svg:x2="3.032cm" svg:y2="13.827cm">
          <text:p/>
        </draw:line>
        <draw:line draw:style-name="gr10" draw:text-style-name="P3" draw:layer="layout" svg:x1="12.557cm" svg:y1="13.7cm" svg:x2="13.7cm" svg:y2="13.827cm">
          <text:p/>
        </draw:line>
        <draw:custom-shape draw:style-name="gr54" draw:text-style-name="P6" draw:layer="layout" svg:width="4.064cm" svg:height="1.27cm" svg:x="8.239cm" svg:y="22.59cm">
          <text:p text:style-name="P5"><text:span text:style-name="T1">‘</text:span><text:span text:style-name="T1">Node2’ is now subscribed to</text:span></text:p>
          <text:p text:style-name="P5"><text:span text:style-name="T1">GPIO Sensors 3 and 4</text:span></text:p>
          <text:p text:style-name="P5"><text:span text:style-name="T1">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6" draw:layer="layout" svg:width="4.064cm" svg:height="1.27cm" svg:x="8.493cm" svg:y="24.622cm">
          <text:p text:style-name="P5"><text:span text:style-name="T1">‘</text:span><text:span text:style-name="T1">Node1’ is now publishing</text:span></text:p>
          <text:p text:style-name="P5"><text:span text:style-name="T1">GPIO Sensors 3 and 4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493cm" svg:y1="25.13cm" svg:x2="3.032cm" svg:y2="25.892cm">
          <text:p/>
        </draw:line>
        <draw:line draw:style-name="gr10" draw:text-style-name="P3" draw:layer="layout" svg:x1="12.303cm" svg:y1="23.606cm" svg:x2="13.7cm" svg:y2="25.257cm">
          <text:p/>
        </draw:line>
        <draw:frame draw:style-name="gr37" draw:text-style-name="P7" draw:layer="layout" svg:width="5.715cm" svg:height="7.108cm" svg:x="13.7cm" svg:y="19.927cm">
          <draw:image xlink:href="Pictures/1000000000000165000001BCD06E00FFA76776A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37" draw:text-style-name="P7" draw:layer="layout" svg:width="5.718cm" svg:height="7.112cm" svg:x="13.192cm" svg:y="21.066cm">
          <draw:image xlink:href="Pictures/1000000000000165000001BCE2318589A07A6353.png" xlink:type="simple" xlink:show="embed" xlink:actuate="onLoad" draw:mime-type="image/png">
            <text:p/>
          </draw:image>
        </draw:frame>
        <draw:frame draw:style-name="gr37" draw:text-style-name="P7" draw:layer="layout" svg:width="5.784cm" svg:height="7.194cm" svg:x="1.762cm" svg:y="21.111cm">
          <draw:image xlink:href="Pictures/1000000000000165000001BCDD0C44E3A5EB7F28.png" xlink:type="simple" xlink:show="embed" xlink:actuate="onLoad" draw:mime-type="image/png">
            <text:p/>
          </draw:image>
        </draw:frame>
        <draw:frame draw:style-name="gr56" draw:text-style-name="P3" draw:layer="layout" svg:width="10.469cm" svg:height="4.013cm" svg:x="1.961cm" svg:y="5.75cm">
          <draw:image xlink:href="Pictures/10000000000002B9000002B28AA1ABBC663988A7.png" xlink:type="simple" xlink:show="embed" xlink:actuate="onLoad" draw:mime-type="image/png">
            <text:p/>
          </draw:image>
        </draw:frame>
        <draw:frame draw:style-name="gr57" draw:text-style-name="P3" draw:layer="layout" svg:width="10.52cm" svg:height="4.063cm" svg:x="1.889cm" svg:y="1.127cm">
          <draw:image xlink:href="Pictures/10000000000002B9000002B276BD77CE9E682FCC.png" xlink:type="simple" xlink:show="embed" xlink:actuate="onLoad" draw:mime-type="image/png">
            <text:p/>
          </draw:image>
        </draw:frame>
        <draw:custom-shape draw:style-name="gr58" draw:text-style-name="P6" draw:layer="layout" svg:width="4.362cm" svg:height="1.397cm" svg:x="13.065cm" svg:y="4.81cm">
          <text:p text:style-name="P5"><text:span text:style-name="T1">Remote Track Sensors </text:span></text:p>
          <text:p text:style-name="P5"><text:span text:style-name="T1">(from ‘Node1’) used in the</text:span></text:p>
          <text:p text:style-name="P5"><text:span text:style-name="T1"><text:s/>‘</text:span><text:span text:style-name="T1">Node2’ layout configu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3.065cm" svg:y1="5.191cm" svg:x2="9.89cm" svg:y2="4.429cm">
          <text:p/>
        </draw:line>
        <draw:line draw:style-name="gr10" draw:text-style-name="P3" draw:layer="layout" svg:x1="13.065cm" svg:y1="5.953cm" svg:x2="9.89cm" svg:y2="8.874cm">
          <text:p/>
        </draw:line>
        <draw:frame draw:style-name="gr59" draw:text-style-name="P3" draw:layer="layout" svg:width="11.802cm" svg:height="3.809cm" svg:x="1.889cm" svg:y="10.906cm">
          <draw:image xlink:href="Pictures/10000000000003350000024532F5BE0472C488F5.png" xlink:type="simple" xlink:show="embed" xlink:actuate="onLoad" draw:mime-type="image/png">
            <text:p/>
          </draw:image>
        </draw:frame>
        <draw:frame draw:style-name="gr60" draw:text-style-name="P3" draw:layer="layout" svg:width="11.811cm" svg:height="3.853cm" svg:x="5.699cm" svg:y="15.689cm">
          <draw:image xlink:href="Pictures/100000000000033500000245D58202A4BE641F90.png" xlink:type="simple" xlink:show="embed" xlink:actuate="onLoad" draw:mime-type="image/png">
            <text:p/>
          </draw:image>
        </draw:frame>
        <draw:custom-shape draw:style-name="gr61" draw:text-style-name="P6" draw:layer="layout" svg:width="2.54cm" svg:height="0.762cm" svg:x="14.707cm" svg:y="12.43cm">
          <text:p text:style-name="P5"><text:span text:style-name="T1">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6" draw:layer="layout" svg:width="2.54cm" svg:height="0.762cm" svg:x="2.016cm" svg:y="17.129cm">
          <text:p text:style-name="P5"><text:span text:style-name="T1">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4.556cm" svg:y1="17.51cm" svg:x2="6.08cm" svg:y2="17.637cm">
          <text:p/>
        </draw:line>
        <draw:line draw:style-name="gr10" draw:text-style-name="P3" draw:layer="layout" svg:x1="14.707cm" svg:y1="12.811cm" svg:x2="13.31cm" svg:y2="12.938cm">
          <text:p/>
        </draw:line>
        <draw:custom-shape draw:style-name="gr63" draw:text-style-name="P6" draw:layer="layout" svg:width="3.81cm" svg:height="1.016cm" svg:x="8.464cm" svg:y="23.058cm">
          <text:p text:style-name="P5"><text:span text:style-name="T1">‘</text:span><text:span text:style-name="T1">Node1’ is publishing</text:span></text:p>
          <text:p text:style-name="P5"><text:span text:style-name="T1">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6" draw:layer="layout" svg:width="3.81cm" svg:height="1.016cm" svg:x="8.464cm" svg:y="24.709cm">
          <text:p text:style-name="P5"><text:span text:style-name="T1">‘</text:span><text:span text:style-name="T1">Node1’ is subscribing to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464cm" svg:y1="23.566cm" svg:x2="2.397cm" svg:y2="26.273cm">
          <text:p/>
        </draw:line>
        <draw:line draw:style-name="gr10" draw:text-style-name="P3" draw:layer="layout" svg:x1="12.274cm" svg:y1="25.217cm" svg:x2="13.319cm" svg:y2="25.638cm">
          <text:p/>
        </draw:line>
      </draw:page>
      <draw:page draw:name="page6" draw:style-name="dp1" draw:master-page-name="Default">
        <draw:frame draw:style-name="gr37" draw:text-style-name="P7" draw:layer="layout" svg:width="5.617cm" svg:height="6.987cm" svg:x="2.016cm" svg:y="1.506cm">
          <draw:image xlink:href="Pictures/1000000000000165000001BCA8D0B1EF42617086.png" xlink:type="simple" xlink:show="embed" xlink:actuate="onLoad" draw:mime-type="image/png">
            <text:p/>
          </draw:image>
        </draw:frame>
        <draw:frame draw:style-name="gr65" draw:text-style-name="P3" draw:layer="layout" svg:width="10.922cm" svg:height="3.803cm" svg:x="1.889cm" svg:y="16.247cm">
          <draw:image xlink:href="Pictures/10000000000002B9000002B2BC69ADEF58F7CD77.png" xlink:type="simple" xlink:show="embed" xlink:actuate="onLoad" draw:mime-type="image/png">
            <text:p/>
          </draw:image>
        </draw:frame>
        <draw:frame draw:style-name="gr66" draw:text-style-name="P3" draw:layer="layout" svg:width="10.922cm" svg:height="3.799cm" svg:x="1.889cm" svg:y="20.685cm">
          <draw:image xlink:href="Pictures/10000000000002B9000002B2E1A08D675E5CE56A.png" xlink:type="simple" xlink:show="embed" xlink:actuate="onLoad" draw:mime-type="image/png">
            <text:p/>
          </draw:image>
        </draw:frame>
        <draw:custom-shape draw:style-name="gr67" draw:text-style-name="P6" draw:layer="layout" svg:width="3.81cm" svg:height="1.016cm" svg:x="8.271cm" svg:y="3.413cm">
          <text:p text:style-name="P5"><text:span text:style-name="T1">‘</text:span><text:span text:style-name="T1">Node2’ is publishing</text:span></text:p>
          <text:p text:style-name="P5"><text:span text:style-name="T1">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8" draw:text-style-name="P6" draw:layer="layout" svg:width="3.81cm" svg:height="1.016cm" svg:x="8.239cm" svg:y="5.572cm">
          <text:p text:style-name="P5"><text:span text:style-name="T1">‘</text:span><text:span text:style-name="T1">Node2’ is subscribing to</text:span></text:p>
          <text:p text:style-name="P5"><text:span text:style-name="T1">Instrument 1 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271cm" svg:y1="3.921cm" svg:x2="2.778cm" svg:y2="6.588cm">
          <text:p/>
        </draw:line>
        <draw:frame draw:style-name="gr2" draw:text-style-name="P3" draw:layer="layout" svg:width="5.334cm" svg:height="5.025cm" svg:x="2.016cm" svg:y="10.017cm">
          <draw:image xlink:href="Pictures/100000000000014700000134B79E91F0C4300D49.png" xlink:type="simple" xlink:show="embed" xlink:actuate="onLoad" draw:mime-type="image/png">
            <text:p/>
          </draw:image>
        </draw:frame>
        <draw:frame draw:style-name="gr2" draw:text-style-name="P3" draw:layer="layout" svg:width="5.394cm" svg:height="5.08cm" svg:x="13.132cm" svg:y="10.017cm">
          <draw:image xlink:href="Pictures/1000000000000147000001340D872148305F063F.png" xlink:type="simple" xlink:show="embed" xlink:actuate="onLoad" draw:mime-type="image/png">
            <text:p/>
          </draw:image>
        </draw:frame>
        <draw:custom-shape draw:style-name="gr69" draw:text-style-name="P6" draw:layer="layout" svg:width="3.81cm" svg:height="1.27cm" svg:x="8.366cm" svg:y="10.525cm">
          <text:p text:style-name="P5"><text:span text:style-name="T1">Instrument 1 on ‘Node1’</text:span></text:p>
          <text:p text:style-name="P5"><text:span text:style-name="T1">Is now linked to 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0" draw:text-style-name="P6" draw:layer="layout" svg:width="3.81cm" svg:height="1.27cm" svg:x="8.493cm" svg:y="13.065cm">
          <text:p text:style-name="P5"><text:span text:style-name="T1">Instrument 2 on ‘Node2’</text:span></text:p>
          <text:p text:style-name="P5"><text:span text:style-name="T1">Is now linked to </text:span></text:p>
          <text:p text:style-name="P5"><text:span text:style-name="T1">Instrument 1 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303cm" svg:y1="13.573cm" svg:x2="15.732cm" svg:y2="12.684cm">
          <text:p/>
        </draw:line>
        <draw:line draw:style-name="gr10" draw:text-style-name="P3" draw:layer="layout" svg:x1="8.366cm" svg:y1="11.16cm" svg:x2="6.334cm" svg:y2="12.176cm">
          <text:p/>
        </draw:line>
        <draw:custom-shape draw:style-name="gr71" draw:text-style-name="P6" draw:layer="layout" svg:width="3.302cm" svg:height="0.508cm" svg:x="3.032cm" svg:y="9.382cm">
          <text:p text:style-name="P5"><text:span text:style-name="T1">Node 1 – 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2" draw:text-style-name="P6" draw:layer="layout" svg:width="3.302cm" svg:height="0.508cm" svg:x="14.208cm" svg:y="9.382cm">
          <text:p text:style-name="P5"><text:span text:style-name="T1">Node 2 – 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3" draw:text-style-name="P6" draw:layer="layout" svg:width="3.81cm" svg:height="1.27cm" svg:x="14.462cm" svg:y="16.875cm">
          <text:p text:style-name="P5"><text:span text:style-name="T1">On ‘Node1’:</text:span></text:p>
          <text:p text:style-name="P5"><text:span text:style-name="T1">Signal 10 is interlocked</text:span></text:p>
          <text:p text:style-name="P5"><text:span text:style-name="T1">With Block 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4" draw:text-style-name="P6" draw:layer="layout" svg:width="3.81cm" svg:height="1.27cm" svg:x="14.462cm" svg:y="21.32cm">
          <text:p text:style-name="P5"><text:span text:style-name="T1">On ‘Node2’:</text:span></text:p>
          <text:p text:style-name="P5"><text:span text:style-name="T1">Signal 13 is interlocked</text:span></text:p>
          <text:p text:style-name="P5"><text:span text:style-name="T1">With Block 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4.462cm" svg:y1="17.383cm" svg:x2="12.684cm" svg:y2="17.637cm">
          <text:p/>
        </draw:line>
        <draw:line draw:style-name="gr10" draw:text-style-name="P3" draw:layer="layout" svg:x1="14.462cm" svg:y1="21.828cm" svg:x2="12.684cm" svg:y2="22.082cm">
          <text:p/>
        </draw:line>
        <draw:frame draw:style-name="gr37" draw:text-style-name="P7" draw:layer="layout" svg:width="5.615cm" svg:height="6.984cm" svg:x="12.811cm" svg:y="1.509cm">
          <draw:image xlink:href="Pictures/1000000000000165000001BC09D764D6196394BF.png" xlink:type="simple" xlink:show="embed" xlink:actuate="onLoad" draw:mime-type="image/png">
            <text:p/>
          </draw:image>
        </draw:frame>
        <draw:line draw:style-name="gr10" draw:text-style-name="P3" draw:layer="layout" svg:x1="12.049cm" svg:y1="6.08cm" svg:x2="12.938cm" svg:y2="6.207cm">
          <text:p/>
        </draw:line>
      </draw:page>
      <draw:page draw:name="page7" draw:style-name="dp1" draw:master-page-name="Default">
        <draw:frame draw:style-name="gr37" draw:text-style-name="P7" draw:layer="layout" svg:width="5.616cm" svg:height="6.985cm" svg:x="13.291cm" svg:y="9.636cm">
          <draw:image xlink:href="Pictures/1000000000000165000001BCF89C29C7B3195219.png" xlink:type="simple" xlink:show="embed" xlink:actuate="onLoad" draw:mime-type="image/png">
            <text:p/>
          </draw:image>
        </draw:frame>
        <draw:frame draw:style-name="gr37" draw:text-style-name="P7" draw:layer="layout" svg:width="5.635cm" svg:height="7.008cm" svg:x="1.842cm" svg:y="9.763cm">
          <draw:image xlink:href="Pictures/1000000000000165000001BCC701AC37A75C361B.png" xlink:type="simple" xlink:show="embed" xlink:actuate="onLoad" draw:mime-type="image/png">
            <text:p/>
          </draw:image>
        </draw:frame>
        <draw:custom-shape draw:style-name="gr75" draw:text-style-name="P6" draw:layer="layout" svg:width="3.81cm" svg:height="1.016cm" svg:x="8.112cm" svg:y="9.89cm">
          <text:p text:style-name="P5"><text:span text:style-name="T1">‘</text:span><text:span text:style-name="T1">Node2’ is publishing the</text:span></text:p>
          <text:p text:style-name="P5"><text:span text:style-name="T1">DCC Loco command fe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1.541cm" svg:x2="6.969cm" svg:y2="12.303cm">
          <text:p/>
        </draw:line>
        <draw:custom-shape draw:style-name="gr76" draw:text-style-name="P6" draw:layer="layout" svg:width="3.81cm" svg:height="1.016cm" svg:x="8.112cm" svg:y="11.16cm">
          <text:p text:style-name="P5"><text:span text:style-name="T1">‘</text:span><text:span text:style-name="T1">Node1 is the main </text:span></text:p>
          <text:p text:style-name="P5"><text:span text:style-name="T1">Signalling Node (hosting </text:span></text:p>
          <text:p text:style-name="P5"><text:span text:style-name="T1">the DCC bus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7" draw:text-style-name="P6" draw:layer="layout" svg:width="4.445cm" svg:height="0.889cm" svg:x="2.524cm" svg:y="8.747cm">
          <text:p text:style-name="P5"><text:span text:style-name="T1">‘</text:span><text:span text:style-name="T1">Node2’ Configuration</text:span></text:p>
          <text:p text:style-name="P5"><text:span text:style-name="T1">(Hosting the remote throttles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0.271cm" svg:x2="2.778cm" svg:y2="11.795cm">
          <text:p/>
        </draw:line>
        <draw:custom-shape draw:style-name="gr78" draw:text-style-name="P6" draw:layer="layout" svg:width="4.318cm" svg:height="1.27cm" svg:x="8.239cm" svg:y="13.7cm">
          <text:p text:style-name="P5"><text:span text:style-name="T1">‘</text:span><text:span text:style-name="T1">Node1’ is subscribed to the</text:span></text:p>
          <text:p text:style-name="P5"><text:span text:style-name="T1">DCC Loco command feed</text:span></text:p>
          <text:p text:style-name="P5"><text:span text:style-name="T1">From the throttles on Node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0.779cm" svg:y1="13.7cm" svg:x2="13.446cm" svg:y2="11.795cm">
          <text:p/>
        </draw:line>
        <draw:custom-shape draw:style-name="gr79" draw:text-style-name="P6" draw:layer="layout" svg:width="4.445cm" svg:height="0.889cm" svg:x="13.827cm" svg:y="8.62cm">
          <text:p text:style-name="P5"><text:span text:style-name="T1">‘</text:span><text:span text:style-name="T1">Node1 Configuration</text:span></text:p>
          <text:p text:style-name="P5"><text:span text:style-name="T1">(The Main DCC Signalling Node)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1T12:37:07.106660985</meta:creation-date>
    <dc:date>2026-03-21T11:27:56.296169425</dc:date>
    <meta:editing-duration>PT6H45M15S</meta:editing-duration>
    <meta:editing-cycles>22</meta:editing-cycles>
    <meta:generator>LibreOffice/7.0.4.2$Linux_AARCH64 LibreOffice_project/00$Build-2</meta:generator>
    <meta:document-statistic meta:object-count="165"/>
  </office:meta>
</office:document-meta>
</file>