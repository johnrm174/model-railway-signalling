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F00000080149223C0FAB89B4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 svg:font-family="Consolas, Menlo, 'Deja Vu Sans Mono', 'Bitstream Vera Sans Mono', monospace"/>
    <style:font-face style:name="var fontStack-monospace" svg:font-family="'var fontStack-monospace', ui-monospace, SFMono-Regular, 'SF Mono', Menlo, Consolas, 'Liberation Mono', monospace"/>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normal" officeooo:rsid="001febc1" officeooo:paragraph-rsid="001febc1" style:font-weight-asian="normal" style:font-weight-complex="normal"/>
    </style:style>
    <style:style style:name="P2" style:family="paragraph" style:parent-style-name="Text_20_body">
      <style:text-properties officeooo:paragraph-rsid="001febc1"/>
    </style:style>
    <style:style style:name="P3" style:family="paragraph" style:parent-style-name="Text_20_body">
      <style:paragraph-properties fo:text-align="center" style:justify-single-word="false"/>
      <style:text-properties officeooo:paragraph-rsid="0022c2df"/>
    </style:style>
    <style:style style:name="P4" style:family="paragraph" style:parent-style-name="Text_20_body">
      <style:paragraph-properties fo:text-align="center" style:justify-single-word="false"/>
      <style:text-properties officeooo:paragraph-rsid="00286c4c"/>
    </style:style>
    <style:style style:name="P5" style:family="paragraph" style:parent-style-name="Text_20_body">
      <style:text-properties officeooo:paragraph-rsid="00286c4c"/>
    </style:style>
    <style:style style:name="P6" style:family="paragraph" style:parent-style-name="Text_20_body">
      <style:paragraph-properties fo:text-align="center" style:justify-single-word="false"/>
      <style:text-properties style:font-name="Liberation Sans" officeooo:rsid="00286c4c" officeooo:paragraph-rsid="00286c4c" style:font-name-asian="DejaVu Sans" style:font-name-complex="FreeSans"/>
    </style:style>
    <style:style style:name="P7" style:family="paragraph" style:parent-style-name="Text_20_body">
      <style:text-properties style:font-name="Liberation Sans1" officeooo:rsid="00286c4c" officeooo:paragraph-rsid="00286c4c" style:font-name-asian="DejaVu Sans" style:font-name-complex="FreeSans"/>
    </style:style>
    <style:style style:name="P8" style:family="paragraph" style:parent-style-name="Text_20_body">
      <style:paragraph-properties fo:text-align="center" style:justify-single-word="false"/>
      <style:text-properties officeooo:rsid="002a47f0" officeooo:paragraph-rsid="002a47f0"/>
    </style:style>
    <style:style style:name="P9" style:family="paragraph" style:parent-style-name="Text_20_body">
      <style:text-properties officeooo:rsid="003af776" officeooo:paragraph-rsid="003af776"/>
    </style:style>
    <style:style style:name="P10" style:family="paragraph" style:parent-style-name="Text_20_body">
      <style:text-properties officeooo:paragraph-rsid="003af776"/>
    </style:style>
    <style:style style:name="P11" style:family="paragraph" style:parent-style-name="Text_20_body">
      <style:text-properties officeooo:rsid="003cf199" officeooo:paragraph-rsid="003cf199"/>
    </style:style>
    <style:style style:name="P12" style:family="paragraph" style:parent-style-name="Text_20_body">
      <style:text-properties officeooo:paragraph-rsid="003d44d0"/>
    </style:style>
    <style:style style:name="P13" style:family="paragraph" style:parent-style-name="Text_20_body">
      <style:text-properties officeooo:rsid="003d44d0" officeooo:paragraph-rsid="003d44d0"/>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Preformatted_20_Text">
      <style:paragraph-properties fo:margin-left="0.4925in" fo:margin-right="0in" fo:text-indent="0in" style:auto-text-indent="false"/>
      <style:text-properties fo:font-variant="normal" fo:text-transform="none" fo:color="#8d281e" loext:opacity="100%" style:font-name="Consolas" fo:letter-spacing="normal" fo:font-style="normal" fo:font-weight="normal" officeooo:rsid="003cf199" officeooo:paragraph-rsid="003cf199"/>
    </style:style>
    <style:style style:name="P16" style:family="paragraph" style:parent-style-name="Preformatted_20_Text">
      <style:paragraph-properties fo:margin-left="0.4925in" fo:margin-right="0in" fo:text-indent="0in" style:auto-text-indent="false"/>
      <style:text-properties fo:font-variant="normal" fo:text-transform="none" fo:color="#8d281e" loext:opacity="100%" style:font-name="Consolas" fo:letter-spacing="normal" fo:font-style="normal" fo:font-weight="normal" officeooo:rsid="003cf199" officeooo:paragraph-rsid="003d44d0"/>
    </style:style>
    <style:style style:name="P17" style:family="paragraph" style:parent-style-name="Preformatted_20_Text">
      <style:paragraph-properties fo:margin-left="0.4925in" fo:margin-right="0in" fo:text-indent="0in" style:auto-text-indent="false"/>
      <style:text-properties fo:font-variant="normal" fo:text-transform="none" fo:color="#8d281e"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P18"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fo:font-variant="normal" fo:text-transform="none" fo:color="#8d281e"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P19"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fo:font-variant="normal" fo:text-transform="none" fo:color="#8d281e" loext:opacity="100%" style:font-name="Consolas" fo:font-size="10pt" fo:letter-spacing="normal" fo:font-style="normal" fo:font-weight="normal"/>
    </style:style>
    <style:style style:name="P20"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fo:font-variant="normal" fo:text-transform="none" fo:color="#8d281e" loext:opacity="100%" style:font-name="Consolas" fo:font-size="10pt" fo:letter-spacing="normal" fo:font-style="normal" fo:font-weight="normal" officeooo:paragraph-rsid="003d44d0"/>
    </style:style>
    <style:style style:name="P21"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2"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officeooo:paragraph-rsid="003d44d0"/>
    </style:style>
    <style:style style:name="P23" style:family="paragraph" style:parent-style-name="Heading_20_1">
      <style:paragraph-properties fo:break-before="page"/>
      <style:text-properties officeooo:rsid="003af776" officeooo:paragraph-rsid="003af776"/>
    </style:style>
    <style:style style:name="P24" style:family="paragraph" style:parent-style-name="Heading_20_1">
      <style:paragraph-properties fo:break-before="page"/>
      <style:text-properties officeooo:rsid="003d44d0" officeooo:paragraph-rsid="003d44d0"/>
    </style:style>
    <style:style style:name="P25" style:family="paragraph" style:parent-style-name="Heading_20_2">
      <style:paragraph-properties fo:break-before="page"/>
      <style:text-properties officeooo:paragraph-rsid="003e43b7"/>
    </style:style>
    <style:style style:name="P26" style:family="paragraph" style:parent-style-name="Heading_20_4">
      <style:text-properties officeooo:rsid="003d44d0" officeooo:paragraph-rsid="003e43b7"/>
    </style:style>
    <style:style style:name="P27" style:family="paragraph" style:parent-style-name="Heading_20_4">
      <style:text-properties officeooo:paragraph-rsid="003e43b7"/>
    </style:style>
    <style:style style:name="P28"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officeooo:paragraph-rsid="003e43b7"/>
    </style:style>
    <style:style style:name="P29"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fo:font-variant="normal" fo:text-transform="none" fo:color="#8d281e" loext:opacity="100%" style:font-name="Consolas" fo:font-size="10pt" fo:letter-spacing="normal" fo:font-style="normal" fo:font-weight="normal" officeooo:rsid="003cf199" officeooo:paragraph-rsid="003e43b7" style:font-name-asian="Liberation Mono" style:font-size-asian="10pt" style:font-name-complex="Liberation Mono" style:font-size-complex="10pt"/>
    </style:style>
    <style:style style:name="P30"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fo:font-variant="normal" fo:text-transform="none" fo:color="#8d281e" loext:opacity="100%" style:font-name="Consolas" fo:font-size="10pt" fo:letter-spacing="normal" fo:font-style="normal" fo:font-weight="normal" officeooo:paragraph-rsid="003e43b7"/>
    </style:style>
    <style:style style:name="P31"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officeooo:paragraph-rsid="003e43b7"/>
    </style:style>
    <style:style style:name="P32" style:family="paragraph" style:parent-style-name="Text_20_body" style:list-style-name="L1">
      <style:text-properties officeooo:paragraph-rsid="003d44d0"/>
    </style:style>
    <style:style style:name="P33" style:family="paragraph" style:parent-style-name="Text_20_body" style:list-style-name="L1">
      <style:text-properties officeooo:paragraph-rsid="003e43b7"/>
    </style:style>
    <style:style style:name="P34" style:family="paragraph" style:parent-style-name="Text_20_body">
      <style:text-properties officeooo:rsid="003d44d0" officeooo:paragraph-rsid="003d44d0"/>
    </style:style>
    <style:style style:name="P35" style:family="paragraph" style:parent-style-name="Text_20_body">
      <style:text-properties officeooo:rsid="003d44d0" officeooo:paragraph-rsid="003e43b7"/>
    </style:style>
    <style:style style:name="P36" style:family="paragraph" style:parent-style-name="Text_20_body" style:list-style-name="L2">
      <style:text-properties officeooo:paragraph-rsid="003d44d0"/>
    </style:style>
    <style:style style:name="P37" style:family="paragraph" style:parent-style-name="Text_20_body">
      <style:text-properties fo:color="#c9211e" loext:opacity="100%" fo:font-weight="bold" officeooo:rsid="00328d6a" style:font-weight-asian="bold" style:font-weight-complex="bold"/>
    </style:style>
    <style:style style:name="P38" style:family="paragraph" style:parent-style-name="Text_20_body">
      <style:text-properties officeooo:paragraph-rsid="003e43b7"/>
    </style:style>
    <style:style style:name="P39" style:family="paragraph" style:parent-style-name="Text_20_body">
      <style:text-properties officeooo:paragraph-rsid="00409799"/>
    </style:style>
    <style:style style:name="P40" style:family="paragraph" style:parent-style-name="Text_20_body">
      <style:text-properties fo:font-variant="normal" fo:text-transform="none" fo:color="#8d281e"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P41"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1f2328" loext:opacity="100%" style:font-name="var fontStack-monospace" fo:font-size="9.75pt" fo:letter-spacing="normal" fo:font-style="normal" fo:font-weight="normal" officeooo:rsid="004139c2" officeooo:paragraph-rsid="004139c2" style:font-name-asian="Liberation Mono" style:font-size-asian="10pt" style:font-name-complex="Liberation Mono" style:font-size-complex="10pt"/>
    </style:style>
    <style:style style:name="P42" style:family="paragraph" style:parent-style-name="Text_20_body">
      <style:paragraph-properties fo:margin-left="0.4925in" fo:margin-right="0in" fo:text-indent="0in" style:auto-text-indent="false"/>
    </style:style>
    <style:style style:name="P43" style:family="paragraph" style:parent-style-name="Text_20_body">
      <style:paragraph-properties fo:margin-left="0.4925in" fo:margin-right="0in" fo:text-indent="0in" style:auto-text-indent="false"/>
      <style:text-properties officeooo:paragraph-rsid="00409799"/>
    </style:style>
    <style:style style:name="P44" style:family="paragraph" style:parent-style-name="Text_20_body">
      <style:paragraph-properties fo:margin-left="0.4925in" fo:margin-right="0in" fo:text-indent="0in" style:auto-text-indent="false"/>
      <style:text-properties fo:font-style="italic" officeooo:rsid="00409799" officeooo:paragraph-rsid="00409799"/>
    </style:style>
    <style:style style:name="T1" style:family="text">
      <style:text-properties fo:font-weight="normal" officeooo:rsid="001febc1"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4139c2" style:font-name-asian="Liberation Mono" style:font-size-asian="10pt" style:font-style-asian="italic" style:font-name-complex="Liberation Mono" style:font-size-complex="10pt" style:font-style-complex="italic"/>
    </style:style>
    <style:style style:name="T4" style:family="text">
      <style:text-properties officeooo:rsid="001febc1"/>
    </style:style>
    <style:style style:name="T5" style:family="text">
      <style:text-properties style:font-name="Liberation Sans1" officeooo:rsid="00286c4c" style:font-name-asian="DejaVu Sans" style:font-name-complex="FreeSans"/>
    </style:style>
    <style:style style:name="T6" style:family="text">
      <style:text-properties style:font-name="Liberation Sans" officeooo:rsid="00286c4c" style:font-name-asian="DejaVu Sans" style:font-name-complex="FreeSans"/>
    </style:style>
    <style:style style:name="T7" style:family="text">
      <style:text-properties style:font-name="Liberation Sans" fo:font-size="16.1000003814697pt" fo:font-weight="bold" officeooo:rsid="003e43b7" style:font-name-asian="DejaVu Sans" style:font-size-asian="16.1000003814697pt" style:font-weight-asian="bold" style:font-name-complex="FreeSans" style:font-size-complex="16.1000003814697pt" style:font-weight-complex="bold"/>
    </style:style>
    <style:style style:name="T8" style:family="text">
      <style:text-properties fo:font-style="normal" style:font-style-asian="normal" style:font-style-complex="normal"/>
    </style:style>
    <style:style style:name="T9" style:family="text">
      <style:text-properties fo:font-style="normal" officeooo:rsid="003d44d0" style:font-style-asian="normal" style:font-style-complex="normal"/>
    </style:style>
    <style:style style:name="T10" style:family="text">
      <style:text-properties fo:font-variant="normal" fo:text-transform="none" fo:color="#8d281e" loext:opacity="100%" style:font-name="Consolas" fo:font-size="10pt" fo:letter-spacing="normal" fo:font-style="normal" fo:font-weight="normal" style:font-name-asian="Liberation Mono" style:font-size-asian="10pt" style:font-name-complex="Liberation Mono" style:font-size-complex="10pt"/>
    </style:style>
    <style:style style:name="T11" style:family="text">
      <style:text-properties fo:font-variant="normal" fo:text-transform="none" fo:color="#8d281e"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T12" style:family="text">
      <style:text-properties fo:font-variant="normal" fo:text-transform="none" fo:color="#8d281e" loext:opacity="100%" style:font-name="Consolas" fo:font-size="10pt" fo:letter-spacing="normal" fo:font-style="normal" fo:font-weight="normal" officeooo:rsid="003d44d0" style:font-name-asian="Liberation Mono" style:font-size-asian="10pt" style:font-name-complex="Liberation Mono" style:font-size-complex="10pt"/>
    </style:style>
    <style:style style:name="T13" style:family="text">
      <style:text-properties fo:font-variant="normal" fo:text-transform="none" fo:color="#8d281e" loext:opacity="100%" style:font-name="Consolas" fo:font-size="10pt" fo:letter-spacing="normal" fo:font-style="normal" fo:font-weight="normal" officeooo:rsid="00409799" style:font-name-asian="Liberation Mono" style:font-size-asian="10pt" style:font-name-complex="Liberation Mono" style:font-size-complex="10pt"/>
    </style:style>
    <style:style style:name="T14" style:family="text">
      <style:text-properties fo:font-variant="normal" fo:text-transform="none" fo:color="#8d281e" loext:opacity="100%" style:font-name="Consolas" fo:font-size="10pt" fo:letter-spacing="normal" fo:font-style="normal" fo:font-weight="normal" officeooo:rsid="003cf199" style:font-name-asian="Liberation Mono" style:font-size-asian="10pt" style:font-style-asian="normal" style:font-name-complex="Liberation Mono" style:font-size-complex="10pt" style:font-style-complex="normal"/>
    </style:style>
    <style:style style:name="T15" style:family="text">
      <style:text-properties fo:font-variant="normal" fo:text-transform="none" fo:color="#8d281e" loext:opacity="100%" style:font-name="Consolas" fo:font-size="10pt" fo:letter-spacing="normal" fo:font-style="normal" fo:font-weight="normal" officeooo:rsid="003d44d0" style:font-name-asian="Liberation Mono" style:font-size-asian="10pt" style:font-style-asian="italic" style:font-name-complex="Liberation Mono" style:font-size-complex="10pt" style:font-style-complex="italic"/>
    </style:style>
    <style:style style:name="T16" style:family="text">
      <style:text-properties fo:font-variant="normal" fo:text-transform="none" fo:color="#8d281e" loext:opacity="100%" style:font-name="Consolas" fo:font-size="10pt" fo:letter-spacing="normal" fo:font-weight="normal" officeooo:rsid="003cf199" style:font-name-asian="Liberation Mono" style:font-size-asian="10pt" style:font-style-asian="italic" style:font-name-complex="Liberation Mono" style:font-size-complex="10pt" style:font-style-complex="italic"/>
    </style:style>
    <style:style style:name="T17" style:family="text">
      <style:text-properties fo:font-variant="normal" fo:text-transform="none" fo:color="#8d281e" loext:opacity="100%" style:font-name="Consolas" fo:font-size="10pt" fo:letter-spacing="normal" fo:font-weight="normal" officeooo:rsid="003d44d0" style:font-name-asian="Liberation Mono" style:font-size-asian="10pt" style:font-style-asian="italic" style:font-name-complex="Liberation Mono" style:font-size-complex="10pt" style:font-style-complex="italic"/>
    </style:style>
    <style:style style:name="T18" style:family="text">
      <style:text-properties fo:font-variant="normal" fo:text-transform="none" fo:color="#000000" loext:opacity="100%" style:font-name="Consolas" fo:font-size="10pt" fo:letter-spacing="normal" fo:font-style="normal" fo:font-weight="normal" officeooo:rsid="003d44d0" style:font-name-asian="Liberation Mono" style:font-size-asian="10pt" style:font-name-complex="Liberation Mono" style:font-size-complex="10pt"/>
    </style:style>
    <style:style style:name="T19" style:family="text">
      <style:text-properties fo:font-variant="normal" fo:text-transform="none" fo:color="#000000"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T20" style:family="text">
      <style:text-properties fo:font-variant="normal" fo:text-transform="none" fo:color="#000000" loext:opacity="100%" style:font-name="Consolas" fo:font-size="10pt" fo:letter-spacing="normal" fo:font-style="normal" fo:font-weight="normal" officeooo:rsid="004139c2" style:font-name-asian="Liberation Mono" style:font-size-asian="10pt" style:font-name-complex="Liberation Mono" style:font-size-complex="10pt"/>
    </style:style>
    <style:style style:name="T21" style:family="text">
      <style:text-properties fo:font-variant="normal" fo:text-transform="none" fo:color="#000000" loext:opacity="100%" style:font-name="Consolas" fo:font-size="10pt" fo:letter-spacing="normal" fo:font-style="italic" fo:font-weight="normal" officeooo:rsid="004139c2" style:font-name-asian="Liberation Mono" style:font-size-asian="10pt" style:font-style-asian="italic" style:font-name-complex="Liberation Mono" style:font-size-complex="10pt" style:font-style-complex="italic"/>
    </style:style>
    <style:style style:name="T22" style:family="text">
      <style:text-properties officeooo:rsid="003af776"/>
    </style:style>
    <style:style style:name="T23" style:family="text">
      <style:text-properties officeooo:rsid="003cf199"/>
    </style:style>
    <style:style style:name="T24" style:family="text">
      <style:text-properties officeooo:rsid="003d44d0"/>
    </style:style>
    <style:style style:name="T25" style:family="text">
      <style:text-properties fo:color="#8d281e" loext:opacity="100%" style:font-name="Consolas" fo:font-size="10pt" officeooo:rsid="003cf199" style:font-name-asian="Liberation Mono" style:font-size-asian="10pt" style:font-name-complex="Liberation Mono" style:font-size-complex="10pt"/>
    </style:style>
    <style:style style:name="T26" style:family="text">
      <style:text-properties fo:color="#8d281e" loext:opacity="100%" style:font-name="Consolas" fo:font-size="10pt" officeooo:rsid="003d44d0" style:font-name-asian="Liberation Mono" style:font-size-asian="10pt" style:font-name-complex="Liberation Mono" style:font-size-complex="10pt"/>
    </style:style>
    <style:style style:name="T27" style:family="text">
      <style:text-properties officeooo:rsid="003d44d0" style:font-name-asian="Liberation Mono" style:font-size-asian="10pt" style:font-name-complex="Liberation Mono" style:font-size-complex="10pt"/>
    </style:style>
    <style:style style:name="T28" style:family="text">
      <style:text-properties officeooo:rsid="003cf199" style:font-name-asian="Liberation Mono" style:font-size-asian="10pt" style:font-name-complex="Liberation Mono" style:font-size-complex="10pt"/>
    </style:style>
    <style:style style:name="T29" style:family="text">
      <style:text-properties officeooo:rsid="004139c2" style:font-name-asian="Liberation Mono" style:font-size-asian="10pt" style:font-name-complex="Liberation Mono" style:font-size-complex="10pt"/>
    </style:style>
    <style:style style:name="T30" style:family="text">
      <style:text-properties fo:color="#000000" loext:opacity="100%"/>
    </style:style>
    <style:style style:name="T31" style:family="text">
      <style:text-properties fo:color="#000000" loext:opacity="100%" style:font-name="Consolas" fo:font-size="10pt" officeooo:rsid="003cf199" style:font-name-asian="Liberation Mono" style:font-size-asian="10pt" style:font-name-complex="Liberation Mono" style:font-size-complex="10pt"/>
    </style:style>
    <style:style style:name="T32" style:family="text">
      <style:text-properties fo:color="#000000" loext:opacity="100%" officeooo:rsid="003cf199" style:font-name-asian="Liberation Mono" style:font-size-asian="10pt" style:font-name-complex="Liberation Mono" style:font-size-complex="10pt"/>
    </style:style>
    <style:style style:name="T33" style:family="text">
      <style:text-properties fo:color="#000000" loext:opacity="100%" officeooo:rsid="003d44d0"/>
    </style:style>
    <style:style style:name="T34" style:family="text">
      <style:text-properties officeooo:rsid="003e43b7"/>
    </style:style>
    <style:style style:name="T35" style:family="text">
      <style:text-properties officeooo:rsid="00409799"/>
    </style:style>
    <style:style style:name="T36" style:family="text">
      <style:text-properties style:font-style-asian="italic" style:font-style-complex="italic"/>
    </style:style>
    <style:style style:name="T37" style:family="text">
      <style:text-properties officeooo:rsid="003d44d0" style:font-style-asian="italic" style:font-style-complex="italic"/>
    </style:style>
    <style:style style:name="T38" style:family="text">
      <style:text-properties officeooo:rsid="004139c2"/>
    </style:style>
    <style:style style:name="T39" style:family="text">
      <style:text-properties officeooo:rsid="004306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draw:frame draw:style-name="fr1" draw:name="graphics1" text:anchor-type="paragraph" svg:x="0.9165in" svg:y="0.0937in" svg:width="4.8598in" svg:height="1.1102in" draw:z-index="0"><draw:image xlink:href="Pictures/100000000000020F00000080149223C0FAB89B46.jpg" xlink:type="simple" xlink:show="embed" xlink:actuate="onLoad" draw:mime-type="image/jpeg"/></draw:frame></text:p>
      <text:p text:style-name="Subtitle"/>
      <text:p text:style-name="Subtitle"/>
      <text:p text:style-name="P3"><text:a xlink:type="simple" xlink:href="https://www.model-railway-signalling.co.uk/" text:style-name="Internet_20_link" text:visited-style-name="Visited_20_Internet_20_Link"><text:span text:style-name="T1">https://www.model-railway-signalling.co.uk/</text:span></text:a></text:p>
      <text:p text:style-name="P4"><text:span text:style-name="T5">©</text:span><text:span text:style-name="T6"> DCC Model Railway Signalling. All Rights Reserved.</text:span></text:p>
      <text:p text:style-name="P6"/>
      <text:p text:style-name="Subtitle"><text:span text:style-name="T4">DCC Signalling </text:span><text:span text:style-name="T22">Application Download Instructions</text:span></text:p>
      <text:p text:style-name="P8">Version <text:span text:style-name="T39">2</text:span>.0 – <text:span text:style-name="T39">May 2026</text:span></text:p>
      <text:p text:style-name="P8"/>
      <text:p text:style-name="P9">The DCC Signalling application is free to download and use.</text:p>
      <text:p text:style-name="P9">It will work on Linux Platforms and Windows platforms <text:span text:style-name="T24">(</text:span><text:span text:style-name="T34">we </text:span><text:span text:style-name="T24">have tested both)</text:span>. In theory it should also work on MacOS as the software uses the standard cross-platform graphics libraries, but the last time <text:span text:style-name="T34">we </text:span>tried it, the signal and point buttons weren’t rendering properly on the display.</text:p>
      <text:p text:style-name="P9">Running <text:span text:style-name="T24">on a non-Raspberry Pi platform </text:span>without the SPROG-DCC programming controller, <text:span text:style-name="T24">the application</text:span> won’t send out DCC commands and you won't be able to connect in external track sensors to drive the track occupancy, <text:span text:style-name="T24">but you</text:span> will be able to design, configure and test signalling schemes for your layout (or even simulate real-world signalling schemes <text:span text:style-name="T24">as others have done</text:span>).</text:p>
      <text:p text:style-name="P9">This guide provides <text:span text:style-name="T24">generic </text:span>instructions on how to download and run-up the system. If you hit problems or need advice then please reach out to us at DCC Model Railway Signalling and we’ll do our best to help. Feedback on these instructions is also welcome (so we can keep them up to date).</text:p>
      <text:p text:style-name="P2">For information on how to use the <text:span text:style-name="T4">s</text:span>ignalling application, refer to the <text:span text:style-name="T4">separate </text:span>application quickstart guide, <text:span text:style-name="T4">available for download from <text:s/></text:span><text:a xlink:type="simple" xlink:href="https://www.model-railway-signalling.co.uk/" text:style-name="Internet_20_link" text:visited-style-name="Visited_20_Internet_20_Link"><text:span text:style-name="T1">https://www.model-railway-signalling.co.uk/</text:span></text:a><text:span text:style-name="T1">.</text:span></text:p>
      <text:p text:style-name="P1"/>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651_398304742" text:style-name="Index_20_Link" text:visited-style-name="Index_20_Link">Pre-requisites<text:tab/>2</text:a></text:p>
          <text:p text:style-name="P14"><text:a xlink:type="simple" xlink:href="#__RefHeading__2809_1881561095" text:style-name="Index_20_Link" text:visited-style-name="Index_20_Link">Installing and running the application<text:tab/>3</text:a></text:p>
          <text:p text:style-name="P14"><text:a xlink:type="simple" xlink:href="#__RefHeading___Toc2180_778664013" text:style-name="Index_20_Link" text:visited-style-name="Index_20_Link">Additional notes and instructions<text:tab/>4</text:a></text:p>
          <text:p text:style-name="P14"><text:a xlink:type="simple" xlink:href="#__RefHeading___Toc2184_778664013" text:style-name="Index_20_Link" text:visited-style-name="Index_20_Link">Resolving Wayland performance issues<text:tab/>4</text:a></text:p>
        </text:index-body>
      </text:table-of-content>
      <text:p text:style-name="P5"><text:s/></text:p>
      <text:p text:style-name="P7"/>
      <text:p text:style-name="P7"/>
      <text:p text:style-name="P6"/>
      <text:h text:style-name="P23" text:outline-level="1"><text:bookmark-start text:name="__RefHeading___Toc651_398304742"/>Pre-<text:span text:style-name="T24">r</text:span>equisites<text:bookmark-end text:name="__RefHeading___Toc651_398304742"/></text:h>
      <text:p text:style-name="P10"><text:span text:style-name="T22">Before installing the application you will need to install </text:span><text:span text:style-name="T34">the </text:span><text:span text:style-name="T22">Python </text:span><text:span text:style-name="T34">environment</text:span><text:span text:style-name="T22"> on your computer, specifically Python 3 (any </text:span>version from <text:span text:style-name="T22">P</text:span>ython 3.8 <text:span text:style-name="T22">onward should work</text:span>).</text:p>
      <text:h text:style-name="Heading_20_2" text:outline-level="2">For Linux platforms</text:h>
      <text:p text:style-name="P11">The chances are that Python 3 is already installed. To test this, type at the command prompt:</text:p>
      <text:p text:style-name="P15"><text:span text:style-name="T30">$</text:span> python3 --version</text:p>
      <text:p text:style-name="P15">Python 3.11.2</text:p>
      <text:p text:style-name="Standard"/>
      <text:p text:style-name="Text_20_body">If Python3 is installed, this will report the version (as above). <text:span text:style-name="T23">If not then python3 is easily installed by typing the following commands (note the required </text:span><text:span text:style-name="T24">Python </text:span><text:span text:style-name="T23">version is specified):</text:span></text:p>
      <text:p text:style-name="P17"><text:span text:style-name="T30">$</text:span> sudo apt-get update</text:p>
      <text:p text:style-name="P17"><text:span text:style-name="T30">$</text:span> sudo apt-get install python3.11</text:p>
      <text:p text:style-name="Standard"/>
      <text:p text:style-name="Text_20_body">Alternatively you <text:span text:style-name="T24">may</text:span> be able to use the <text:span text:style-name="T24">specific</text:span> operating system’s package manager (similar to the Windows Add/Remove programs <text:span text:style-name="T24">utility</text:span>) <text:span text:style-name="T24">to install Python 3.</text:span></text:p>
      <text:h text:style-name="Heading_20_2" text:outline-level="2">For Windows Platforms</text:h>
      <text:p text:style-name="P12"><text:span text:style-name="T24">Python 3</text:span> <text:span text:style-name="T24">can be downloaded and installed </text:span>from the Windows app store <text:span text:style-name="T24">(make sure you choose a version of python 3.8 or later)</text:span>. <text:span text:style-name="T34">Note that the exact installation process may vary across different versions of windows</text:span></text:p>
      <text:list xml:id="list2071431772" text:style-name="L1">
        <text:list-item>
          <text:p text:style-name="P32">If <text:span text:style-name="T34">the install manager</text:span> gives you the option to install 'pip' then select this. </text:p>
        </text:list-item>
        <text:list-item>
          <text:p text:style-name="P33">If <text:span text:style-name="T34">the install manager</text:span> gives you the option to 'add to python path' <text:span text:style-name="T34">then select this</text:span></text:p>
        </text:list-item>
      </text:list>
      <text:p text:style-name="P38">To check the installation, <text:span text:style-name="T24">first o</text:span><text:span text:style-name="T8">pen </text:span><text:span text:style-name="T9">the</text:span><text:span text:style-name="T8"> '</text:span><text:span text:style-name="T14">command prompt</text:span><text:span text:style-name="T8">' </text:span><text:span text:style-name="T9">application</text:span><text:span text:style-name="T8"> (in the windows search bar start typing </text:span><text:span text:style-name="T14">command prompt</text:span><text:span text:style-name="T8"> and</text:span><text:span text:style-name="T9"> it</text:span><text:span text:style-name="T8"> should come up </text:span><text:span text:style-name="T9">in the search</text:span><text:span text:style-name="T8">).</text:span><text:span text:style-name="T24"> <text:s/>Then, in the window type:</text:span></text:p>
      <text:p text:style-name="P16"><text:span text:style-name="T30">&gt;</text:span> python3 --version</text:p>
      <text:p text:style-name="P16">Python 3.11.2</text:p>
      <text:p text:style-name="Standard"/>
      <text:p text:style-name="P13">This will report the installed version (similar to the Linux installation)</text:p>
      <text:p text:style-name="P12"/>
      <text:p text:style-name="P12"/>
      <text:h text:style-name="P24" text:outline-level="1"><text:bookmark-start text:name="__RefHeading__2809_1881561095"/>Installing and running the application<text:bookmark-end text:name="__RefHeading__2809_1881561095"/></text:h>
      <text:p text:style-name="P13">The instructions are broadly the same for both Windows and Linux platforms, <text:span text:style-name="T34">but some versions of Windows can be problematic and additional steps may be required. </text:span>All commands should be entered in the Terminal window (Linux) or Command Prompt window (Windows).</text:p>
      <text:h text:style-name="Heading_20_2" text:outline-level="2">For Linux platforms</text:h>
      <text:h text:style-name="P26" text:outline-level="4">Installing the latest version of the application</text:h>
      <text:p text:style-name="P13">If installing the application for the first time, first try:</text:p>
      <text:p text:style-name="P21"><text:span text:style-name="T31">$</text:span><text:span text:style-name="T25"> pip</text:span><text:span text:style-name="T26">3</text:span><text:span text:style-name="T25"> install model-railway-signals</text:span> </text:p>
      <text:p text:style-name="P13">The above should work for most python installations, but if this errors (command-line version of ‘pip’ is probably not installed/enabled) then try:</text:p>
      <text:p text:style-name="P21"><text:span text:style-name="T31">$</text:span><text:span text:style-name="T25"> python</text:span><text:span text:style-name="T26">3</text:span><text:span text:style-name="T25"> -m pip install model-railway-signals</text:span></text:p>
      <text:p text:style-name="Text_20_body">When installing the application on <text:span text:style-name="T24">Linux platforms with </text:span>later versions of python, <text:span text:style-name="T24">the installation may fail with a reported error of</text:span>:</text:p>
      <text:p text:style-name="P18">error: externally-managed-environment</text:p>
      <text:p text:style-name="Text_20_body">To overcome this, add the '<text:span text:style-name="T2">--break-system-packages</text:span>' argument to the command :</text:p>
      <text:p text:style-name="P22"><text:span text:style-name="T19">$</text:span><text:span text:style-name="T11"> pip</text:span><text:span text:style-name="T12">3</text:span><text:span text:style-name="T11"> install --break-system-packages model-railway-signals <text:s/></text:span><text:span text:style-name="T18">OR</text:span></text:p>
      <text:p text:style-name="P22"><text:span text:style-name="T19">$</text:span><text:span text:style-name="T11"> </text:span><text:span text:style-name="T12">python3 -m </text:span><text:span text:style-name="T11">pip install --break-system-packages model-railway-signals</text:span></text:p>
      <text:h text:style-name="Heading_20_4" text:outline-level="4"><text:span text:style-name="T24">Removing</text:span> the application:</text:h>
      <text:p text:style-name="Text_20_body">Removing the application uses similar commands to install and upgrade. <text:span text:style-name="T24">Again, use whichever command worked for the initial install</text:span>:</text:p>
      <text:p text:style-name="P18"><text:span text:style-name="T30">$</text:span> pip<text:span text:style-name="T24">3</text:span> uninstall model-railway-signals <text:s text:c="4"/><text:span text:style-name="T33">OR</text:span></text:p>
      <text:p text:style-name="P19"><text:span text:style-name="T32">$</text:span><text:span text:style-name="T28"> python3 -m pip uninstall model-railway-signals <text:s text:c="2"/></text:span></text:p>
      <text:h text:style-name="Heading_20_4" text:outline-level="4">Running the application:</text:h>
      <text:p text:style-name="P12"><text:span text:style-name="T24">The application can be started from the Terminal window <text:s/>window</text:span>:</text:p>
      <text:p text:style-name="P20"><text:span text:style-name="T32">$</text:span><text:span text:style-name="T28"> </text:span><text:span text:style-name="T27">python3 -m</text:span><text:span text:style-name="T28"> model</text:span><text:span text:style-name="T27">_</text:span><text:span text:style-name="T28">railway</text:span><text:span text:style-name="T27">_</text:span><text:span text:style-name="T28">signals</text:span></text:p>
      <text:p text:style-name="P12"><text:span text:style-name="T27">Note the use of underscores in the above command (rather than hyphens)</text:span><text:span text:style-name="T28">.</text:span></text:p>
      <text:h text:style-name="P25" text:outline-level="2">For <text:span text:style-name="T7">Windows</text:span> platforms</text:h>
      <text:h text:style-name="P26" text:outline-level="4">Installing the latest version of the application</text:h>
      <text:p text:style-name="P35">If installing the application for the first time, first try:</text:p>
      <text:p text:style-name="P28"><text:span text:style-name="T31">&gt;</text:span><text:span text:style-name="T25"> pip</text:span><text:span text:style-name="T26">3</text:span><text:span text:style-name="T25"> install model-railway-signals</text:span> </text:p>
      <text:p text:style-name="P35">The above should work for most python installations, but if this errors (command-line version of ‘pip’ is probably not installed/enabled) then try:</text:p>
      <text:p text:style-name="P31"><text:span text:style-name="T19">&gt;</text:span><text:span text:style-name="T11"> python</text:span><text:span text:style-name="T12">3</text:span><text:span text:style-name="T11"> -m pip install model-railway-signals</text:span></text:p>
      <text:p text:style-name="P39"><text:span text:style-name="T35">The application uses the ‘pygame’ library, which should be automatically installed with the application, but this has been seen to fail due to missing Windows library dependencies. To overcome this, type the following <text:s/>to install all required elements sequentially:</text:span></text:p>
      <text:p text:style-name="P42"><text:span text:style-name="T19">&gt;</text:span><text:span text:style-name="T11"> pip</text:span><text:span text:style-name="T12">3</text:span><text:span text:style-name="T11"> </text:span><text:span text:style-name="T10">un</text:span><text:span text:style-name="T11">install </text:span><text:span text:style-name="T10">pygame</text:span></text:p>
      <text:p text:style-name="P42"><text:span text:style-name="T19">&gt;</text:span><text:span text:style-name="T11"> pip</text:span><text:span text:style-name="T12">3 </text:span><text:span text:style-name="T11">install model-railway-signals --no-deps</text:span></text:p>
      <text:p text:style-name="P43"><text:span text:style-name="T19">&gt;</text:span><text:span text:style-name="T11"> pip</text:span><text:span text:style-name="T12">3 </text:span><text:span text:style-name="T11">install </text:span><text:span text:style-name="T13">pygame-ce</text:span></text:p>
      <text:p text:style-name="P43"><text:span text:style-name="T19">&gt;</text:span><text:span text:style-name="T11"> pip</text:span><text:span text:style-name="T12">3 </text:span><text:span text:style-name="T11">install zeroconf</text:span></text:p>
      <text:p text:style-name="P43"><text:span text:style-name="T19">&gt;</text:span><text:span text:style-name="T11"> pip</text:span><text:span text:style-name="T12">3 </text:span><text:span text:style-name="T11">install paho-mqtt</text:span></text:p>
      <text:p text:style-name="P43"><text:span text:style-name="T19">&gt;</text:span><text:span text:style-name="T11"> pip</text:span><text:span text:style-name="T12">3 </text:span><text:span text:style-name="T11">install pyserial</text:span></text:p>
      <text:p text:style-name="P44"><text:span text:style-name="T36">(or use the equivalent <text:s/></text:span><text:span text:style-name="T16">python</text:span><text:span text:style-name="T17">3</text:span><text:span text:style-name="T16"> -m pip …</text:span><text:span text:style-name="T37"> <text:s text:c="2"/></text:span><text:span text:style-name="T36">command formats)</text:span></text:p>
      <text:h text:style-name="P27" text:outline-level="4"><text:span text:style-name="T24">Removing</text:span> the application:</text:h>
      <text:p text:style-name="P38">Removing the application uses similar commands to install and upgrade. <text:span text:style-name="T24">Again, use whichever command </text:span><text:span text:style-name="T38">format </text:span><text:span text:style-name="T24">worked for the initial install</text:span>:</text:p>
      <text:p text:style-name="P29"><text:span text:style-name="T30">&gt;</text:span> pip<text:span text:style-name="T24">3</text:span> uninstall model-railway-signals <text:s text:c="4"/><text:span text:style-name="T33">OR</text:span></text:p>
      <text:p text:style-name="P30"><text:span text:style-name="T32">&gt;</text:span><text:span text:style-name="T28"> python3 -m pip uninstall model-railway-signals <text:s text:c="2"/></text:span></text:p>
      <text:h text:style-name="P27" text:outline-level="4">Running the application:</text:h>
      <text:p text:style-name="P38"><text:span text:style-name="T24">The application can be started from the Terminal window / Command Prompt window, </text:span><text:span text:style-name="T38">ensuring that you are in your home folder (as indicated by the command prompt) - the application will not work if you try to run it from a folder which does not have user write access</text:span>:</text:p>
      <text:p text:style-name="Text_20_body"><text:tab/>C:\Users\<text:span text:style-name="T2">YourUsername</text:span>&gt; <text:span text:style-name="T12">python3 -m</text:span><text:span text:style-name="T11"> model</text:span><text:span text:style-name="T12">_</text:span><text:span text:style-name="T11">railway</text:span><text:span text:style-name="T12">_</text:span><text:span text:style-name="T11">signals</text:span></text:p>
      <text:p text:style-name="Standard"><text:span text:style-name="T11"/></text:p>
      <text:p text:style-name="P41"><text:span text:style-name="T23">I</text:span>f you are not in your home folder (example prompt below) you can change directory and then run up the application <text:s/>as follows:</text:p>
      <text:p text:style-name="Text_20_body"><text:tab/>C:\WINDOWS\system32&gt; <text:span text:style-name="T12">cd C:\Users\YourUsername</text:span></text:p>
      <text:p text:style-name="Text_20_body"><text:tab/>C:\Users\YourUsername&gt; <text:span text:style-name="T12">python3 -m model_railway_signals</text:span></text:p>
      <text:p text:style-name="P40"/>
      <text:p text:style-name="Text_20_body"><text:s/></text:p>
      <text:h text:style-name="Heading_20_1" text:outline-level="1"><text:bookmark-start text:name="__RefHeading___Toc2184_778664013"/><text:soft-page-break/>Resolving <text:span text:style-name="T24">Wayland</text:span> performance issues <text:bookmark-end text:name="__RefHeading___Toc2184_778664013"/></text:h>
      <text:p text:style-name="P13">When running the application on Linux installations that use ‘Wayland’ as the graphics back-end rather than X11 (e.g. the recent Debian Bookworm release for the Raspberry Pi), you may well find the user-interface performance is terrible. From what <text:span text:style-name="T38">we</text:span> <text:span text:style-name="T38">have found out</text:span>, this appears to be a wider issue with Tkinter (the ‘standard’ <text:s/>graphics library used by many applications including this one).</text:p>
      <text:p text:style-name="P13">There are a number of active discussions on the internet (some of which are quite heated) as to whether Wayland is currently fit for purpose, but no specific solutions for Tkinter as yet.</text:p>
      <text:p text:style-name="P12"><text:span text:style-name="T24">In the meantime, the only workaround </text:span><text:span text:style-name="T38">we</text:span><text:span text:style-name="T24">’ve found </text:span>is to switch the <text:span text:style-name="T24">graphics</text:span> back-end <text:span text:style-name="T24">from Wayland</text:span> <text:span text:style-name="T24">back to </text:span><text:s/>X11 - performance of the <text:span text:style-name="T24">Signalling application</text:span> <text:span text:style-name="T24">is immediately restored.</text:span></text:p>
      <text:p text:style-name="P12">To change the back-end <text:span text:style-name="T24">on a Raspberry Pi</text:span>:</text:p>
      <text:list xml:id="list96412810" text:style-name="L2">
        <text:list-item>
          <text:p text:style-name="P36"><text:span text:style-name="T24">R</text:span>un "sudo raspi-config" <text:span text:style-name="T24">from a Terminal window</text:span></text:p>
        </text:list-item>
        <text:list-item>
          <text:p text:style-name="P36"><text:span text:style-name="T24">S</text:span>elect 'Advanced Options' then 'Wayland'</text:p>
        </text:list-item>
        <text:list-item>
          <text:p text:style-name="P36"><text:span text:style-name="T24">S</text:span>elect X11 <text:span text:style-name="T24">and apply.</text:span></text:p>
        </text:list-item>
      </text:list>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 svg:font-family="Consolas, Menlo, 'Deja Vu Sans Mono', 'Bitstream Vera Sans Mono', monospace"/>
    <style:font-face style:name="var fontStack-monospace" svg:font-family="'var fontStack-monospace', ui-monospace, SFMono-Regular, 'SF Mono', Menlo, Consolas, 'Liberation Mono', monospace"/>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07:28:10.070636447</meta:creation-date>
    <dc:date>2026-05-28T10:10:03.434293319</dc:date>
    <meta:editing-duration>P1DT5H47M48S</meta:editing-duration>
    <meta:editing-cycles>93</meta:editing-cycles>
    <meta:generator>LibreOffice/7.0.4.2$Linux_AARCH64 LibreOffice_project/00$Build-2</meta:generator>
    <meta:document-statistic meta:table-count="0" meta:image-count="1" meta:object-count="0" meta:page-count="5" meta:paragraph-count="87" meta:word-count="1077" meta:character-count="7030" meta:non-whitespace-character-count="6014"/>
  </office:meta>
</office:document-meta>
</file>